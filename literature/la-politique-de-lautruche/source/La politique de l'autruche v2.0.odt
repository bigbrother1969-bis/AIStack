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Courier_New_1.ttf" manifest:media-type="application/x-font-ttf"/>
  <manifest:file-entry manifest:full-path="Fonts/Font_Courier_New_2.ttf" manifest:media-type="application/x-font-ttf"/>
  <manifest:file-entry manifest:full-path="Fonts/Font_Courier_New_3.ttf" manifest:media-type="application/x-font-ttf"/>
  <manifest:file-entry manifest:full-path="Fonts/Font_Times_New_Roman_2.ttf" manifest:media-type="application/x-font-ttf"/>
  <manifest:file-entry manifest:full-path="Fonts/Font_Times_New_Roman_4.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Times_New_Roman_3.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ohit_Devanagari_1.ttf" manifest:media-type="application/x-font-ttf"/>
  <manifest:file-entry manifest:full-path="Fonts/Font_Times_New_Roman_1.ttf" manifest:media-type="application/x-font-ttf"/>
  <manifest:file-entry manifest:full-path="Fonts/Font_Courier_New_4.ttf" manifest:media-type="application/x-font-ttf"/>
  <manifest:file-entry manifest:full-path="Fonts/Font_OpenSymbol_1.ttf" manifest:media-type="application/x-font-ttf"/>
  <manifest:file-entry manifest:full-path="settings.xml" manifest:media-type="text/xml"/>
  <manifest:file-entry manifest:full-path="styles.xml" manifest:media-type="text/xml"/>
  <manifest:file-entry manifest:full-path="Pictures/100000010000006800000022D63B1D0E.png" manifest:media-type="image/png"/>
  <manifest:file-entry manifest:full-path="Pictures/1000074400000AC70000038E4A54CC12.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vg:font-family="Alegreya" style:font-family-generic="roman" style:font-pitch="variable"/>
    <style:font-face style:name="Alegreya Medium" svg:font-family="'Alegreya Medium'" style:font-family-generic="roman" style:font-pitch="variable"/>
    <style:font-face style:name="Alegreya1" svg:font-family="Alegreya"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vg:font-face-src>
        <svg:font-face-uri xlink:href="Fonts/Font_Courier_New_1.ttf" xlink:type="simple" loext:font-style="normal" loext:font-weight="normal">
          <svg:font-face-format svg:string="truetype"/>
        </svg:font-face-uri>
        <svg:font-face-uri xlink:href="Fonts/Font_Courier_New_2.ttf" xlink:type="simple" loext:font-style="normal" loext:font-weight="bold">
          <svg:font-face-format svg:string="truetype"/>
        </svg:font-face-uri>
        <svg:font-face-uri xlink:href="Fonts/Font_Courier_New_3.ttf" xlink:type="simple" loext:font-style="italic" loext:font-weight="normal">
          <svg:font-face-format svg:string="truetype"/>
        </svg:font-face-uri>
        <svg:font-face-uri xlink:href="Fonts/Font_Courier_New_4.ttf" xlink:type="simple" loext:font-style="italic" loext:font-weight="bold">
          <svg:font-face-format svg:string="truetype"/>
        </svg:font-face-uri>
      </svg:font-face-src>
    </style:font-face>
    <style:font-face style:name="Courier New1" svg:font-family="'Courier New'" style:font-family-generic="system" style:font-pitch="variable"/>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ohit Devanagari" svg:font-family="'Lohit Devanagari'" style:font-family-generic="system" style:font-pitch="variable">
      <svg:font-face-src>
        <svg:font-face-uri xlink:href="Fonts/Font_Lohit_Devanagari_1.ttf" xlink:type="simple" loext:font-style="normal" loext:font-weight="normal">
          <svg:font-face-format svg:string="truetype"/>
        </svg:font-face-uri>
      </svg:font-face-src>
    </style:font-fac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vg:font-face-src>
        <svg:font-face-uri xlink:href="Fonts/Font_OpenSymbol_1.ttf" xlink:type="simple" loext:font-style="normal" loext:font-weight="normal">
          <svg:font-face-format svg:string="truetype"/>
        </svg:font-face-uri>
      </svg:font-face-src>
    </style:font-face>
    <style:font-face style:name="OpenSymbol2" svg:font-family="OpenSymbol" style:font-family-generic="system" style:font-pitch="variable">
      <svg:font-face-src>
        <svg:font-face-uri xlink:href="Fonts/Font_OpenSymbol_1.ttf" xlink:type="simple" loext:font-style="normal" loext:font-weight="normal">
          <svg:font-face-format svg:string="truetype"/>
        </svg:font-face-uri>
      </svg:font-face-src>
    </style:font-face>
    <style:font-face style:name="OpenSymbol3" svg:font-family="OpenSymbol" style:font-adornments="Regular" style:font-pitch="variable" style:font-charset="x-symbol">
      <svg:font-face-src>
        <svg:font-face-uri xlink:href="Fonts/Font_OpenSymbol_1.ttf" xlink:type="simple" loext:font-style="normal" loext:font-weight="normal">
          <svg:font-face-format svg:string="truetype"/>
        </svg:font-face-uri>
      </svg:font-face-src>
    </style:font-fac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text-properties fo:language="fr" fo:country="FR"/>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break-before="page"/>
      <style:text-properties fo:language="fr" fo:country="FR"/>
    </style:style>
    <style:style style:name="P6" style:family="paragraph" style:parent-style-name="Standard">
      <style:paragraph-properties fo:margin-left="0cm" fo:margin-right="0cm" fo:text-indent="1.27cm" style:auto-text-indent="false"/>
      <style:text-properties fo:language="fr" fo:country="FR"/>
    </style:style>
    <style:style style:name="P7" style:family="paragraph" style:parent-style-name="Standard">
      <loext:graphic-properties draw:fill-hatch-name="hatch"/>
      <style:paragraph-properties fo:margin-left="0cm" fo:margin-right="0cm" fo:text-indent="1.27cm" style:auto-text-indent="false"/>
      <style:text-properties fo:language="fr" fo:country="FR"/>
    </style:style>
    <style:style style:name="P8" style:family="paragraph" style:parent-style-name="Standard">
      <style:paragraph-properties fo:margin-left="0cm" fo:margin-right="0cm" fo:text-indent="1.27cm" style:auto-text-indent="false" fo:break-before="page"/>
      <style:text-properties fo:language="fr" fo:country="FR"/>
    </style:style>
    <style:style style:name="P9" style:family="paragraph" style:parent-style-name="Standard">
      <style:paragraph-properties fo:margin-top="0cm" fo:margin-bottom="0cm" style:contextual-spacing="false"/>
      <style:text-properties fo:language="fr" fo:country="FR"/>
    </style:style>
    <style:style style:name="P10" style:family="paragraph" style:parent-style-name="Footnote">
      <style:text-properties fo:language="fr" fo:country="FR"/>
    </style:style>
    <style:style style:name="P11" style:family="paragraph" style:parent-style-name="Footnote">
      <style:text-properties fo:language="fr" fo:country="FR" style:language-asian="en" style:country-asian="US" style:language-complex="ar" style:country-complex="SA"/>
    </style:style>
    <style:style style:name="P12" style:family="paragraph" style:parent-style-name="Heading_20_1">
      <style:text-properties fo:language="fr" fo:country="FR"/>
    </style:style>
    <style:style style:name="P13" style:family="paragraph" style:parent-style-name="Heading_20_2">
      <style:text-properties fo:language="fr" fo:country="FR"/>
    </style:style>
    <style:style style:name="P14" style:family="paragraph" style:parent-style-name="Heading_20_3">
      <style:text-properties fo:language="fr" fo:country="FR"/>
    </style:style>
    <style:style style:name="P15" style:family="paragraph" style:parent-style-name="Heading_20_3">
      <style:text-properties fo:language="fr" fo:country="FR" style:font-name-asian="Calibri" style:font-name-complex="Arial" style:font-size-complex="14pt"/>
    </style:style>
    <style:style style:name="P16" style:family="paragraph" style:parent-style-name="Heading_20_3">
      <style:text-properties fo:language="fr" fo:country="FR" officeooo:paragraph-rsid="00ae5c21" style:font-name-asian="Calibri" style:font-name-complex="Arial" style:font-size-complex="14pt"/>
    </style:style>
    <style:style style:name="P17" style:family="paragraph" style:parent-style-name="Heading_20_4">
      <style:text-properties fo:language="fr" fo:country="FR"/>
    </style:style>
    <style:style style:name="P18" style:family="paragraph" style:parent-style-name="Heading_20_5">
      <style:text-properties fo:language="fr" fo:country="FR"/>
    </style:style>
    <style:style style:name="P19" style:family="paragraph" style:parent-style-name="Standard">
      <style:paragraph-properties fo:margin-left="1cm" fo:margin-right="0.9cm" fo:margin-top="0cm" fo:margin-bottom="0cm" style:contextual-spacing="false" fo:text-indent="0cm" style:auto-text-indent="false"/>
      <style:text-properties fo:language="fr" fo:country="FR" fo:font-style="italic" style:font-style-asian="italic" style:font-style-complex="italic"/>
    </style:style>
    <style:style style:name="P20" style:family="paragraph" style:parent-style-name="Standard">
      <style:paragraph-properties fo:margin-left="0cm" fo:margin-right="0cm" fo:text-indent="1.27cm" style:auto-text-indent="false"/>
      <style:text-properties fo:language="fr" fo:country="FR" style:font-weight-complex="bold"/>
    </style:style>
    <style:style style:name="P21" style:family="paragraph" style:parent-style-name="Heading_20_3">
      <style:text-properties fo:language="fr" fo:country="FR" officeooo:paragraph-rsid="005ef854"/>
    </style:style>
    <style:style style:name="P22" style:family="paragraph" style:parent-style-name="Standard">
      <style:paragraph-properties fo:margin-left="0cm" fo:margin-right="0cm" fo:text-indent="1.27cm" style:auto-text-indent="false"/>
      <style:text-properties fo:language="fr" fo:country="FR" officeooo:paragraph-rsid="005ef854"/>
    </style:style>
    <style:style style:name="P23" style:family="paragraph" style:parent-style-name="Standard">
      <loext:graphic-properties draw:fill-gradient-name="gradient" draw:fill-hatch-name="hatch"/>
      <style:paragraph-properties fo:margin-left="0cm" fo:margin-right="0cm" fo:text-indent="1.27cm" style:auto-text-indent="false"/>
      <style:text-properties fo:language="fr" fo:country="FR" officeooo:paragraph-rsid="005ef854"/>
    </style:style>
    <style:style style:name="P24" style:family="paragraph" style:parent-style-name="Standard">
      <style:paragraph-properties fo:margin-left="0cm" fo:margin-right="0cm" fo:text-indent="1.27cm" style:auto-text-indent="false"/>
      <style:text-properties fo:language="fr" fo:country="FR" officeooo:rsid="005ef854" officeooo:paragraph-rsid="005ef854"/>
    </style:style>
    <style:style style:name="P25" style:family="paragraph" style:parent-style-name="Standard">
      <style:paragraph-properties fo:margin-left="0cm" fo:margin-right="0cm" fo:text-indent="1.27cm" style:auto-text-indent="false"/>
      <style:text-properties fo:language="fr" fo:country="FR" officeooo:paragraph-rsid="00aa1923"/>
    </style:style>
    <style:style style:name="P26" style:family="paragraph" style:parent-style-name="Heading_20_3">
      <style:text-properties fo:language="fr" fo:country="FR" officeooo:paragraph-rsid="00ae5c21"/>
    </style:style>
    <style:style style:name="P27" style:family="paragraph" style:parent-style-name="Standard">
      <style:paragraph-properties fo:margin-left="0cm" fo:margin-right="0cm" fo:text-indent="1.27cm" style:auto-text-indent="false"/>
      <style:text-properties fo:language="fr" fo:country="FR" officeooo:paragraph-rsid="00ae5c21"/>
    </style:style>
    <style:style style:name="P28" style:family="paragraph" style:parent-style-name="Heading_20_3">
      <style:paragraph-properties fo:margin-left="0cm" fo:margin-right="0cm" fo:text-indent="1.27cm" style:auto-text-indent="false"/>
      <style:text-properties fo:language="fr" fo:country="FR" officeooo:rsid="00a575e5" officeooo:paragraph-rsid="00b012c2"/>
    </style:style>
    <style:style style:name="P29" style:family="paragraph" style:parent-style-name="Standard">
      <style:paragraph-properties fo:margin-left="0cm" fo:margin-right="0cm" fo:text-indent="1.27cm" style:auto-text-indent="false"/>
      <style:text-properties fo:language="fr" fo:country="FR" officeooo:rsid="00a76f22" officeooo:paragraph-rsid="00b012c2"/>
    </style:style>
    <style:style style:name="P30" style:family="paragraph" style:parent-style-name="Standard">
      <style:paragraph-properties fo:margin-left="0cm" fo:margin-right="0cm" fo:text-indent="1.27cm" style:auto-text-indent="false"/>
      <style:text-properties fo:language="fr" fo:country="FR" officeooo:rsid="00a8c31b" officeooo:paragraph-rsid="00b012c2"/>
    </style:style>
    <style:style style:name="P31" style:family="paragraph" style:parent-style-name="Standard">
      <style:paragraph-properties fo:margin-left="0cm" fo:margin-right="0cm" fo:text-indent="1.27cm" style:auto-text-indent="false"/>
      <style:text-properties fo:language="fr" fo:country="FR" officeooo:rsid="00ab3252" officeooo:paragraph-rsid="00b012c2"/>
    </style:style>
    <style:style style:name="P32" style:family="paragraph" style:parent-style-name="Standard">
      <style:paragraph-properties fo:margin-left="0cm" fo:margin-right="0cm" fo:text-indent="1.27cm" style:auto-text-indent="false"/>
      <style:text-properties fo:language="fr" fo:country="FR" officeooo:rsid="00ae61e7" officeooo:paragraph-rsid="00b012c2"/>
    </style:style>
    <style:style style:name="P33" style:family="paragraph" style:parent-style-name="Heading_20_3">
      <style:text-properties fo:language="fr" fo:country="FR" officeooo:rsid="00e1a20a" officeooo:paragraph-rsid="00e1a20a"/>
    </style:style>
    <style:style style:name="P34" style:family="paragraph" style:parent-style-name="Standard">
      <loext:graphic-properties draw:fill-hatch-name="hatch"/>
      <style:paragraph-properties fo:margin-left="0cm" fo:margin-right="0cm" fo:text-indent="1.27cm" style:auto-text-indent="false"/>
      <style:text-properties fo:language="fr" fo:country="FR" officeooo:rsid="00e1a20a" officeooo:paragraph-rsid="00e1a20a"/>
    </style:style>
    <style:style style:name="P35" style:family="paragraph" style:parent-style-name="Standard">
      <loext:graphic-properties draw:fill-hatch-name="hatch"/>
      <style:paragraph-properties fo:margin-left="0cm" fo:margin-right="0cm" fo:text-indent="1.27cm" style:auto-text-indent="false"/>
      <style:text-properties fo:language="fr" fo:country="FR" officeooo:paragraph-rsid="00e0c629"/>
    </style:style>
    <style:style style:name="P36" style:family="paragraph" style:parent-style-name="Standard">
      <loext:graphic-properties draw:fill-hatch-name="hatch"/>
      <style:paragraph-properties fo:margin-left="0cm" fo:margin-right="0cm" fo:text-indent="1.27cm" style:auto-text-indent="false"/>
      <style:text-properties fo:language="fr" fo:country="FR" officeooo:rsid="00e27598" officeooo:paragraph-rsid="00e27598"/>
    </style:style>
    <style:style style:name="P37" style:family="paragraph" style:parent-style-name="Standard">
      <style:paragraph-properties fo:text-align="end" style:justify-single-word="false"/>
      <style:text-properties fo:language="fr" fo:country="FR"/>
    </style:style>
    <style:style style:name="P38" style:family="paragraph" style:parent-style-name="Footnote">
      <style:paragraph-properties fo:text-align="start" style:justify-single-word="false"/>
    </style:style>
    <style:style style:name="P39" style:family="paragraph" style:parent-style-name="Standard">
      <style:paragraph-properties fo:margin-top="0cm" fo:margin-bottom="0.423cm" style:contextual-spacing="false" fo:text-align="center" style:justify-single-word="false"/>
    </style:style>
    <style:style style:name="P40" style:family="paragraph" style:parent-style-name="Standard">
      <style:paragraph-properties fo:margin-top="0cm" fo:margin-bottom="0.282cm" style:contextual-spacing="false" fo:text-align="center" style:justify-single-word="false"/>
    </style:style>
    <style:style style:name="P41" style:family="paragraph" style:parent-style-name="Standard">
      <style:paragraph-properties fo:margin-top="0cm" fo:margin-bottom="0.282cm" style:contextual-spacing="true" fo:text-align="center" style:justify-single-word="false"/>
    </style:style>
    <style:style style:name="P42" style:family="paragraph" style:parent-style-name="Standard">
      <style:paragraph-properties fo:margin-top="0cm" fo:margin-bottom="0.282cm" style:contextual-spacing="false" fo:text-align="center" style:justify-single-word="false"/>
      <style:text-properties officeooo:paragraph-rsid="00b012c2"/>
    </style:style>
    <style:style style:name="P43" style:family="paragraph" style:parent-style-name="Standard">
      <style:paragraph-properties fo:margin-top="0cm" fo:margin-bottom="0.282cm" style:contextual-spacing="false" fo:text-align="center" style:justify-single-word="false" fo:break-before="page"/>
      <style:text-properties officeooo:paragraph-rsid="00b012c2"/>
    </style:style>
    <style:style style:name="P44" style:family="paragraph" style:parent-style-name="Standard">
      <style:paragraph-properties fo:margin-top="0cm" fo:margin-bottom="0.282cm" style:contextual-spacing="false" fo:text-align="center" style:justify-single-word="false"/>
      <style:text-properties officeooo:paragraph-rsid="00e0c629"/>
    </style:style>
    <style:style style:name="P45" style:family="paragraph" style:parent-style-name="Heading_20_3">
      <style:text-properties officeooo:paragraph-rsid="00080519"/>
    </style:style>
    <style:style style:name="P46"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09c383" officeooo:paragraph-rsid="0009c383" style:letter-kerning="false" style:font-name-asian="Calibri" style:font-size-asian="11pt" style:language-asian="en" style:country-asian="US" style:font-name-complex="Arial" style:font-size-complex="11pt" style:language-complex="ar" style:country-complex="SA"/>
    </style:style>
    <style:style style:name="P47"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0e49a6" officeooo:paragraph-rsid="000f8909" style:letter-kerning="false" style:font-name-asian="Calibri" style:font-size-asian="11pt" style:language-asian="en" style:country-asian="US" style:font-name-complex="Arial" style:font-size-complex="11pt" style:language-complex="ar" style:country-complex="SA"/>
    </style:style>
    <style:style style:name="P48"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10a2f7" officeooo:paragraph-rsid="0010a2f7" style:letter-kerning="false" style:font-name-asian="Calibri" style:font-size-asian="11pt" style:language-asian="en" style:country-asian="US" style:font-name-complex="Arial" style:font-size-complex="11pt" style:language-complex="ar" style:country-complex="SA"/>
    </style:style>
    <style:style style:name="P49"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0f8909" officeooo:paragraph-rsid="000f8909" style:letter-kerning="false" style:font-name-asian="Calibri" style:font-size-asian="11pt" style:language-asian="en" style:country-asian="US" style:font-name-complex="Arial" style:font-size-complex="11pt" style:language-complex="ar" style:country-complex="SA"/>
    </style:style>
    <style:style style:name="P50"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20819f" officeooo:paragraph-rsid="0020819f" style:letter-kerning="false" style:font-name-asian="Calibri" style:font-size-asian="11pt" style:language-asian="en" style:country-asian="US" style:font-name-complex="Arial" style:font-size-complex="11pt" style:language-complex="ar" style:country-complex="SA"/>
    </style:style>
    <style:style style:name="P51"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22c3af" officeooo:paragraph-rsid="0022c3af" style:letter-kerning="false" style:font-name-asian="Calibri" style:font-size-asian="11pt" style:language-asian="en" style:country-asian="US" style:font-name-complex="Arial" style:font-size-complex="11pt" style:language-complex="ar" style:country-complex="SA"/>
    </style:style>
    <style:style style:name="P52"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2f695a" officeooo:paragraph-rsid="002f695a" style:letter-kerning="false" style:font-name-asian="Calibri" style:font-size-asian="11pt" style:language-asian="en" style:country-asian="US" style:font-name-complex="Arial" style:font-size-complex="11pt" style:language-complex="ar" style:country-complex="SA"/>
    </style:style>
    <style:style style:name="P53"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2f695a" officeooo:paragraph-rsid="002fefb2" style:letter-kerning="false" style:font-name-asian="Calibri" style:font-size-asian="11pt" style:language-asian="en" style:country-asian="US" style:font-name-complex="Arial" style:font-size-complex="11pt" style:language-complex="ar" style:country-complex="SA"/>
    </style:style>
    <style:style style:name="P54"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13f914" officeooo:paragraph-rsid="0013f914" style:letter-kerning="false" style:font-name-asian="Calibri" style:font-size-asian="11pt" style:language-asian="en" style:country-asian="US" style:font-name-complex="Arial" style:font-size-complex="11pt" style:language-complex="ar" style:country-complex="SA"/>
    </style:style>
    <style:style style:name="P55"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232a7" officeooo:paragraph-rsid="004232a7" style:letter-kerning="false" style:font-name-asian="Calibri" style:font-size-asian="11pt" style:language-asian="en" style:country-asian="US" style:font-name-complex="Arial" style:font-size-complex="11pt" style:language-complex="ar" style:country-complex="SA"/>
    </style:style>
    <style:style style:name="P56"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3a291" officeooo:paragraph-rsid="0043a291" style:letter-kerning="false" style:font-name-asian="Calibri" style:font-size-asian="11pt" style:language-asian="en" style:country-asian="US" style:font-name-complex="Arial" style:font-size-complex="11pt" style:language-complex="ar" style:country-complex="SA"/>
    </style:style>
    <style:style style:name="P57"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59fa1" officeooo:paragraph-rsid="00459fa1" style:letter-kerning="false" style:font-name-asian="Calibri" style:font-size-asian="11pt" style:language-asian="en" style:country-asian="US" style:font-name-complex="Arial" style:font-size-complex="11pt" style:language-complex="ar" style:country-complex="SA"/>
    </style:style>
    <style:style style:name="P58"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730c1" officeooo:paragraph-rsid="004730c1" style:letter-kerning="false" style:font-name-asian="Calibri" style:font-size-asian="11pt" style:language-asian="en" style:country-asian="US" style:font-name-complex="Arial" style:font-size-complex="11pt" style:language-complex="ar" style:country-complex="SA"/>
    </style:style>
    <style:style style:name="P59"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7438f" officeooo:paragraph-rsid="0047438f" style:letter-kerning="false" style:font-name-asian="Calibri" style:font-size-asian="11pt" style:language-asian="en" style:country-asian="US" style:font-name-complex="Arial"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margin-top="0cm" fo:margin-bottom="0.353cm" style:contextual-spacing="false" fo:text-align="justify" style:justify-single-word="false" fo:keep-together="always" fo:text-indent="1.27cm" style:auto-text-indent="false" fo:keep-with-next="always"/>
      <style:text-properties style:use-window-font-color="true" loext:opacity="0%" style:font-name="Alegreya" fo:font-size="11pt" fo:language="fr" fo:country="FR" officeooo:rsid="0041a2c9" officeooo:paragraph-rsid="003d735c" style:letter-kerning="false" style:font-name-asian="Calibri" style:font-size-asian="11pt" style:language-asian="en" style:country-asian="US" style:font-name-complex="Arial"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margin-top="0cm" fo:margin-bottom="0.353cm" style:contextual-spacing="false" fo:text-align="justify" style:justify-single-word="false" fo:text-indent="1.27cm" style:auto-text-indent="false"/>
      <style:text-properties style:use-window-font-color="true" loext:opacity="0%" style:font-name="Alegreya" fo:font-size="11pt" fo:language="fr" fo:country="FR" officeooo:rsid="0041a2c9" officeooo:paragraph-rsid="003e5d3a" style:letter-kerning="false" style:font-name-asian="Calibri" style:font-size-asian="11pt" style:language-asian="en" style:country-asian="US" style:font-name-complex="Arial"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margin-top="0cm" fo:margin-bottom="0.353cm" style:contextual-spacing="false" fo:text-align="justify" style:justify-single-word="false" fo:text-indent="1.27cm" style:auto-text-indent="false"/>
      <style:text-properties style:use-window-font-color="true" loext:opacity="0%" style:font-name="Alegreya" fo:font-size="11pt" fo:language="fr" fo:country="FR" officeooo:rsid="0041a2c9" officeooo:paragraph-rsid="003eef40" style:letter-kerning="false" style:font-name-asian="Calibri" style:font-size-asian="11pt" style:language-asian="en" style:country-asian="US" style:font-name-complex="Arial" style:font-size-complex="11pt" style:language-complex="ar" style:country-complex="SA"/>
    </style:style>
    <style:style style:name="P63"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1a2c9" officeooo:paragraph-rsid="0041a2c9" style:letter-kerning="false" style:font-name-asian="Calibri" style:font-size-asian="11pt" style:language-asian="en" style:country-asian="US" style:font-name-complex="Arial" style:font-size-complex="11pt" style:language-complex="ar" style:country-complex="SA"/>
    </style:style>
    <style:style style:name="P64" style:family="paragraph" style:parent-style-name="Standard">
      <loext:graphic-properties draw:fill-gradient-name="gradient" draw:fill-hatch-name="hatch"/>
      <style:paragraph-properties fo:margin-left="0cm" fo:margin-right="0cm" fo:text-indent="1.27cm" style:auto-text-indent="false"/>
      <style:text-properties style:use-window-font-color="true" loext:opacity="0%" style:font-name="Alegreya" fo:font-size="11pt" fo:language="fr" fo:country="FR" officeooo:rsid="0041a2c9" officeooo:paragraph-rsid="0041a2c9" style:letter-kerning="false" style:font-name-asian="Calibri" style:font-size-asian="11pt" style:language-asian="en" style:country-asian="US" style:font-name-complex="Arial" style:font-size-complex="11pt" style:language-complex="ar" style:country-complex="SA"/>
    </style:style>
    <style:style style:name="P65"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1a2c9" officeooo:paragraph-rsid="0084da59" style:letter-kerning="false" style:font-name-asian="Calibri" style:font-size-asian="11pt" style:language-asian="en" style:country-asian="US" style:font-name-complex="Arial" style:font-size-complex="11pt" style:language-complex="ar" style:country-complex="SA"/>
    </style:style>
    <style:style style:name="P66"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223317" officeooo:paragraph-rsid="00223317" style:letter-kerning="false" style:font-name-asian="Calibri" style:font-size-asian="11pt" style:language-asian="en" style:country-asian="US" style:font-name-complex="Arial" style:font-size-complex="11pt" style:language-complex="ar" style:country-complex="SA"/>
    </style:style>
    <style:style style:name="P67"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07de8" officeooo:paragraph-rsid="00407de8" style:letter-kerning="false" style:font-name-asian="Calibri" style:font-size-asian="11pt" style:language-asian="en" style:country-asian="US" style:font-name-complex="Arial" style:font-size-complex="11pt" style:language-complex="ar" style:country-complex="SA"/>
    </style:style>
    <style:style style:name="P68"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2fefb2" officeooo:paragraph-rsid="002fefb2" style:letter-kerning="false" style:font-name-asian="Calibri" style:font-size-asian="11pt" style:language-asian="en" style:country-asian="US" style:font-name-complex="Arial" style:font-size-complex="11pt" style:language-complex="ar" style:country-complex="SA"/>
    </style:style>
    <style:style style:name="P69"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386179" officeooo:paragraph-rsid="00386179" style:letter-kerning="false" style:font-name-asian="Calibri" style:font-size-asian="11pt" style:language-asian="en" style:country-asian="US" style:font-name-complex="Arial" style:font-size-complex="11pt" style:language-complex="ar" style:country-complex="SA"/>
    </style:style>
    <style:style style:name="P70"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38b55f" officeooo:paragraph-rsid="0038b55f" style:letter-kerning="false" style:font-name-asian="Calibri" style:font-size-asian="11pt" style:language-asian="en" style:country-asian="US" style:font-name-complex="Arial" style:font-size-complex="11pt" style:language-complex="ar" style:country-complex="SA"/>
    </style:style>
    <style:style style:name="P71"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3c3f3b" officeooo:paragraph-rsid="003c3f3b" style:letter-kerning="false" style:font-name-asian="Calibri" style:font-size-asian="11pt" style:language-asian="en" style:country-asian="US" style:font-name-complex="Arial" style:font-size-complex="11pt" style:language-complex="ar" style:country-complex="SA"/>
    </style:style>
    <style:style style:name="P72"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476141" officeooo:paragraph-rsid="00593a46" style:letter-kerning="false" style:font-name-asian="Calibri" style:font-size-asian="11pt" style:language-asian="en" style:country-asian="US" style:font-name-complex="Arial" style:font-size-complex="11pt" style:language-complex="ar" style:country-complex="SA"/>
    </style:style>
    <style:style style:name="P73"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828956" officeooo:paragraph-rsid="00830ad5" style:letter-kerning="false" style:font-name-asian="Calibri" style:font-size-asian="11pt" style:language-asian="en" style:country-asian="US" style:font-name-complex="Arial" style:font-size-complex="11pt" style:language-complex="ar" style:country-complex="SA"/>
    </style:style>
    <style:style style:name="P74"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84da59" officeooo:paragraph-rsid="0084da59" style:letter-kerning="false" style:font-name-asian="Calibri" style:font-size-asian="11pt" style:language-asian="en" style:country-asian="US" style:font-name-complex="Arial" style:font-size-complex="11pt" style:language-complex="ar" style:country-complex="SA"/>
    </style:style>
    <style:style style:name="P75"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886f49" officeooo:paragraph-rsid="00886f49" style:letter-kerning="false" style:font-name-asian="Calibri" style:font-size-asian="11pt" style:language-asian="en" style:country-asian="US" style:font-name-complex="Arial" style:font-size-complex="11pt" style:language-complex="ar" style:country-complex="SA"/>
    </style:style>
    <style:style style:name="P76"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88c1f4" officeooo:paragraph-rsid="0088c1f4" style:letter-kerning="false" style:font-name-asian="Calibri" style:font-size-asian="11pt" style:language-asian="en" style:country-asian="US" style:font-name-complex="Arial" style:font-size-complex="11pt" style:language-complex="ar" style:country-complex="SA"/>
    </style:style>
    <style:style style:name="P77"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8b2b6b" officeooo:paragraph-rsid="008b2b6b" style:letter-kerning="false" style:font-name-asian="Calibri" style:font-size-asian="11pt" style:language-asian="en" style:country-asian="US" style:font-name-complex="Arial" style:font-size-complex="11pt" style:language-complex="ar" style:country-complex="SA"/>
    </style:style>
    <style:style style:name="P78"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8b4683" officeooo:paragraph-rsid="008b4683" style:letter-kerning="false" style:font-name-asian="Calibri" style:font-size-asian="11pt" style:language-asian="en" style:country-asian="US" style:font-name-complex="Arial" style:font-size-complex="11pt" style:language-complex="ar" style:country-complex="SA"/>
    </style:style>
    <style:style style:name="P79"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8e9f7d" officeooo:paragraph-rsid="008e9f7d" style:letter-kerning="false" style:font-name-asian="Calibri" style:font-size-asian="11pt" style:language-asian="en" style:country-asian="US" style:font-name-complex="Arial" style:font-size-complex="11pt" style:language-complex="ar" style:country-complex="SA"/>
    </style:style>
    <style:style style:name="P80"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9071ba" officeooo:paragraph-rsid="009071ba" style:letter-kerning="false" style:font-name-asian="Calibri" style:font-size-asian="11pt" style:language-asian="en" style:country-asian="US" style:font-name-complex="Arial" style:font-size-complex="11pt" style:language-complex="ar" style:country-complex="SA"/>
    </style:style>
    <style:style style:name="P81"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94b792" officeooo:paragraph-rsid="0094b792" style:letter-kerning="false" style:font-name-asian="Calibri" style:font-size-asian="11pt" style:language-asian="en" style:country-asian="US" style:font-name-complex="Arial" style:font-size-complex="11pt" style:language-complex="ar" style:country-complex="SA"/>
    </style:style>
    <style:style style:name="P82"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96ffb2" officeooo:paragraph-rsid="0096ffb2" style:letter-kerning="false" style:font-name-asian="Calibri" style:font-size-asian="11pt" style:language-asian="en" style:country-asian="US" style:font-name-complex="Arial" style:font-size-complex="11pt" style:language-complex="ar" style:country-complex="SA"/>
    </style:style>
    <style:style style:name="P83"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9c9b8d" officeooo:paragraph-rsid="009c9b8d" style:letter-kerning="false" style:font-name-asian="Calibri" style:font-size-asian="11pt" style:language-asian="en" style:country-asian="US" style:font-name-complex="Arial" style:font-size-complex="11pt" style:language-complex="ar" style:country-complex="SA"/>
    </style:style>
    <style:style style:name="P84"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9cab32" officeooo:paragraph-rsid="009cab32" style:letter-kerning="false" style:font-name-asian="Calibri" style:font-size-asian="11pt" style:language-asian="en" style:country-asian="US" style:font-name-complex="Arial" style:font-size-complex="11pt" style:language-complex="ar" style:country-complex="SA"/>
    </style:style>
    <style:style style:name="P85"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9cab32" officeooo:paragraph-rsid="009c9b8d" style:letter-kerning="false" style:font-name-asian="Calibri" style:font-size-asian="11pt" style:language-asian="en" style:country-asian="US" style:font-name-complex="Arial" style:font-size-complex="11pt" style:language-complex="ar" style:country-complex="SA"/>
    </style:style>
    <style:style style:name="P86"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80cbd5" officeooo:paragraph-rsid="00830ad5" style:letter-kerning="false" style:font-name-asian="Calibri" style:font-size-asian="11pt" style:language-asian="en" style:country-asian="US" style:font-name-complex="Arial" style:font-size-complex="11pt" style:language-complex="ar" style:country-complex="SA"/>
    </style:style>
    <style:style style:name="P87"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ae61e7" officeooo:paragraph-rsid="00b012c2" style:letter-kerning="false" style:font-name-asian="Calibri" style:font-size-asian="11pt" style:language-asian="en" style:country-asian="US" style:font-name-complex="Arial" style:font-size-complex="11pt" style:language-complex="ar" style:country-complex="SA"/>
    </style:style>
    <style:style style:name="P88" style:family="paragraph" style:parent-style-name="Standard">
      <style:paragraph-properties fo:text-indent="1.27cm" style:auto-text-indent="false"/>
      <style:text-properties style:use-window-font-color="true" loext:opacity="0%" style:font-name="Alegreya" fo:font-size="11pt" fo:language="fr" fo:country="FR" officeooo:rsid="00afa515" officeooo:paragraph-rsid="00b012c2" style:letter-kerning="false" style:font-name-asian="Calibri" style:font-size-asian="11pt" style:language-asian="en" style:country-asian="US" style:font-name-complex="Arial" style:font-size-complex="11pt" style:language-complex="ar" style:country-complex="SA"/>
    </style:style>
    <style:style style:name="P89"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a78087" officeooo:paragraph-rsid="00b012c2" style:letter-kerning="false" style:font-name-asian="Calibri" style:font-size-asian="11pt" style:language-asian="en" style:country-asian="US" style:font-name-complex="Arial" style:font-size-complex="11pt" style:language-complex="ar" style:country-complex="SA"/>
    </style:style>
    <style:style style:name="P90" style:family="paragraph" style:parent-style-name="Standard">
      <style:paragraph-properties fo:text-indent="1.27cm" style:auto-text-indent="false"/>
      <style:text-properties style:use-window-font-color="true" loext:opacity="0%" style:font-name="Alegreya" fo:font-size="11pt" fo:language="fr" fo:country="FR" officeooo:rsid="00b266ba" officeooo:paragraph-rsid="00b266ba" style:letter-kerning="false" style:font-name-asian="Calibri" style:font-size-asian="11pt" style:language-asian="en" style:country-asian="US" style:font-name-complex="Arial" style:font-size-complex="11pt" style:language-complex="ar" style:country-complex="SA"/>
    </style:style>
    <style:style style:name="P91" style:family="paragraph" style:parent-style-name="Standard">
      <style:paragraph-properties fo:text-indent="1.27cm" style:auto-text-indent="false"/>
      <style:text-properties style:use-window-font-color="true" loext:opacity="0%" style:font-name="Alegreya" fo:font-size="11pt" fo:language="fr" fo:country="FR" officeooo:rsid="00b39891" officeooo:paragraph-rsid="00b39891" style:letter-kerning="false" style:font-name-asian="Calibri" style:font-size-asian="11pt" style:language-asian="en" style:country-asian="US" style:font-name-complex="Arial" style:font-size-complex="11pt" style:language-complex="ar" style:country-complex="SA"/>
    </style:style>
    <style:style style:name="P92" style:family="paragraph" style:parent-style-name="Standard">
      <style:paragraph-properties fo:text-indent="1.27cm" style:auto-text-indent="false"/>
      <style:text-properties style:use-window-font-color="true" loext:opacity="0%" style:font-name="Alegreya" fo:font-size="11pt" fo:language="fr" fo:country="FR" officeooo:rsid="00d5969a" officeooo:paragraph-rsid="00d5969a" style:letter-kerning="false" style:font-name-asian="Calibri" style:font-size-asian="11pt" style:language-asian="en" style:country-asian="US" style:font-name-complex="Arial" style:font-size-complex="11pt" style:language-complex="ar" style:country-complex="SA"/>
    </style:style>
    <style:style style:name="P93"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d6ea10" officeooo:paragraph-rsid="00d6ea10" style:letter-kerning="false" style:font-name-asian="Calibri" style:font-size-asian="11pt" style:language-asian="en" style:country-asian="US" style:font-name-complex="Arial" style:font-size-complex="11pt" style:language-complex="ar" style:country-complex="SA"/>
    </style:style>
    <style:style style:name="P94"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d753ec" officeooo:paragraph-rsid="00d753ec" style:letter-kerning="false" style:font-name-asian="Calibri" style:font-size-asian="11pt" style:language-asian="en" style:country-asian="US" style:font-name-complex="Arial" style:font-size-complex="11pt" style:language-complex="ar" style:country-complex="SA"/>
    </style:style>
    <style:style style:name="P95" style:family="paragraph" style:parent-style-name="Standard">
      <style:paragraph-properties fo:text-indent="1.27cm" style:auto-text-indent="false"/>
      <style:text-properties style:use-window-font-color="true" loext:opacity="0%" style:font-name="Alegreya" fo:font-size="11pt" fo:language="fr" fo:country="FR" officeooo:rsid="00d4971d" officeooo:paragraph-rsid="00d4971d" style:letter-kerning="false" style:font-name-asian="Calibri" style:font-size-asian="11pt" style:language-asian="en" style:country-asian="US" style:font-name-complex="Arial" style:font-size-complex="11pt" style:language-complex="ar" style:country-complex="SA"/>
    </style:style>
    <style:style style:name="P96"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paragraph-rsid="00e6ba4e" style:letter-kerning="false" style:font-name-asian="Calibri" style:font-size-asian="11pt" style:language-asian="en" style:country-asian="US" style:font-name-complex="Arial" style:font-size-complex="11pt" style:language-complex="ar" style:country-complex="SA"/>
    </style:style>
    <style:style style:name="P97"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e8ad13" officeooo:paragraph-rsid="00e8ad13" style:letter-kerning="false" style:font-name-asian="Calibri" style:font-size-asian="11pt" style:language-asian="en" style:country-asian="US" style:font-name-complex="Arial" style:font-size-complex="11pt" style:language-complex="ar" style:country-complex="SA"/>
    </style:style>
    <style:style style:name="P98"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e9f518" officeooo:paragraph-rsid="00e9f518" style:letter-kerning="false" style:font-name-asian="Calibri" style:font-size-asian="11pt" style:language-asian="en" style:country-asian="US" style:font-name-complex="Arial" style:font-size-complex="11pt" style:language-complex="ar" style:country-complex="SA"/>
    </style:style>
    <style:style style:name="P99"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eb27b7" officeooo:paragraph-rsid="00eb27b7" style:letter-kerning="false" style:font-name-asian="Calibri" style:font-size-asian="11pt" style:language-asian="en" style:country-asian="US" style:font-name-complex="Arial" style:font-size-complex="11pt" style:language-complex="ar" style:country-complex="SA"/>
    </style:style>
    <style:style style:name="P100"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ebef60" officeooo:paragraph-rsid="00ebef60" style:letter-kerning="false" style:font-name-asian="Calibri" style:font-size-asian="11pt" style:language-asian="en" style:country-asian="US" style:font-name-complex="Arial" style:font-size-complex="11pt" style:language-complex="ar" style:country-complex="SA"/>
    </style:style>
    <style:style style:name="P101"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ed811d" officeooo:paragraph-rsid="00ed811d" style:letter-kerning="false" style:font-name-asian="Calibri" style:font-size-asian="11pt" style:language-asian="en" style:country-asian="US" style:font-name-complex="Arial" style:font-size-complex="11pt" style:language-complex="ar" style:country-complex="SA"/>
    </style:style>
    <style:style style:name="P102"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ed811d" officeooo:paragraph-rsid="00edb339" style:letter-kerning="false" style:font-name-asian="Calibri" style:font-size-asian="11pt" style:language-asian="en" style:country-asian="US" style:font-name-complex="Arial" style:font-size-complex="11pt" style:language-complex="ar" style:country-complex="SA"/>
    </style:style>
    <style:style style:name="P103"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ef88ab" officeooo:paragraph-rsid="00ef88ab" style:letter-kerning="false" style:font-name-asian="Calibri" style:font-size-asian="11pt" style:language-asian="en" style:country-asian="US" style:font-name-complex="Arial" style:font-size-complex="11pt" style:language-complex="ar" style:country-complex="SA"/>
    </style:style>
    <style:style style:name="P104" style:family="paragraph" style:parent-style-name="Standard">
      <style:paragraph-properties fo:margin-left="0cm" fo:margin-right="0cm" fo:text-indent="1.27cm" style:auto-text-indent="false"/>
      <style:text-properties style:use-window-font-color="true" loext:opacity="0%" style:font-name="Alegreya" fo:font-size="11pt" fo:language="fr" fo:country="FR" officeooo:rsid="00deca91" officeooo:paragraph-rsid="00deca91" style:letter-kerning="false" style:font-name-asian="Calibri" style:font-size-asian="11pt" style:language-asian="en" style:country-asian="US" style:font-name-complex="Arial" style:font-size-complex="11pt" style:language-complex="ar" style:country-complex="SA"/>
    </style:style>
    <style:style style:name="P105"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edb339" officeooo:paragraph-rsid="00edb339" style:letter-kerning="false" style:font-name-asian="Calibri" style:font-size-asian="11pt" style:language-asian="en" style:country-asian="US" style:font-name-complex="Arial" style:font-size-complex="11pt" style:language-complex="ar" style:country-complex="SA"/>
    </style:style>
    <style:style style:name="P106"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f01faa" officeooo:paragraph-rsid="00f01faa" style:letter-kerning="false" style:font-name-asian="Calibri" style:font-size-asian="11pt" style:language-asian="en" style:country-asian="US" style:font-name-complex="Arial" style:font-size-complex="11pt" style:language-complex="ar" style:country-complex="SA"/>
    </style:style>
    <style:style style:name="P107"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f1ff0e" officeooo:paragraph-rsid="00f1ff0e" style:letter-kerning="false" style:font-name-asian="Calibri" style:font-size-asian="11pt" style:language-asian="en" style:country-asian="US" style:font-name-complex="Arial" style:font-size-complex="11pt" style:language-complex="ar" style:country-complex="SA"/>
    </style:style>
    <style:style style:name="P108" style:family="paragraph" style:parent-style-name="Standard">
      <loext:graphic-properties draw:fill-hatch-name="hatch"/>
      <style:paragraph-properties fo:text-indent="1.27cm" style:auto-text-indent="false"/>
      <style:text-properties style:use-window-font-color="true" loext:opacity="0%" style:font-name="Alegreya" fo:font-size="11pt" fo:language="fr" fo:country="FR" officeooo:rsid="00f20680" officeooo:paragraph-rsid="00f20680" style:letter-kerning="false" style:font-name-asian="Calibri" style:font-size-asian="11pt" style:language-asian="en" style:country-asian="US" style:font-name-complex="Arial" style:font-size-complex="11pt" style:language-complex="ar" style:country-complex="SA"/>
    </style:style>
    <style:style style:name="P109" style:family="paragraph" style:parent-style-name="Heading_20_3">
      <style:paragraph-properties fo:break-before="page"/>
      <style:text-properties style:use-window-font-color="true" loext:opacity="0%" style:font-name="Alegreya" fo:font-size="14pt" fo:language="fr" fo:country="FR" officeooo:rsid="0029750b" officeooo:paragraph-rsid="003e5d3a" style:letter-kerning="false" style:font-name-asian="Calibri" style:font-size-asian="14pt" style:language-asian="en" style:country-asian="US" style:font-name-complex="Times New Roman1" style:font-size-complex="11pt" style:language-complex="ar" style:country-complex="SA" style:font-weight-complex="bold"/>
    </style:style>
    <style:style style:name="P110" style:family="paragraph" style:parent-style-name="Heading_20_3">
      <style:text-properties style:use-window-font-color="true" loext:opacity="0%" style:font-name="Alegreya" fo:font-size="14pt" fo:language="fr" fo:country="FR" style:letter-kerning="false" style:font-name-asian="Calibri" style:font-size-asian="14pt" style:language-asian="en" style:country-asian="US" style:font-name-complex="Times New Roman1" style:font-size-complex="11pt" style:language-complex="ar" style:country-complex="SA" style:font-weight-complex="bold"/>
    </style:style>
    <style:style style:name="P111" style:family="paragraph" style:parent-style-name="Heading_20_3">
      <style:text-properties style:use-window-font-color="true" loext:opacity="0%" style:font-name="Alegreya" fo:font-size="14pt" fo:language="fr" fo:country="FR" officeooo:rsid="00afa515" officeooo:paragraph-rsid="00b012c2" style:letter-kerning="false" style:font-name-asian="Calibri" style:font-size-asian="14pt" style:language-asian="en" style:country-asian="US" style:font-name-complex="Times New Roman1" style:font-size-complex="11pt" style:language-complex="ar" style:country-complex="SA" style:font-weight-complex="bold"/>
    </style:style>
    <style:style style:name="P112" style:family="paragraph" style:parent-style-name="Standard">
      <style:paragraph-properties fo:line-height="120%" fo:text-align="center" style:justify-single-word="false"/>
      <style:text-properties style:use-window-font-color="true" loext:opacity="0%" fo:font-size="10pt" fo:language="fr" fo:country="FR" fo:font-style="italic" style:letter-kerning="false" style:font-name-asian="Calibri" style:font-size-asian="10pt" style:language-asian="en" style:country-asian="US" style:font-style-asian="italic" style:font-name-complex="Arial" style:font-size-complex="10pt" style:language-complex="ar" style:country-complex="SA" style:font-style-complex="italic"/>
    </style:style>
    <style:style style:name="P113" style:family="paragraph" style:parent-style-name="Standard">
      <style:paragraph-properties fo:line-height="120%" fo:text-align="center" style:justify-single-word="false"/>
      <style:text-properties style:use-window-font-color="true" loext:opacity="0%" fo:font-size="10pt" fo:language="fr" fo:country="FR" fo:font-style="italic" officeooo:rsid="002b00f9" officeooo:paragraph-rsid="002b00f9" style:letter-kerning="false" style:font-name-asian="Calibri" style:font-size-asian="10pt" style:language-asian="en" style:country-asian="US" style:font-style-asian="italic" style:font-name-complex="Arial" style:font-size-complex="10pt" style:language-complex="ar" style:country-complex="SA" style:font-style-complex="italic"/>
    </style:style>
    <style:style style:name="P114" style:family="paragraph" style:parent-style-name="Standard">
      <style:paragraph-properties fo:margin-left="0cm" fo:margin-right="0cm" fo:text-indent="1.27cm" style:auto-text-indent="false"/>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115" style:family="paragraph" style:parent-style-name="Standard">
      <style:paragraph-properties fo:margin-left="0cm" fo:margin-right="0cm" fo:text-indent="1.27cm" style:auto-text-indent="false"/>
      <style:text-properties style:use-window-font-color="true" loext:opacity="0%" fo:font-size="11pt" fo:language="fr" fo:country="FR" officeooo:rsid="00b6cd38" officeooo:paragraph-rsid="00b6cd38" style:letter-kerning="false" style:font-name-asian="Calibri" style:font-size-asian="11pt" style:language-asian="en" style:country-asian="US" style:font-name-complex="Arial" style:font-size-complex="11pt" style:language-complex="ar" style:country-complex="SA"/>
    </style:style>
    <style:style style:name="P116" style:family="paragraph" style:parent-style-name="Standard">
      <style:paragraph-properties fo:margin-left="0cm" fo:margin-right="0cm" fo:text-indent="1.27cm" style:auto-text-indent="false"/>
      <style:text-properties style:use-window-font-color="true" loext:opacity="0%" fo:font-size="11pt" fo:language="fr" fo:country="FR" officeooo:rsid="00ba14d9" officeooo:paragraph-rsid="00bbe5ac" style:letter-kerning="false" style:font-name-asian="Calibri" style:font-size-asian="11pt" style:language-asian="en" style:country-asian="US" style:font-name-complex="Arial" style:font-size-complex="11pt" style:language-complex="ar" style:country-complex="SA"/>
    </style:style>
    <style:style style:name="P117" style:family="paragraph" style:parent-style-name="Standard">
      <style:paragraph-properties fo:margin-left="0cm" fo:margin-right="0cm" fo:text-indent="1.27cm" style:auto-text-indent="false"/>
      <style:text-properties style:use-window-font-color="true" loext:opacity="0%" fo:font-size="11pt" fo:language="fr" fo:country="FR" officeooo:rsid="00bce2c1" officeooo:paragraph-rsid="00bce2c1" style:letter-kerning="false" style:font-name-asian="Calibri" style:font-size-asian="11pt" style:language-asian="en" style:country-asian="US" style:font-name-complex="Arial" style:font-size-complex="11pt" style:language-complex="ar" style:country-complex="SA"/>
    </style:style>
    <style:style style:name="P118" style:family="paragraph" style:parent-style-name="Standard">
      <style:paragraph-properties fo:margin-left="0cm" fo:margin-right="0cm" fo:text-indent="1.27cm" style:auto-text-indent="false"/>
      <style:text-properties style:use-window-font-color="true" loext:opacity="0%" fo:font-size="11pt" fo:language="fr" fo:country="FR" officeooo:rsid="00bfc0f7" officeooo:paragraph-rsid="00bfc0f7" style:letter-kerning="false" style:font-name-asian="Calibri" style:font-size-asian="11pt" style:language-asian="en" style:country-asian="US" style:font-name-complex="Arial" style:font-size-complex="11pt" style:language-complex="ar" style:country-complex="SA"/>
    </style:style>
    <style:style style:name="P119" style:family="paragraph" style:parent-style-name="Heading_20_3">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120" style:family="paragraph" style:parent-style-name="Standard">
      <style:paragraph-properties fo:margin-left="0cm" fo:margin-right="0cm" fo:text-indent="1.27cm" style:auto-text-indent="false"/>
      <style:text-properties style:use-window-font-color="true" loext:opacity="0%" fo:font-size="11pt" fo:language="fr" fo:country="FR" officeooo:paragraph-rsid="00e1a20a" style:letter-kerning="false" style:font-name-asian="Calibri" style:font-size-asian="11pt" style:language-asian="en" style:country-asian="US" style:font-name-complex="Arial" style:font-size-complex="11pt" style:language-complex="ar" style:country-complex="SA"/>
    </style:style>
    <style:style style:name="P121" style:family="paragraph" style:parent-style-name="Standard">
      <style:paragraph-properties fo:margin-left="0cm" fo:margin-right="0cm" fo:text-indent="1.27cm" style:auto-text-indent="false"/>
      <style:text-properties style:use-window-font-color="true" loext:opacity="0%" fo:font-size="11pt" fo:language="fr" fo:country="FR" officeooo:rsid="00e1a20a" officeooo:paragraph-rsid="00e1a20a" style:letter-kerning="false" style:font-name-asian="Calibri" style:font-size-asian="11pt" style:language-asian="en" style:country-asian="US" style:font-name-complex="Arial" style:font-size-complex="11pt" style:language-complex="ar" style:country-complex="SA"/>
    </style:style>
    <style:style style:name="P122" style:family="paragraph" style:parent-style-name="Standard">
      <style:paragraph-properties fo:margin-left="0cm" fo:margin-right="0cm" fo:text-indent="1.27cm" style:auto-text-indent="false"/>
      <style:text-properties style:use-window-font-color="true" loext:opacity="0%" fo:font-size="11pt" fo:language="fr" fo:country="FR" officeooo:paragraph-rsid="00f20680" style:letter-kerning="false" style:font-name-asian="Calibri" style:font-size-asian="11pt" style:language-asian="en" style:country-asian="US" style:font-name-complex="Arial" style:font-size-complex="11pt" style:language-complex="ar" style:country-complex="SA"/>
    </style:style>
    <style:style style:name="P123" style:family="paragraph" style:parent-style-name="Heading_20_2">
      <style:text-properties style:use-window-font-color="true" loext:opacity="0%" style:font-name="Alegreya Medium" fo:font-size="20pt" fo:language="fr" fo:country="FR" style:letter-kerning="false" style:font-name-asian="Calibri" style:font-size-asian="20pt" style:language-asian="en" style:country-asian="US" style:font-name-complex="Times New Roman1" style:font-size-complex="9pt" style:language-complex="ar" style:country-complex="SA"/>
    </style:style>
    <style:style style:name="P124" style:family="paragraph" style:parent-style-name="Heading_20_2">
      <style:text-properties style:use-window-font-color="true" loext:opacity="0%" style:font-name="Alegreya Medium" fo:font-size="20pt" fo:language="fr" fo:country="FR" officeooo:rsid="00afa515" officeooo:paragraph-rsid="00b012c2" style:letter-kerning="false" style:font-name-asian="Calibri" style:font-size-asian="20pt" style:language-asian="en" style:country-asian="US" style:font-name-complex="Times New Roman1" style:font-size-complex="9pt" style:language-complex="ar" style:country-complex="SA"/>
    </style:style>
    <style:style style:name="P125" style:family="paragraph" style:parent-style-name="Standard">
      <style:paragraph-properties fo:text-indent="1.27cm" style:auto-text-indent="false"/>
      <style:text-properties style:use-window-font-color="true" loext:opacity="0%" officeooo:rsid="00d5969a" officeooo:paragraph-rsid="00d5969a"/>
    </style:style>
    <style:style style:name="P126" style:family="paragraph" style:parent-style-name="Standard">
      <style:paragraph-properties fo:margin-left="0cm" fo:margin-right="0cm" fo:text-indent="1.27cm" style:auto-text-indent="false"/>
    </style:style>
    <style:style style:name="P127" style:family="paragraph" style:parent-style-name="Standard">
      <loext:graphic-properties draw:fill-gradient-name="gradient" draw:fill-hatch-name="hatch"/>
      <style:paragraph-properties fo:margin-left="0cm" fo:margin-right="0cm" fo:text-indent="1.27cm" style:auto-text-indent="false"/>
    </style:style>
    <style:style style:name="P128" style:family="paragraph" style:parent-style-name="Standard">
      <style:paragraph-properties fo:text-indent="1.27cm" style:auto-text-indent="false"/>
    </style:style>
    <style:style style:name="P129" style:family="paragraph" style:parent-style-name="Standard">
      <style:paragraph-properties fo:margin-left="0cm" fo:margin-right="0cm" fo:text-indent="1.27cm" style:auto-text-indent="false"/>
      <style:text-properties officeooo:rsid="0002341a" officeooo:paragraph-rsid="0002341a"/>
    </style:style>
    <style:style style:name="P130" style:family="paragraph" style:parent-style-name="Standard">
      <style:paragraph-properties fo:margin-left="0cm" fo:margin-right="0cm" fo:text-indent="1.27cm" style:auto-text-indent="false"/>
      <style:text-properties officeooo:rsid="000490dc" officeooo:paragraph-rsid="000490dc"/>
    </style:style>
    <style:style style:name="P131" style:family="paragraph" style:parent-style-name="Standard">
      <style:paragraph-properties fo:margin-left="0cm" fo:margin-right="0cm" fo:text-indent="1.27cm" style:auto-text-indent="false"/>
      <style:text-properties officeooo:rsid="00080519" officeooo:paragraph-rsid="00080519"/>
    </style:style>
    <style:style style:name="P132" style:family="paragraph" style:parent-style-name="Standard">
      <style:paragraph-properties fo:margin-left="0cm" fo:margin-right="0cm" fo:text-indent="1.27cm" style:auto-text-indent="false"/>
      <style:text-properties officeooo:rsid="000ad6ac" officeooo:paragraph-rsid="000ad6ac"/>
    </style:style>
    <style:style style:name="P133" style:family="paragraph" style:parent-style-name="Standard">
      <style:paragraph-properties fo:margin-left="0cm" fo:margin-right="0cm" fo:text-indent="1.27cm" style:auto-text-indent="false"/>
      <style:text-properties officeooo:rsid="000ad6ac" officeooo:paragraph-rsid="0058ba38"/>
    </style:style>
    <style:style style:name="P134" style:family="paragraph" style:parent-style-name="Standard">
      <style:paragraph-properties fo:text-align="center" style:justify-single-word="false"/>
      <style:text-properties fo:font-size="10pt" fo:language="fr" fo:country="FR" fo:font-style="italic" style:font-size-asian="10pt" style:font-style-asian="italic" style:font-size-complex="10pt" style:font-style-complex="italic"/>
    </style:style>
    <style:style style:name="P135" style:family="paragraph" style:parent-style-name="Standard">
      <style:paragraph-properties fo:line-height="120%" fo:text-align="center" style:justify-single-word="false"/>
      <style:text-properties fo:font-size="10pt" fo:language="fr" fo:country="FR" fo:font-style="italic" style:font-size-asian="10pt" style:font-style-asian="italic" style:font-size-complex="10pt" style:font-style-complex="italic"/>
    </style:style>
    <style:style style:name="P136" style:family="paragraph" style:parent-style-name="Standard">
      <style:paragraph-properties fo:text-align="center" style:justify-single-word="false"/>
      <style:text-properties fo:font-size="18pt" fo:letter-spacing="0.035cm" fo:language="fr" fo:country="FR" style:font-size-asian="18pt" style:font-size-complex="18pt"/>
    </style:style>
    <style:style style:name="P137" style:family="paragraph" style:parent-style-name="Standard">
      <style:paragraph-properties fo:margin-left="0cm" fo:margin-right="0cm" fo:text-indent="1.27cm" style:auto-text-indent="false"/>
      <style:text-properties fo:color="#000000" loext:opacity="10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138" style:family="paragraph" style:parent-style-name="Standard">
      <style:paragraph-properties fo:margin-left="0cm" fo:margin-right="0cm" fo:text-indent="1.27cm" style:auto-text-indent="false"/>
      <style:text-properties fo:color="#000000" loext:opacity="100%" officeooo:rsid="0048797f" officeooo:paragraph-rsid="0048797f"/>
    </style:style>
    <style:style style:name="P139" style:family="paragraph" style:parent-style-name="Heading_20_3">
      <style:text-properties fo:color="#000000" loext:opacity="100%" fo:language="fr" fo:country="FR" officeooo:paragraph-rsid="005ef854"/>
    </style:style>
    <style:style style:name="P140" style:family="paragraph" style:parent-style-name="Heading_20_4">
      <style:text-properties fo:color="#000000" loext:opacity="100%" fo:language="fr" fo:country="FR" officeooo:paragraph-rsid="005ef854"/>
    </style:style>
    <style:style style:name="P141" style:family="paragraph" style:parent-style-name="Standard">
      <style:paragraph-properties fo:margin-left="0cm" fo:margin-right="0cm" fo:text-indent="1.27cm" style:auto-text-indent="false"/>
      <style:text-properties fo:color="#000000" loext:opacity="100%" fo:language="fr" fo:country="FR" officeooo:paragraph-rsid="005ef854"/>
    </style:style>
    <style:style style:name="P142" style:family="paragraph" style:parent-style-name="Standard">
      <loext:graphic-properties draw:fill-hatch-name="hatch"/>
      <style:paragraph-properties fo:margin-left="0cm" fo:margin-right="0cm" fo:text-indent="1.27cm" style:auto-text-indent="false"/>
      <style:text-properties fo:color="#000000" loext:opacity="100%" fo:language="fr" fo:country="FR" officeooo:paragraph-rsid="006565d7"/>
    </style:style>
    <style:style style:name="P143" style:family="paragraph" style:parent-style-name="Standard">
      <loext:graphic-properties draw:fill-hatch-name="hatch"/>
      <style:paragraph-properties fo:margin-left="0cm" fo:margin-right="0cm" fo:text-indent="1.27cm" style:auto-text-indent="false"/>
      <style:text-properties fo:color="#000000" loext:opacity="100%" fo:language="fr" fo:country="FR" officeooo:paragraph-rsid="0066db9d"/>
    </style:style>
    <style:style style:name="P144" style:family="paragraph" style:parent-style-name="Standard">
      <style:paragraph-properties fo:margin-left="0cm" fo:margin-right="0cm" fo:text-indent="1.27cm" style:auto-text-indent="false"/>
      <style:text-properties fo:color="#000000" loext:opacity="100%" fo:language="fr" fo:country="FR" officeooo:rsid="006edf2d" officeooo:paragraph-rsid="006edf2d"/>
    </style:style>
    <style:style style:name="P145" style:family="paragraph" style:parent-style-name="Standard">
      <style:paragraph-properties fo:margin-left="0cm" fo:margin-right="0cm" fo:text-indent="1.27cm" style:auto-text-indent="false"/>
      <style:text-properties fo:color="#000000" loext:opacity="100%" fo:language="fr" fo:country="FR" officeooo:rsid="006f8642" officeooo:paragraph-rsid="006f8642"/>
    </style:style>
    <style:style style:name="P146" style:family="paragraph" style:parent-style-name="Standard">
      <style:paragraph-properties fo:margin-left="0cm" fo:margin-right="0cm" fo:text-indent="1.27cm" style:auto-text-indent="false"/>
      <style:text-properties fo:color="#000000" loext:opacity="100%" fo:language="fr" fo:country="FR" officeooo:rsid="006f8642" officeooo:paragraph-rsid="007161ad"/>
    </style:style>
    <style:style style:name="P147" style:family="paragraph" style:parent-style-name="Standard">
      <style:paragraph-properties fo:margin-left="0cm" fo:margin-right="0cm" fo:text-indent="1.27cm" style:auto-text-indent="false"/>
      <style:text-properties fo:color="#000000" loext:opacity="100%" fo:language="fr" fo:country="FR" officeooo:paragraph-rsid="006f8642"/>
    </style:style>
    <style:style style:name="P148" style:family="paragraph" style:parent-style-name="Standard">
      <style:paragraph-properties fo:margin-left="0cm" fo:margin-right="0cm" fo:text-indent="1.27cm" style:auto-text-indent="false"/>
      <style:text-properties fo:color="#000000" loext:opacity="100%" fo:language="fr" fo:country="FR" officeooo:rsid="0074e44d" officeooo:paragraph-rsid="0074e44d"/>
    </style:style>
    <style:style style:name="P149" style:family="paragraph" style:parent-style-name="Standard">
      <style:paragraph-properties fo:margin-left="0cm" fo:margin-right="0cm" fo:text-indent="1.27cm" style:auto-text-indent="false"/>
      <style:text-properties fo:color="#000000" loext:opacity="100%" style:font-name="Alegreya" fo:font-size="11pt" fo:language="fr" fo:country="FR" officeooo:rsid="007758ec" officeooo:paragraph-rsid="007758ec" style:letter-kerning="false" style:font-name-asian="Calibri" style:font-size-asian="11pt" style:language-asian="en" style:country-asian="US" style:font-name-complex="Arial" style:font-size-complex="11pt" style:language-complex="ar" style:country-complex="SA"/>
    </style:style>
    <style:style style:name="P150" style:family="paragraph" style:parent-style-name="Standard">
      <style:paragraph-properties fo:margin-left="0cm" fo:margin-right="0cm" fo:text-indent="1.27cm" style:auto-text-indent="false"/>
      <style:text-properties officeooo:rsid="00192693" officeooo:paragraph-rsid="00192693"/>
    </style:style>
    <style:style style:name="P151" style:family="paragraph" style:parent-style-name="Standard">
      <style:paragraph-properties fo:margin-left="0cm" fo:margin-right="0cm" fo:text-indent="1.27cm" style:auto-text-indent="false"/>
      <style:text-properties officeooo:rsid="00192693" officeooo:paragraph-rsid="00192c3e"/>
    </style:style>
    <style:style style:name="P152" style:family="paragraph" style:parent-style-name="Standard">
      <style:paragraph-properties fo:margin-left="0cm" fo:margin-right="0cm" fo:text-indent="1.27cm" style:auto-text-indent="false"/>
      <style:text-properties officeooo:rsid="00192c3e" officeooo:paragraph-rsid="00192c3e"/>
    </style:style>
    <style:style style:name="P153" style:family="paragraph" style:parent-style-name="Heading_20_3">
      <style:paragraph-properties fo:margin-left="0cm" fo:margin-right="0cm" fo:text-indent="1.27cm" style:auto-text-indent="false"/>
      <style:text-properties officeooo:rsid="00223317" officeooo:paragraph-rsid="00223317"/>
    </style:style>
    <style:style style:name="P154" style:family="paragraph" style:parent-style-name="Heading_20_3">
      <style:text-properties officeooo:rsid="00223317" officeooo:paragraph-rsid="00223317"/>
    </style:style>
    <style:style style:name="P155" style:family="paragraph" style:parent-style-name="Standard">
      <style:paragraph-properties fo:margin-left="0cm" fo:margin-right="0cm" fo:text-indent="1.27cm" style:auto-text-indent="false"/>
      <style:text-properties officeooo:rsid="00223317" officeooo:paragraph-rsid="00224317"/>
    </style:style>
    <style:style style:name="P156" style:family="paragraph" style:parent-style-name="Heading_20_3">
      <style:text-properties officeooo:rsid="0029750b" officeooo:paragraph-rsid="0029750b"/>
    </style:style>
    <style:style style:name="P157" style:family="paragraph" style:parent-style-name="Heading_20_3">
      <style:text-properties officeooo:paragraph-rsid="002ecf68"/>
    </style:style>
    <style:style style:name="P158" style:family="paragraph" style:parent-style-name="Standard">
      <style:paragraph-properties fo:margin-left="0cm" fo:margin-right="0cm" fo:text-indent="1.27cm" style:auto-text-indent="false"/>
      <style:text-properties officeooo:rsid="001ab5f5" officeooo:paragraph-rsid="001ab5f5"/>
    </style:style>
    <style:style style:name="P159" style:family="paragraph" style:parent-style-name="Standard">
      <style:paragraph-properties fo:margin-left="0cm" fo:margin-right="0cm" fo:text-indent="1.27cm" style:auto-text-indent="false"/>
      <style:text-properties officeooo:rsid="00224317" officeooo:paragraph-rsid="00224317"/>
    </style:style>
    <style:style style:name="P160" style:family="paragraph" style:parent-style-name="Standard">
      <style:paragraph-properties fo:margin-left="0cm" fo:margin-right="0cm" fo:text-indent="1.27cm" style:auto-text-indent="false"/>
      <style:text-properties officeooo:rsid="0025bc10" officeooo:paragraph-rsid="0025bc10"/>
    </style:style>
    <style:style style:name="P161" style:family="paragraph" style:parent-style-name="Standard">
      <style:paragraph-properties fo:margin-left="0cm" fo:margin-right="0cm" fo:text-indent="1.27cm" style:auto-text-indent="false"/>
      <style:text-properties officeooo:rsid="002673b8" officeooo:paragraph-rsid="002673b8"/>
    </style:style>
    <style:style style:name="P162" style:family="paragraph" style:parent-style-name="Standard">
      <style:paragraph-properties fo:margin-top="0cm" fo:margin-bottom="0.353cm" style:contextual-spacing="true" fo:text-align="center" style:justify-single-word="false"/>
      <style:text-properties fo:font-size="12pt" fo:language="fr" fo:country="FR" style:font-size-asian="12pt" style:font-size-complex="12pt"/>
    </style:style>
    <style:style style:name="P163" style:family="paragraph" style:parent-style-name="Standard">
      <style:paragraph-properties fo:margin-top="0cm" fo:margin-bottom="0.353cm" style:contextual-spacing="true" fo:text-align="center" style:justify-single-word="false"/>
      <style:text-properties fo:font-size="12pt" fo:language="fr" fo:country="FR" fo:font-style="italic" officeooo:rsid="002b00f9" style:font-size-asian="12pt" style:font-style-asian="italic" style:font-size-complex="12pt" style:font-style-complex="italic"/>
    </style:style>
    <style:style style:name="P164" style:family="paragraph" style:parent-style-name="Standard">
      <style:paragraph-properties fo:margin-top="0cm" fo:margin-bottom="0.494cm" style:contextual-spacing="false" fo:text-align="center" style:justify-single-word="false"/>
      <style:text-properties fo:font-size="21pt" fo:letter-spacing="0.071cm" fo:language="fr" fo:country="FR" fo:font-style="italic" style:font-size-asian="21pt" style:font-style-asian="italic" style:font-size-complex="21pt" style:font-style-complex="italic"/>
    </style:style>
    <style:style style:name="P165" style:family="paragraph" style:parent-style-name="Standard">
      <style:paragraph-properties fo:margin-left="0cm" fo:margin-right="0cm" fo:text-indent="1.27cm" style:auto-text-indent="false"/>
      <style:text-properties officeooo:rsid="0030f8db" officeooo:paragraph-rsid="0030f8db"/>
    </style:style>
    <style:style style:name="P166" style:family="paragraph" style:parent-style-name="Standard">
      <style:paragraph-properties fo:margin-left="0cm" fo:margin-right="0cm" fo:text-indent="1.27cm" style:auto-text-indent="false"/>
      <style:text-properties officeooo:rsid="0030f8db" officeooo:paragraph-rsid="00350af4"/>
    </style:style>
    <style:style style:name="P167" style:family="paragraph" style:parent-style-name="Standard">
      <style:paragraph-properties fo:margin-left="0cm" fo:margin-right="0cm" fo:text-indent="1.27cm" style:auto-text-indent="false"/>
      <style:text-properties officeooo:rsid="0033b41b" officeooo:paragraph-rsid="0033b41b"/>
    </style:style>
    <style:style style:name="P168" style:family="paragraph" style:parent-style-name="Standard">
      <style:paragraph-properties fo:margin-left="0cm" fo:margin-right="0cm" fo:text-indent="1.27cm" style:auto-text-indent="false"/>
      <style:text-properties officeooo:rsid="00350af4" officeooo:paragraph-rsid="00350af4"/>
    </style:style>
    <style:style style:name="P169" style:family="paragraph" style:parent-style-name="Standard">
      <style:paragraph-properties fo:margin-left="0cm" fo:margin-right="0cm" fo:text-indent="1.27cm" style:auto-text-indent="false"/>
      <style:text-properties officeooo:rsid="00360030" officeooo:paragraph-rsid="00360030"/>
    </style:style>
    <style:style style:name="P170" style:family="paragraph" style:parent-style-name="Standard">
      <style:paragraph-properties fo:margin-left="0cm" fo:margin-right="0cm" fo:text-indent="1.27cm" style:auto-text-indent="false"/>
      <style:text-properties officeooo:rsid="00386179" officeooo:paragraph-rsid="00386179"/>
    </style:style>
    <style:style style:name="P171" style:family="paragraph" style:parent-style-name="Standard">
      <style:paragraph-properties fo:margin-left="0cm" fo:margin-right="0cm" fo:text-indent="1.27cm" style:auto-text-indent="false"/>
      <style:text-properties officeooo:rsid="0038b55f" officeooo:paragraph-rsid="0038b55f"/>
    </style:style>
    <style:style style:name="P172" style:family="paragraph" style:parent-style-name="Standard">
      <style:paragraph-properties fo:margin-left="0cm" fo:margin-right="0cm" fo:text-indent="1.27cm" style:auto-text-indent="false"/>
      <style:text-properties officeooo:rsid="003927aa" officeooo:paragraph-rsid="003927aa"/>
    </style:style>
    <style:style style:name="P173" style:family="paragraph" style:parent-style-name="Standard">
      <style:paragraph-properties fo:margin-left="0cm" fo:margin-right="0cm" fo:text-indent="1.27cm" style:auto-text-indent="false"/>
      <style:text-properties officeooo:rsid="003aa8d3" officeooo:paragraph-rsid="003aa8d3"/>
    </style:style>
    <style:style style:name="P174" style:family="paragraph" style:parent-style-name="Standard">
      <style:paragraph-properties fo:margin-left="0cm" fo:margin-right="0cm" fo:text-indent="1.27cm" style:auto-text-indent="false"/>
      <style:text-properties officeooo:rsid="0028b7c1" officeooo:paragraph-rsid="0028b7c1"/>
    </style:style>
    <style:style style:name="P175" style:family="paragraph" style:parent-style-name="Standard">
      <style:paragraph-properties fo:margin-left="0cm" fo:margin-right="0cm" fo:text-indent="1.27cm" style:auto-text-indent="false"/>
      <style:text-properties officeooo:rsid="003f9e5d" officeooo:paragraph-rsid="003f9e5d"/>
    </style:style>
    <style:style style:name="P176" style:family="paragraph" style:parent-style-name="Heading_20_3">
      <style:text-properties fo:color="#c9211e" loext:opacity="100%" fo:language="fr" fo:country="FR" officeooo:paragraph-rsid="005ef854"/>
    </style:style>
    <style:style style:name="P177" style:family="paragraph" style:parent-style-name="Heading_20_4">
      <style:text-properties officeooo:rsid="005f895b" officeooo:paragraph-rsid="005f895b"/>
    </style:style>
    <style:style style:name="P178" style:family="paragraph" style:parent-style-name="Standard">
      <style:paragraph-properties fo:margin-left="0cm" fo:margin-right="0cm" fo:text-indent="1.27cm" style:auto-text-indent="false"/>
      <style:text-properties officeooo:paragraph-rsid="005ef854"/>
    </style:style>
    <style:style style:name="P179" style:family="paragraph" style:parent-style-name="Heading_20_3">
      <style:text-properties officeooo:rsid="007161ad" officeooo:paragraph-rsid="007161ad"/>
    </style:style>
    <style:style style:name="P180" style:family="paragraph" style:parent-style-name="Heading_20_3">
      <style:text-properties officeooo:rsid="00828956"/>
    </style:style>
    <style:style style:name="P181" style:family="paragraph" style:parent-style-name="Heading_20_3">
      <style:text-properties officeooo:paragraph-rsid="00830ad5"/>
    </style:style>
    <style:style style:name="P182" style:family="paragraph" style:parent-style-name="Standard">
      <style:paragraph-properties fo:margin-left="0cm" fo:margin-right="0cm" fo:text-indent="1.27cm" style:auto-text-indent="false"/>
      <style:text-properties officeooo:paragraph-rsid="007d143f"/>
    </style:style>
    <style:style style:name="P183" style:family="paragraph" style:parent-style-name="Standard">
      <style:paragraph-properties fo:margin-left="0cm" fo:margin-right="0cm" fo:text-indent="1.27cm" style:auto-text-indent="false"/>
      <style:text-properties officeooo:rsid="007f1edc" officeooo:paragraph-rsid="00830ad5"/>
    </style:style>
    <style:style style:name="P184" style:family="paragraph" style:parent-style-name="Standard">
      <style:paragraph-properties fo:margin-left="0cm" fo:margin-right="0cm" fo:text-indent="1.27cm" style:auto-text-indent="false"/>
      <style:text-properties officeooo:rsid="0080cbd5" officeooo:paragraph-rsid="00830ad5"/>
    </style:style>
    <style:style style:name="P185" style:family="paragraph" style:parent-style-name="Standard">
      <style:paragraph-properties fo:margin-left="0cm" fo:margin-right="0cm" fo:text-indent="1.27cm" style:auto-text-indent="false"/>
      <style:text-properties officeooo:paragraph-rsid="00ae5c21"/>
    </style:style>
    <style:style style:name="P186" style:family="paragraph" style:parent-style-name="Standard">
      <style:paragraph-properties fo:margin-left="0cm" fo:margin-right="0cm" fo:text-indent="1.27cm" style:auto-text-indent="false"/>
      <style:text-properties officeooo:rsid="00b012c2" officeooo:paragraph-rsid="00b012c2"/>
    </style:style>
    <style:style style:name="P187" style:family="paragraph" style:parent-style-name="Heading_20_3">
      <style:text-properties officeooo:paragraph-rsid="00b012c2"/>
    </style:style>
    <style:style style:name="P188" style:family="paragraph" style:parent-style-name="Footnote">
      <style:text-properties officeooo:paragraph-rsid="00bce2c1"/>
    </style:style>
    <style:style style:name="P189" style:family="paragraph" style:parent-style-name="Footnote">
      <style:text-properties officeooo:paragraph-rsid="00bfc0f7"/>
    </style:style>
    <style:style style:name="P190" style:family="paragraph" style:parent-style-name="Standard">
      <style:paragraph-properties fo:text-indent="1.27cm" style:auto-text-indent="false"/>
      <style:text-properties officeooo:paragraph-rsid="00b4a064"/>
    </style:style>
    <style:style style:name="P191" style:family="paragraph" style:parent-style-name="Standard">
      <style:paragraph-properties fo:text-indent="1.27cm" style:auto-text-indent="false"/>
      <style:text-properties fo:font-style="normal" officeooo:rsid="00c2c089" officeooo:paragraph-rsid="00c2c089" style:font-style-asian="normal" style:font-style-complex="normal"/>
    </style:style>
    <style:style style:name="P192" style:family="paragraph" style:parent-style-name="Standard">
      <style:paragraph-properties fo:text-indent="1.27cm" style:auto-text-indent="false"/>
      <style:text-properties officeooo:rsid="00c36735" officeooo:paragraph-rsid="00c71b5d"/>
    </style:style>
    <style:style style:name="P193" style:family="paragraph" style:parent-style-name="Standard">
      <style:paragraph-properties fo:text-indent="1.27cm" style:auto-text-indent="false"/>
      <style:text-properties officeooo:rsid="00c36735" officeooo:paragraph-rsid="00cbc1fb"/>
    </style:style>
    <style:style style:name="P194" style:family="paragraph" style:parent-style-name="Footnote">
      <style:text-properties officeooo:rsid="00cbc1fb" officeooo:paragraph-rsid="00cbc1fb"/>
    </style:style>
    <style:style style:name="P195" style:family="paragraph" style:parent-style-name="Standard">
      <style:paragraph-properties fo:text-indent="1.27cm" style:auto-text-indent="false"/>
      <style:text-properties officeooo:rsid="00cac3c9" officeooo:paragraph-rsid="00cac3c9"/>
    </style:style>
    <style:style style:name="P196" style:family="paragraph" style:parent-style-name="Standard">
      <style:paragraph-properties fo:text-indent="1.27cm" style:auto-text-indent="false"/>
      <style:text-properties officeooo:rsid="00c0f205" officeooo:paragraph-rsid="00c0f205"/>
    </style:style>
    <style:style style:name="P197" style:family="paragraph" style:parent-style-name="Contents_20_1">
      <style:paragraph-properties>
        <style:tab-stops>
          <style:tab-stop style:position="10.922cm" style:type="right" style:leader-style="dotted" style:leader-text="."/>
        </style:tab-stops>
      </style:paragraph-properties>
    </style:style>
    <style:style style:name="P198" style:family="paragraph" style:parent-style-name="Contents_20_2">
      <style:paragraph-properties>
        <style:tab-stops>
          <style:tab-stop style:position="10.922cm" style:type="right" style:leader-style="dotted" style:leader-text="."/>
        </style:tab-stops>
      </style:paragraph-properties>
    </style:style>
    <style:style style:name="P199" style:family="paragraph" style:parent-style-name="Contents_20_3">
      <style:paragraph-properties>
        <style:tab-stops>
          <style:tab-stop style:position="10.922cm" style:type="right" style:leader-style="dotted" style:leader-text="."/>
        </style:tab-stops>
      </style:paragraph-properties>
    </style:style>
    <style:style style:name="P200" style:family="paragraph" style:parent-style-name="Footnote">
      <style:text-properties officeooo:rsid="00d5969a" officeooo:paragraph-rsid="00d5969a"/>
    </style:style>
    <style:style style:name="P201" style:family="paragraph" style:parent-style-name="Standard">
      <style:paragraph-properties fo:text-indent="1.27cm" style:auto-text-indent="false"/>
      <style:text-properties officeooo:rsid="00d02ecc" officeooo:paragraph-rsid="00d138b2"/>
    </style:style>
    <style:style style:name="P202" style:family="paragraph" style:parent-style-name="Standard">
      <style:paragraph-properties fo:text-indent="1.27cm" style:auto-text-indent="false"/>
      <style:text-properties officeooo:rsid="00d138b2" officeooo:paragraph-rsid="00d138b2"/>
    </style:style>
    <style:style style:name="P203" style:family="paragraph" style:parent-style-name="Standard">
      <style:paragraph-properties fo:text-indent="1.27cm" style:auto-text-indent="false"/>
      <style:text-properties officeooo:rsid="00d4971d" officeooo:paragraph-rsid="00d5969a"/>
    </style:style>
    <style:style style:name="P204" style:family="paragraph" style:parent-style-name="Text_20_body">
      <style:paragraph-properties fo:margin-left="0cm" fo:margin-right="0cm" fo:text-indent="0cm" style:auto-text-indent="false"/>
    </style:style>
    <style:style style:name="P205" style:family="paragraph" style:parent-style-name="Text_20_body">
      <style:paragraph-properties fo:margin-left="0cm" fo:margin-right="0cm" fo:margin-top="0cm" fo:margin-bottom="0.212cm" style:contextual-spacing="false" fo:text-indent="0cm" style:auto-text-indent="false"/>
    </style:style>
    <style:style style:name="P206" style:family="paragraph" style:parent-style-name="Footnote">
      <style:paragraph-properties fo:margin-left="0cm" fo:margin-right="0cm" fo:text-indent="0cm" style:auto-text-indent="false"/>
    </style:style>
    <style:style style:name="P207" style:family="paragraph" style:parent-style-name="Footnote">
      <style:text-properties officeooo:rsid="00e0c629" officeooo:paragraph-rsid="00e0c629"/>
    </style:style>
    <style:style style:name="P208" style:family="paragraph" style:parent-style-name="Heading_20_2">
      <style:text-properties officeooo:rsid="00e0c629" officeooo:paragraph-rsid="00e0c629"/>
    </style:style>
    <style:style style:name="P209" style:family="paragraph" style:parent-style-name="Footnote">
      <style:text-properties officeooo:rsid="00e27598" officeooo:paragraph-rsid="00e27598"/>
    </style:style>
    <style:style style:name="P210" style:family="paragraph" style:parent-style-name="Heading_20_3">
      <style:text-properties officeooo:paragraph-rsid="00e1a20a"/>
    </style:style>
    <style:style style:name="P211" style:family="paragraph" style:parent-style-name="Standard">
      <style:paragraph-properties fo:margin-left="0cm" fo:margin-right="0cm" fo:text-indent="1.27cm" style:auto-text-indent="false"/>
      <style:text-properties officeooo:paragraph-rsid="00e1a20a"/>
    </style:style>
    <style:style style:name="P212" style:family="paragraph" style:parent-style-name="Chap_20_Number">
      <style:paragraph-properties fo:margin-top="0cm" fo:margin-bottom="0.035cm" style:contextual-spacing="true"/>
      <style:text-properties officeooo:paragraph-rsid="00e0c629"/>
    </style:style>
    <style:style style:name="P213" style:family="paragraph" style:parent-style-name="Footnote">
      <style:text-properties officeooo:rsid="00f20680" officeooo:paragraph-rsid="00f20680"/>
    </style:style>
    <style:style style:name="P214" style:family="paragraph" style:parent-style-name="Heading_20_3">
      <style:text-properties officeooo:paragraph-rsid="00f20680"/>
    </style:style>
    <style:style style:name="P215" style:family="paragraph" style:parent-style-name="Standard">
      <style:paragraph-properties fo:margin-left="0cm" fo:margin-right="0cm" fo:text-indent="1.27cm" style:auto-text-indent="false"/>
      <style:text-properties officeooo:paragraph-rsid="00f20680"/>
    </style:style>
    <style:style style:name="P216" style:family="paragraph" style:parent-style-name="Heading_20_2" style:master-page-name="Converted4">
      <style:paragraph-properties style:page-number="auto"/>
      <style:text-properties fo:language="fr" fo:country="FR"/>
    </style:style>
    <style:style style:name="P217" style:family="paragraph" style:parent-style-name="Title" style:master-page-name="First_20_Page">
      <style:paragraph-properties style:page-number="auto"/>
      <style:text-properties fo:language="fr" fo:country="FR"/>
    </style:style>
    <style:style style:name="P218" style:family="paragraph" style:parent-style-name="Chap_20_Number">
      <style:paragraph-properties fo:margin-top="0cm" fo:margin-bottom="0.035cm" style:contextual-spacing="true"/>
    </style:style>
    <style:style style:name="P219" style:family="paragraph" style:parent-style-name="Chap_20_Number">
      <style:paragraph-properties fo:margin-top="0cm" fo:margin-bottom="0.035cm" style:contextual-spacing="true"/>
      <style:text-properties officeooo:paragraph-rsid="00b012c2"/>
    </style:style>
    <style:style style:name="P220" style:family="paragraph" style:parent-style-name="Chap_20_Number">
      <style:paragraph-properties fo:margin-top="0cm" fo:margin-bottom="0.035cm" style:contextual-spacing="true"/>
      <style:text-properties officeooo:paragraph-rsid="00e0c629"/>
    </style:style>
    <style:style style:name="P221" style:family="paragraph" style:parent-style-name="Contents_20_Heading" style:master-page-name="Converted2">
      <style:paragraph-properties style:page-number="auto"/>
    </style:style>
    <style:style style:name="P222" style:family="paragraph" style:parent-style-name="Footer">
      <style:text-properties fo:language="fr" fo:country="FR"/>
    </style:style>
    <style:style style:name="P223" style:family="paragraph" style:parent-style-name="Footnote" style:list-style-name="WWNum14"/>
    <style:style style:name="P224" style:family="paragraph" style:parent-style-name="Header">
      <style:text-properties fo:language="fr" fo:country="FR"/>
    </style:style>
    <style:style style:name="P225" style:family="paragraph" style:parent-style-name="List_20_Paragraph" style:list-style-name="WWNum4">
      <style:text-properties fo:language="fr" fo:country="FR"/>
    </style:style>
    <style:style style:name="P226" style:family="paragraph" style:parent-style-name="List_20_Paragraph" style:list-style-name="WWNum3">
      <style:text-properties fo:language="fr" fo:country="FR"/>
    </style:style>
    <style:style style:name="P227" style:family="paragraph" style:parent-style-name="List_20_Paragraph" style:list-style-name="WWNum2">
      <style:paragraph-properties fo:line-height="115%"/>
      <style:text-properties fo:language="fr" fo:country="FR"/>
    </style:style>
    <style:style style:name="P228" style:family="paragraph" style:parent-style-name="List_20_Paragraph" style:list-style-name="WWNum3"/>
    <style:style style:name="P229" style:family="paragraph" style:parent-style-name="List_20_Paragraph" style:list-style-name="WWNum1">
      <style:text-properties fo:color="#000000" loext:opacity="100%" fo:language="fr" fo:country="FR" officeooo:paragraph-rsid="005ef854"/>
    </style:style>
    <style:style style:name="P230" style:family="paragraph" style:parent-style-name="Standard" style:master-page-name="Converted6">
      <style:paragraph-properties style:page-number="1"/>
      <style:text-properties fo:language="fr" fo:country="FR"/>
    </style:style>
    <style:style style:name="P231" style:family="paragraph" style:parent-style-name="Standard" style:master-page-name="Converted7">
      <style:paragraph-properties style:page-number="auto"/>
      <style:text-properties fo:language="fr" fo:country="FR"/>
    </style:style>
    <style:style style:name="P232" style:family="paragraph" style:parent-style-name="Standard" style:master-page-name="Converted8">
      <style:paragraph-properties style:page-number="auto"/>
      <style:text-properties fo:language="fr" fo:country="FR"/>
    </style:style>
    <style:style style:name="P233" style:family="paragraph" style:parent-style-name="Standard" style:list-style-name="WWNum5">
      <style:paragraph-properties fo:margin-top="0cm" fo:margin-bottom="0cm" style:contextual-spacing="false"/>
      <style:text-properties fo:language="fr" fo:country="FR"/>
    </style:style>
    <style:style style:name="P234" style:family="paragraph" style:parent-style-name="Standard" style:list-style-name="WWNum5">
      <style:text-properties fo:language="fr" fo:country="FR"/>
    </style:style>
    <style:style style:name="P235" style:family="paragraph" style:parent-style-name="Standard" style:list-style-name="WWNum6">
      <style:paragraph-properties fo:margin-top="0cm" fo:margin-bottom="0cm" style:contextual-spacing="false"/>
      <style:text-properties fo:language="fr" fo:country="FR"/>
    </style:style>
    <style:style style:name="P236" style:family="paragraph" style:parent-style-name="Standard" style:master-page-name="Converted9">
      <style:paragraph-properties style:page-number="auto"/>
      <style:text-properties fo:language="fr" fo:country="FR"/>
    </style:style>
    <style:style style:name="P237" style:family="paragraph" style:parent-style-name="Standard" style:list-style-name="WWNum8">
      <style:text-properties fo:language="fr" fo:country="FR"/>
    </style:style>
    <style:style style:name="P238" style:family="paragraph" style:parent-style-name="Standard" style:list-style-name="WWNum9">
      <style:paragraph-properties fo:margin-top="0cm" fo:margin-bottom="0cm" style:contextual-spacing="false"/>
      <style:text-properties fo:language="fr" fo:country="FR"/>
    </style:style>
    <style:style style:name="P239" style:family="paragraph" style:parent-style-name="Standard" style:list-style-name="WWNum10">
      <style:text-properties fo:language="fr" fo:country="FR" officeooo:paragraph-rsid="00ae5c21"/>
    </style:style>
    <style:style style:name="P240" style:family="paragraph" style:parent-style-name="Standard" style:master-page-name="Converted10">
      <style:paragraph-properties fo:margin-left="0cm" fo:margin-right="0cm" fo:text-indent="1.27cm" style:auto-text-indent="false" style:page-number="auto"/>
      <style:text-properties fo:language="fr" fo:country="FR" officeooo:paragraph-rsid="00e0c629"/>
    </style:style>
    <style:style style:name="P241" style:family="paragraph" style:parent-style-name="Standard" style:list-style-name="L9">
      <loext:graphic-properties draw:fill-hatch-name="hatch"/>
      <style:text-properties fo:language="fr" fo:country="FR" officeooo:rsid="00e4583f" officeooo:paragraph-rsid="00e4583f"/>
    </style:style>
    <style:style style:name="P242" style:family="paragraph" style:parent-style-name="Standard" style:master-page-name="Converted13">
      <style:paragraph-properties style:page-number="auto"/>
      <style:text-properties fo:language="fr" fo:country="FR"/>
    </style:style>
    <style:style style:name="P243" style:family="paragraph" style:parent-style-name="Standard" style:master-page-name="Converted14">
      <style:paragraph-properties style:page-number="auto"/>
      <style:text-properties fo:language="fr" fo:country="FR"/>
    </style:style>
    <style:style style:name="P244" style:family="paragraph" style:parent-style-name="Standard" style:list-style-name="WWNum6">
      <style:paragraph-properties fo:margin-top="0cm" fo:margin-bottom="0cm" style:contextual-spacing="false"/>
    </style:style>
    <style:style style:name="P245" style:family="paragraph" style:parent-style-name="Standard" style:list-style-name="WWNum7"/>
    <style:style style:name="P246" style:family="paragraph" style:parent-style-name="Standard" style:list-style-name="L1">
      <style:text-properties style:use-window-font-color="true" loext:opacity="0%" fo:font-size="11pt" fo:language="fr" fo:country="FR" officeooo:rsid="00b6cd38" officeooo:paragraph-rsid="00b6cd38" style:letter-kerning="false" style:font-name-asian="Calibri" style:font-size-asian="11pt" style:language-asian="en" style:country-asian="US" style:font-name-complex="Arial" style:font-size-complex="11pt" style:language-complex="ar" style:country-complex="SA"/>
    </style:style>
    <style:style style:name="P247" style:family="paragraph" style:parent-style-name="Standard" style:list-style-name="WWNum11">
      <style:paragraph-properties fo:margin-top="0cm" fo:margin-bottom="0cm" style:contextual-spacing="false"/>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248" style:family="paragraph" style:parent-style-name="Standard" style:list-style-name="WWNum11">
      <style:paragraph-properties fo:margin-top="0cm" fo:margin-bottom="0.275cm" style:contextual-spacing="false"/>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249" style:family="paragraph" style:parent-style-name="Standard" style:list-style-name="L2">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250" style:family="paragraph" style:parent-style-name="Standard" style:list-style-name="WWNum12">
      <style:paragraph-properties fo:margin-top="0cm" fo:margin-bottom="0cm" style:contextual-spacing="false"/>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251" style:family="paragraph" style:parent-style-name="Standard" style:list-style-name="WWNum12">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252" style:family="paragraph" style:parent-style-name="Standard" style:list-style-name="WWNum13">
      <style:paragraph-properties fo:margin-top="0cm" fo:margin-bottom="0cm" style:contextual-spacing="false"/>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253" style:family="paragraph" style:parent-style-name="Standard" style:list-style-name="WWNum13">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P254" style:family="paragraph" style:parent-style-name="Standard" style:list-style-name="L5">
      <style:text-properties style:use-window-font-color="true" loext:opacity="0%" style:font-name="Alegreya" fo:font-size="11pt" fo:language="fr" fo:country="FR" officeooo:rsid="00b012c2" officeooo:paragraph-rsid="00b012c2" style:letter-kerning="false" style:font-name-asian="Calibri" style:font-size-asian="11pt" style:language-asian="en" style:country-asian="US" style:font-name-complex="Arial" style:font-size-complex="11pt" style:language-complex="ar" style:country-complex="SA"/>
    </style:style>
    <style:style style:name="P255" style:family="paragraph" style:parent-style-name="Standard" style:list-style-name="L6">
      <style:text-properties style:use-window-font-color="true" loext:opacity="0%" style:font-name="Alegreya" fo:font-size="11pt" fo:language="fr" fo:country="FR" officeooo:rsid="00b39891" officeooo:paragraph-rsid="00b39891" style:letter-kerning="false" style:font-name-asian="Calibri" style:font-size-asian="11pt" style:language-asian="en" style:country-asian="US" style:font-name-complex="Arial" style:font-size-complex="11pt" style:language-complex="ar" style:country-complex="SA"/>
    </style:style>
    <style:style style:name="P256" style:family="paragraph" style:parent-style-name="Standard" style:list-style-name="L8">
      <style:text-properties style:use-window-font-color="true" loext:opacity="0%" style:font-name="Alegreya" fo:font-size="11pt" fo:language="fr" fo:country="FR" officeooo:rsid="00d6ea10" officeooo:paragraph-rsid="00d6ea10" style:letter-kerning="false" style:font-name-asian="Calibri" style:font-size-asian="11pt" style:language-asian="en" style:country-asian="US" style:font-name-complex="Arial" style:font-size-complex="11pt" style:language-complex="ar" style:country-complex="SA"/>
    </style:style>
    <style:style style:name="P257" style:family="paragraph" style:parent-style-name="Standard" style:list-style-name="L10">
      <style:text-properties style:use-window-font-color="true" loext:opacity="0%" style:font-name="Alegreya" fo:font-size="11pt" fo:language="fr" fo:country="FR" officeooo:rsid="004730c1" officeooo:paragraph-rsid="004730c1" style:letter-kerning="false" style:font-name-asian="Calibri" style:font-size-asian="11pt" style:language-asian="en" style:country-asian="US" style:font-name-complex="Arial" style:font-size-complex="11pt" style:language-complex="ar" style:country-complex="SA"/>
    </style:style>
    <style:style style:name="P258" style:family="paragraph" style:parent-style-name="Standard" style:list-style-name="L10">
      <style:text-properties style:use-window-font-color="true" loext:opacity="0%" style:font-name="Alegreya" fo:font-size="11pt" fo:language="fr" fo:country="FR" officeooo:rsid="004730c1" officeooo:paragraph-rsid="00593a46" style:letter-kerning="false" style:font-name-asian="Calibri" style:font-size-asian="11pt" style:language-asian="en" style:country-asian="US" style:font-name-complex="Arial" style:font-size-complex="11pt" style:language-complex="ar" style:country-complex="SA"/>
    </style:style>
    <style:style style:name="P259" style:family="paragraph" style:parent-style-name="Standard" style:list-style-name="L10">
      <style:text-properties style:use-window-font-color="true" loext:opacity="0%" style:font-name="Alegreya" fo:font-size="11pt" fo:language="fr" fo:country="FR" officeooo:rsid="00593a46" officeooo:paragraph-rsid="00593a46" style:letter-kerning="false" style:font-name-asian="Calibri" style:font-size-asian="11pt" style:language-asian="en" style:country-asian="US" style:font-name-complex="Arial" style:font-size-complex="11pt" style:language-complex="ar" style:country-complex="SA"/>
    </style:style>
    <style:style style:name="P260" style:family="paragraph" style:parent-style-name="Standard" style:list-style-name="L11">
      <style:text-properties style:use-window-font-color="true" loext:opacity="0%" style:font-name="Alegreya" fo:font-size="11pt" fo:language="fr" fo:country="FR" officeooo:rsid="0022c3af" officeooo:paragraph-rsid="0022c3af" style:letter-kerning="false" style:font-name-asian="Calibri" style:font-size-asian="11pt" style:language-asian="en" style:country-asian="US" style:font-name-complex="Arial" style:font-size-complex="11pt" style:language-complex="ar" style:country-complex="SA"/>
    </style:style>
    <style:style style:name="P261" style:family="paragraph" style:parent-style-name="Standard" style:list-style-name="L3">
      <style:text-properties officeooo:paragraph-rsid="0005071c"/>
    </style:style>
    <style:style style:name="P262" style:family="paragraph" style:parent-style-name="Standard" style:list-style-name="L3">
      <style:text-properties officeooo:rsid="0005071c" officeooo:paragraph-rsid="0005071c"/>
    </style:style>
    <style:style style:name="P263" style:family="paragraph" style:parent-style-name="Standard" style:list-style-name="L3">
      <style:text-properties officeooo:rsid="00080519" officeooo:paragraph-rsid="00080519"/>
    </style:style>
    <style:style style:name="P264" style:family="paragraph" style:parent-style-name="Standard" style:list-style-name="L7">
      <style:text-properties fo:font-style="normal" officeooo:rsid="00c2c089" officeooo:paragraph-rsid="00c2c089" style:font-style-asian="normal" style:font-style-complex="normal"/>
    </style:style>
    <style:style style:name="P265" style:family="paragraph" style:parent-style-name="Standard" style:list-style-name="L7">
      <style:text-properties fo:font-style="normal" officeooo:rsid="00c36735" officeooo:paragraph-rsid="00c36735" style:font-style-asian="normal" style:font-style-complex="normal"/>
    </style:style>
    <style:style style:name="P266" style:family="paragraph" style:parent-style-name="Text_20_body" style:list-style-name="L4">
      <style:paragraph-properties fo:margin-left="0cm" fo:margin-right="0cm" fo:text-indent="0cm" style:auto-text-indent="false"/>
    </style:style>
    <style:style style:name="P267" style:family="paragraph">
      <loext:graphic-properties draw:fill="solid" draw:fill-color="#000000"/>
      <style:paragraph-properties fo:text-align="start"/>
      <style:text-properties fo:color="#000000" loext:opacity="100%" fo:font-size="18pt"/>
    </style:style>
    <style:style style:name="T1" style:family="text">
      <style:text-properties fo:language="fr" fo:country="FR"/>
    </style:style>
    <style:style style:name="T2" style:family="text">
      <style:text-properties fo:language="fr" fo:country="FR" fo:font-style="italic" fo:font-weight="bold" style:font-style-asian="italic" style:font-weight-asian="bold"/>
    </style:style>
    <style:style style:name="T3" style:family="text">
      <style:text-properties fo:language="fr" fo:country="FR" fo:font-style="italic" fo:font-weight="bold" style:font-style-asian="italic" style:font-weight-asian="bold" style:font-style-complex="italic" style:font-weight-complex="bold"/>
    </style:style>
    <style:style style:name="T4" style:family="text">
      <style:text-properties fo:language="fr" fo:country="FR" fo:font-style="italic" style:font-style-asian="italic"/>
    </style:style>
    <style:style style:name="T5" style:family="text">
      <style:text-properties fo:language="fr" fo:country="FR" fo:font-style="italic" style:font-style-asian="italic" style:font-style-complex="italic"/>
    </style:style>
    <style:style style:name="T6" style:family="text">
      <style:text-properties fo:language="fr" fo:country="FR" fo:font-style="italic" style:font-style-asian="italic" style:font-style-complex="italic" style:font-weight-complex="bold"/>
    </style:style>
    <style:style style:name="T7" style:family="text">
      <style:text-properties fo:language="fr" fo:country="FR" style:font-weight-complex="bold"/>
    </style:style>
    <style:style style:name="T8" style:family="text">
      <style:text-properties fo:language="fr" fo:country="FR" officeooo:rsid="00159b65"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style:text-underline-style="solid" style:text-underline-width="auto" style:text-underline-color="font-color" fo:font-weight="bold" style:font-weight-asian="bold"/>
    </style:style>
    <style:style style:name="T11" style:family="text">
      <style:text-properties fo:language="fr" fo:country="FR" officeooo:rsid="0013f914"/>
    </style:style>
    <style:style style:name="T12" style:family="text">
      <style:text-properties fo:language="fr" fo:country="FR" officeooo:rsid="004f9475"/>
    </style:style>
    <style:style style:name="T13" style:family="text">
      <style:text-properties fo:language="fr" fo:country="FR" officeooo:rsid="0055165b"/>
    </style:style>
    <style:style style:name="T14" style:family="text">
      <style:text-properties fo:language="fr" fo:country="FR" officeooo:rsid="007a11b8"/>
    </style:style>
    <style:style style:name="T15" style:family="text">
      <style:text-properties fo:language="fr" fo:country="FR" officeooo:rsid="007d143f"/>
    </style:style>
    <style:style style:name="T16" style:family="text">
      <style:text-properties fo:language="fr" fo:country="FR" officeooo:rsid="00c2c089"/>
    </style:style>
    <style:style style:name="T17" style:family="text">
      <style:text-properties fo:language="fr" fo:country="FR" officeooo:rsid="00f62768"/>
    </style:style>
    <style:style style:name="T18" style:family="text">
      <style:text-properties style:use-window-font-color="true" loext:opacity="0%" fo:font-size="10pt" style:letter-kerning="false" style:font-name-asian="Calibri" style:font-size-asian="10pt" style:language-asian="en" style:country-asian="US" style:font-name-complex="Arial" style:font-size-complex="10pt" style:language-complex="ar" style:country-complex="SA"/>
    </style:style>
    <style:style style:name="T19" style:family="text">
      <style:text-properties style:use-window-font-color="true" loext:opacity="0%" style:font-name="Alegreya"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T20" style:family="text">
      <style:text-properties style:use-window-font-color="true" loext:opacity="0%" style:font-name="Alegreya" fo:font-size="11pt" fo:language="fr" fo:country="FR" officeooo:rsid="000490dc" style:letter-kerning="false" style:font-name-asian="Calibri" style:font-size-asian="11pt" style:language-asian="en" style:country-asian="US" style:font-name-complex="Arial" style:font-size-complex="11pt" style:language-complex="ar" style:country-complex="SA"/>
    </style:style>
    <style:style style:name="T21" style:family="text">
      <style:text-properties style:use-window-font-color="true" loext:opacity="0%" style:font-name="Alegreya" fo:font-size="11pt" fo:language="fr" fo:country="FR" officeooo:rsid="0005071c" style:letter-kerning="false" style:font-name-asian="Calibri" style:font-size-asian="11pt" style:language-asian="en" style:country-asian="US" style:font-name-complex="Arial" style:font-size-complex="11pt" style:language-complex="ar" style:country-complex="SA"/>
    </style:style>
    <style:style style:name="T22" style:family="text">
      <style:text-properties style:use-window-font-color="true" loext:opacity="0%" style:font-name="Alegreya" fo:font-size="11pt" fo:language="fr" fo:country="FR" officeooo:rsid="00064b58" style:letter-kerning="false" style:font-name-asian="Calibri" style:font-size-asian="11pt" style:language-asian="en" style:country-asian="US" style:font-name-complex="Arial" style:font-size-complex="11pt" style:language-complex="ar" style:country-complex="SA"/>
    </style:style>
    <style:style style:name="T23" style:family="text">
      <style:text-properties style:use-window-font-color="true" loext:opacity="0%" style:font-name="Alegreya" fo:font-size="11pt" fo:language="fr" fo:country="FR" officeooo:rsid="00080519" style:letter-kerning="false" style:font-name-asian="Calibri" style:font-size-asian="11pt" style:language-asian="en" style:country-asian="US" style:font-name-complex="Arial" style:font-size-complex="11pt" style:language-complex="ar" style:country-complex="SA"/>
    </style:style>
    <style:style style:name="T24" style:family="text">
      <style:text-properties style:use-window-font-color="true" loext:opacity="0%" style:font-name="Alegreya" fo:font-size="11pt" fo:language="fr" fo:country="FR" officeooo:rsid="0009c383" style:letter-kerning="false" style:font-name-asian="Calibri" style:font-size-asian="11pt" style:language-asian="en" style:country-asian="US" style:font-name-complex="Arial" style:font-size-complex="11pt" style:language-complex="ar" style:country-complex="SA"/>
    </style:style>
    <style:style style:name="T25" style:family="text">
      <style:text-properties style:use-window-font-color="true" loext:opacity="0%" style:font-name="Alegreya" fo:font-size="11pt" fo:language="fr" fo:country="FR" officeooo:rsid="000ad6ac" style:letter-kerning="false" style:font-name-asian="Calibri" style:font-size-asian="11pt" style:language-asian="en" style:country-asian="US" style:font-name-complex="Arial" style:font-size-complex="11pt" style:language-complex="ar" style:country-complex="SA"/>
    </style:style>
    <style:style style:name="T26" style:family="text">
      <style:text-properties style:use-window-font-color="true" loext:opacity="0%" style:font-name="Alegreya" fo:font-size="11pt" fo:language="fr" fo:country="FR" officeooo:rsid="000b42c6" style:letter-kerning="false" style:font-name-asian="Calibri" style:font-size-asian="11pt" style:language-asian="en" style:country-asian="US" style:font-name-complex="Arial" style:font-size-complex="11pt" style:language-complex="ar" style:country-complex="SA"/>
    </style:style>
    <style:style style:name="T27" style:family="text">
      <style:text-properties style:use-window-font-color="true" loext:opacity="0%" style:font-name="Alegreya" fo:font-size="11pt" fo:language="fr" fo:country="FR" officeooo:rsid="0013f914" style:letter-kerning="false" style:font-name-asian="Calibri" style:font-size-asian="11pt" style:language-asian="en" style:country-asian="US" style:font-name-complex="Arial" style:font-size-complex="11pt" style:language-complex="ar" style:country-complex="SA"/>
    </style:style>
    <style:style style:name="T28" style:family="text">
      <style:text-properties style:use-window-font-color="true" loext:opacity="0%" style:font-name="Alegreya" fo:font-size="11pt" fo:language="fr" fo:country="FR" officeooo:rsid="00192693" style:letter-kerning="false" style:font-name-asian="Calibri" style:font-size-asian="11pt" style:language-asian="en" style:country-asian="US" style:font-name-complex="Arial" style:font-size-complex="11pt" style:language-complex="ar" style:country-complex="SA"/>
    </style:style>
    <style:style style:name="T29" style:family="text">
      <style:text-properties style:use-window-font-color="true" loext:opacity="0%" style:font-name="Alegreya" fo:font-size="11pt" fo:language="fr" fo:country="FR" officeooo:rsid="00192c3e" style:letter-kerning="false" style:font-name-asian="Calibri" style:font-size-asian="11pt" style:language-asian="en" style:country-asian="US" style:font-name-complex="Arial" style:font-size-complex="11pt" style:language-complex="ar" style:country-complex="SA"/>
    </style:style>
    <style:style style:name="T30" style:family="text">
      <style:text-properties style:use-window-font-color="true" loext:opacity="0%" style:font-name="Alegreya" fo:font-size="11pt" fo:language="fr" fo:country="FR" officeooo:rsid="001ab5f5" style:letter-kerning="false" style:font-name-asian="Calibri" style:font-size-asian="11pt" style:language-asian="en" style:country-asian="US" style:font-name-complex="Arial" style:font-size-complex="11pt" style:language-complex="ar" style:country-complex="SA"/>
    </style:style>
    <style:style style:name="T31" style:family="text">
      <style:text-properties style:use-window-font-color="true" loext:opacity="0%" style:font-name="Alegreya" fo:font-size="11pt" fo:language="fr" fo:country="FR" officeooo:rsid="0020819f" style:letter-kerning="false" style:font-name-asian="Calibri" style:font-size-asian="11pt" style:language-asian="en" style:country-asian="US" style:font-name-complex="Arial" style:font-size-complex="11pt" style:language-complex="ar" style:country-complex="SA"/>
    </style:style>
    <style:style style:name="T32" style:family="text">
      <style:text-properties style:use-window-font-color="true" loext:opacity="0%" style:font-name="Alegreya" fo:font-size="11pt" fo:language="fr" fo:country="FR" officeooo:rsid="00224317" style:letter-kerning="false" style:font-name-asian="Calibri" style:font-size-asian="11pt" style:language-asian="en" style:country-asian="US" style:font-name-complex="Arial" style:font-size-complex="11pt" style:language-complex="ar" style:country-complex="SA"/>
    </style:style>
    <style:style style:name="T33" style:family="text">
      <style:text-properties style:use-window-font-color="true" loext:opacity="0%" style:font-name="Alegreya" fo:font-size="11pt" fo:language="fr" fo:country="FR" officeooo:rsid="0022c3af" style:letter-kerning="false" style:font-name-asian="Calibri" style:font-size-asian="11pt" style:language-asian="en" style:country-asian="US" style:font-name-complex="Arial" style:font-size-complex="11pt" style:language-complex="ar" style:country-complex="SA"/>
    </style:style>
    <style:style style:name="T34" style:family="text">
      <style:text-properties style:use-window-font-color="true" loext:opacity="0%" style:font-name="Alegreya" fo:font-size="11pt" fo:language="fr" fo:country="FR" officeooo:rsid="00243188" style:letter-kerning="false" style:font-name-asian="Calibri" style:font-size-asian="11pt" style:language-asian="en" style:country-asian="US" style:font-name-complex="Arial" style:font-size-complex="11pt" style:language-complex="ar" style:country-complex="SA"/>
    </style:style>
    <style:style style:name="T35" style:family="text">
      <style:text-properties style:use-window-font-color="true" loext:opacity="0%" style:font-name="Alegreya" fo:font-size="11pt" fo:language="fr" fo:country="FR" officeooo:rsid="00262b31" style:letter-kerning="false" style:font-name-asian="Calibri" style:font-size-asian="11pt" style:language-asian="en" style:country-asian="US" style:font-name-complex="Arial" style:font-size-complex="11pt" style:language-complex="ar" style:country-complex="SA"/>
    </style:style>
    <style:style style:name="T36" style:family="text">
      <style:text-properties style:use-window-font-color="true" loext:opacity="0%" style:font-name="Alegreya" fo:font-size="11pt" fo:language="fr" fo:country="FR" officeooo:rsid="002673b8" style:letter-kerning="false" style:font-name-asian="Calibri" style:font-size-asian="11pt" style:language-asian="en" style:country-asian="US" style:font-name-complex="Arial" style:font-size-complex="11pt" style:language-complex="ar" style:country-complex="SA"/>
    </style:style>
    <style:style style:name="T37" style:family="text">
      <style:text-properties style:use-window-font-color="true" loext:opacity="0%" style:font-name="Alegreya" fo:font-size="11pt" fo:language="fr" fo:country="FR" officeooo:rsid="00284c69" style:letter-kerning="false" style:font-name-asian="Calibri" style:font-size-asian="11pt" style:language-asian="en" style:country-asian="US" style:font-name-complex="Arial" style:font-size-complex="11pt" style:language-complex="ar" style:country-complex="SA"/>
    </style:style>
    <style:style style:name="T38" style:family="text">
      <style:text-properties style:use-window-font-color="true" loext:opacity="0%" style:font-name="Alegreya" fo:font-size="11pt" fo:language="fr" fo:country="FR" officeooo:rsid="0028b7c1" style:letter-kerning="false" style:font-name-asian="Calibri" style:font-size-asian="11pt" style:language-asian="en" style:country-asian="US" style:font-name-complex="Arial" style:font-size-complex="11pt" style:language-complex="ar" style:country-complex="SA"/>
    </style:style>
    <style:style style:name="T39" style:family="text">
      <style:text-properties style:use-window-font-color="true" loext:opacity="0%" style:font-name="Alegreya" fo:font-size="11pt" fo:language="fr" fo:country="FR" officeooo:rsid="0029750b" style:letter-kerning="false" style:font-name-asian="Calibri" style:font-size-asian="11pt" style:language-asian="en" style:country-asian="US" style:font-name-complex="Arial" style:font-size-complex="11pt" style:language-complex="ar" style:country-complex="SA"/>
    </style:style>
    <style:style style:name="T40" style:family="text">
      <style:text-properties style:use-window-font-color="true" loext:opacity="0%" style:font-name="Alegreya" fo:font-size="11pt" fo:language="fr" fo:country="FR" officeooo:rsid="002d7584" style:letter-kerning="false" style:font-name-asian="Calibri" style:font-size-asian="11pt" style:language-asian="en" style:country-asian="US" style:font-name-complex="Arial" style:font-size-complex="11pt" style:language-complex="ar" style:country-complex="SA"/>
    </style:style>
    <style:style style:name="T41" style:family="text">
      <style:text-properties style:use-window-font-color="true" loext:opacity="0%" style:font-name="Alegreya" fo:font-size="11pt" fo:language="fr" fo:country="FR" officeooo:rsid="002e5a33" style:letter-kerning="false" style:font-name-asian="Calibri" style:font-size-asian="11pt" style:language-asian="en" style:country-asian="US" style:font-name-complex="Arial" style:font-size-complex="11pt" style:language-complex="ar" style:country-complex="SA"/>
    </style:style>
    <style:style style:name="T42" style:family="text">
      <style:text-properties style:use-window-font-color="true" loext:opacity="0%" style:font-name="Alegreya" fo:font-size="11pt" fo:language="fr" fo:country="FR" officeooo:rsid="002ecf68" style:letter-kerning="false" style:font-name-asian="Calibri" style:font-size-asian="11pt" style:language-asian="en" style:country-asian="US" style:font-name-complex="Arial" style:font-size-complex="11pt" style:language-complex="ar" style:country-complex="SA"/>
    </style:style>
    <style:style style:name="T43" style:family="text">
      <style:text-properties style:use-window-font-color="true" loext:opacity="0%" style:font-name="Alegreya" fo:font-size="11pt" fo:language="fr" fo:country="FR" officeooo:rsid="002f695a" style:letter-kerning="false" style:font-name-asian="Calibri" style:font-size-asian="11pt" style:language-asian="en" style:country-asian="US" style:font-name-complex="Arial" style:font-size-complex="11pt" style:language-complex="ar" style:country-complex="SA"/>
    </style:style>
    <style:style style:name="T44" style:family="text">
      <style:text-properties style:use-window-font-color="true" loext:opacity="0%" style:font-name="Alegreya" fo:font-size="11pt" fo:language="fr" fo:country="FR" officeooo:rsid="002fefb2" style:letter-kerning="false" style:font-name-asian="Calibri" style:font-size-asian="11pt" style:language-asian="en" style:country-asian="US" style:font-name-complex="Arial" style:font-size-complex="11pt" style:language-complex="ar" style:country-complex="SA"/>
    </style:style>
    <style:style style:name="T45" style:family="text">
      <style:text-properties style:use-window-font-color="true" loext:opacity="0%" style:font-name="Alegreya" fo:font-size="11pt" fo:language="fr" fo:country="FR" officeooo:rsid="00328a57" style:letter-kerning="false" style:font-name-asian="Calibri" style:font-size-asian="11pt" style:language-asian="en" style:country-asian="US" style:font-name-complex="Arial" style:font-size-complex="11pt" style:language-complex="ar" style:country-complex="SA"/>
    </style:style>
    <style:style style:name="T46" style:family="text">
      <style:text-properties style:use-window-font-color="true" loext:opacity="0%" style:font-name="Alegreya" fo:font-size="11pt" fo:language="fr" fo:country="FR" officeooo:rsid="00328a65" style:letter-kerning="false" style:font-name-asian="Calibri" style:font-size-asian="11pt" style:language-asian="en" style:country-asian="US" style:font-name-complex="Arial" style:font-size-complex="11pt" style:language-complex="ar" style:country-complex="SA"/>
    </style:style>
    <style:style style:name="T47" style:family="text">
      <style:text-properties style:use-window-font-color="true" loext:opacity="0%" style:font-name="Alegreya" fo:font-size="11pt" fo:language="fr" fo:country="FR" officeooo:rsid="00350af4" style:letter-kerning="false" style:font-name-asian="Calibri" style:font-size-asian="11pt" style:language-asian="en" style:country-asian="US" style:font-name-complex="Arial" style:font-size-complex="11pt" style:language-complex="ar" style:country-complex="SA"/>
    </style:style>
    <style:style style:name="T48" style:family="text">
      <style:text-properties style:use-window-font-color="true" loext:opacity="0%" style:font-name="Alegreya" fo:font-size="11pt" fo:language="fr" fo:country="FR" officeooo:rsid="00360030" style:letter-kerning="false" style:font-name-asian="Calibri" style:font-size-asian="11pt" style:language-asian="en" style:country-asian="US" style:font-name-complex="Arial" style:font-size-complex="11pt" style:language-complex="ar" style:country-complex="SA"/>
    </style:style>
    <style:style style:name="T49" style:family="text">
      <style:text-properties style:use-window-font-color="true" loext:opacity="0%" style:font-name="Alegreya" fo:font-size="11pt" fo:language="fr" fo:country="FR" officeooo:rsid="00386179" style:letter-kerning="false" style:font-name-asian="Calibri" style:font-size-asian="11pt" style:language-asian="en" style:country-asian="US" style:font-name-complex="Arial" style:font-size-complex="11pt" style:language-complex="ar" style:country-complex="SA"/>
    </style:style>
    <style:style style:name="T50" style:family="text">
      <style:text-properties style:use-window-font-color="true" loext:opacity="0%" style:font-name="Alegreya" fo:font-size="11pt" fo:language="fr" fo:country="FR" officeooo:rsid="0038b55f" style:letter-kerning="false" style:font-name-asian="Calibri" style:font-size-asian="11pt" style:language-asian="en" style:country-asian="US" style:font-name-complex="Arial" style:font-size-complex="11pt" style:language-complex="ar" style:country-complex="SA"/>
    </style:style>
    <style:style style:name="T51" style:family="text">
      <style:text-properties style:use-window-font-color="true" loext:opacity="0%" style:font-name="Alegreya" fo:font-size="11pt" fo:language="fr" fo:country="FR" officeooo:rsid="003927aa" style:letter-kerning="false" style:font-name-asian="Calibri" style:font-size-asian="11pt" style:language-asian="en" style:country-asian="US" style:font-name-complex="Arial" style:font-size-complex="11pt" style:language-complex="ar" style:country-complex="SA"/>
    </style:style>
    <style:style style:name="T52" style:family="text">
      <style:text-properties style:use-window-font-color="true" loext:opacity="0%" style:font-name="Alegreya" fo:font-size="11pt" fo:language="fr" fo:country="FR" officeooo:rsid="00393a5f" style:letter-kerning="false" style:font-name-asian="Calibri" style:font-size-asian="11pt" style:language-asian="en" style:country-asian="US" style:font-name-complex="Arial" style:font-size-complex="11pt" style:language-complex="ar" style:country-complex="SA"/>
    </style:style>
    <style:style style:name="T53" style:family="text">
      <style:text-properties style:use-window-font-color="true" loext:opacity="0%" style:font-name="Alegreya" fo:font-size="11pt" fo:language="fr" fo:country="FR" officeooo:rsid="003978ad" style:letter-kerning="false" style:font-name-asian="Calibri" style:font-size-asian="11pt" style:language-asian="en" style:country-asian="US" style:font-name-complex="Arial" style:font-size-complex="11pt" style:language-complex="ar" style:country-complex="SA"/>
    </style:style>
    <style:style style:name="T54" style:family="text">
      <style:text-properties style:use-window-font-color="true" loext:opacity="0%" style:font-name="Alegreya" fo:font-size="11pt" fo:language="fr" fo:country="FR" officeooo:rsid="003aa8d3" style:letter-kerning="false" style:font-name-asian="Calibri" style:font-size-asian="11pt" style:language-asian="en" style:country-asian="US" style:font-name-complex="Arial" style:font-size-complex="11pt" style:language-complex="ar" style:country-complex="SA"/>
    </style:style>
    <style:style style:name="T55" style:family="text">
      <style:text-properties style:use-window-font-color="true" loext:opacity="0%" style:font-name="Alegreya" fo:font-size="11pt" fo:language="fr" fo:country="FR" officeooo:rsid="003c3f3b" style:letter-kerning="false" style:font-name-asian="Calibri" style:font-size-asian="11pt" style:language-asian="en" style:country-asian="US" style:font-name-complex="Arial" style:font-size-complex="11pt" style:language-complex="ar" style:country-complex="SA"/>
    </style:style>
    <style:style style:name="T56" style:family="text">
      <style:text-properties style:use-window-font-color="true" loext:opacity="0%" style:font-name="Alegreya" fo:font-size="11pt" fo:language="fr" fo:country="FR" officeooo:rsid="00407de8" style:letter-kerning="false" style:font-name-asian="Calibri" style:font-size-asian="11pt" style:language-asian="en" style:country-asian="US" style:font-name-complex="Arial" style:font-size-complex="11pt" style:language-complex="ar" style:country-complex="SA"/>
    </style:style>
    <style:style style:name="T57" style:family="text">
      <style:text-properties style:use-window-font-color="true" loext:opacity="0%" style:font-name="Alegreya" fo:font-size="11pt" fo:language="fr" fo:country="FR" officeooo:rsid="0051114d" style:letter-kerning="false" style:font-name-asian="Calibri" style:font-size-asian="11pt" style:language-asian="en" style:country-asian="US" style:font-name-complex="Arial" style:font-size-complex="11pt" style:language-complex="ar" style:country-complex="SA"/>
    </style:style>
    <style:style style:name="T58" style:family="text">
      <style:text-properties style:use-window-font-color="true" loext:opacity="0%" style:font-name="Alegreya" fo:font-size="11pt" fo:language="fr" fo:country="FR" officeooo:rsid="0058ba38" style:letter-kerning="false" style:font-name-asian="Calibri" style:font-size-asian="11pt" style:language-asian="en" style:country-asian="US" style:font-name-complex="Arial" style:font-size-complex="11pt" style:language-complex="ar" style:country-complex="SA"/>
    </style:style>
    <style:style style:name="T59" style:family="text">
      <style:text-properties style:use-window-font-color="true" loext:opacity="0%" style:font-name="Alegreya" fo:font-size="11pt" fo:language="fr" fo:country="FR" officeooo:rsid="005a7f59" style:letter-kerning="false" style:font-name-asian="Calibri" style:font-size-asian="11pt" style:language-asian="en" style:country-asian="US" style:font-name-complex="Arial" style:font-size-complex="11pt" style:language-complex="ar" style:country-complex="SA"/>
    </style:style>
    <style:style style:name="T60" style:family="text">
      <style:text-properties style:use-window-font-color="true" loext:opacity="0%" style:font-name="Alegreya" fo:font-size="11pt" fo:language="fr" fo:country="FR" officeooo:rsid="005a8420" style:letter-kerning="false" style:font-name-asian="Calibri" style:font-size-asian="11pt" style:language-asian="en" style:country-asian="US" style:font-name-complex="Arial" style:font-size-complex="11pt" style:language-complex="ar" style:country-complex="SA"/>
    </style:style>
    <style:style style:name="T61" style:family="text">
      <style:text-properties style:use-window-font-color="true" loext:opacity="0%" style:font-name="Alegreya" fo:font-size="11pt" fo:language="fr" fo:country="FR" officeooo:rsid="007d143f" style:letter-kerning="false" style:font-name-asian="Calibri" style:font-size-asian="11pt" style:language-asian="en" style:country-asian="US" style:font-name-complex="Arial" style:font-size-complex="11pt" style:language-complex="ar" style:country-complex="SA"/>
    </style:style>
    <style:style style:name="T62" style:family="text">
      <style:text-properties style:use-window-font-color="true" loext:opacity="0%" style:font-name="Alegreya" fo:font-size="11pt" fo:language="fr" fo:country="FR" officeooo:rsid="0080cbd5" style:letter-kerning="false" style:font-name-asian="Calibri" style:font-size-asian="11pt" style:language-asian="en" style:country-asian="US" style:font-name-complex="Arial" style:font-size-complex="11pt" style:language-complex="ar" style:country-complex="SA"/>
    </style:style>
    <style:style style:name="T63" style:family="text">
      <style:text-properties style:use-window-font-color="true" loext:opacity="0%" style:font-name="Alegreya" fo:font-size="11pt" fo:language="fr" fo:country="FR" officeooo:rsid="00828956" style:letter-kerning="false" style:font-name-asian="Calibri" style:font-size-asian="11pt" style:language-asian="en" style:country-asian="US" style:font-name-complex="Arial" style:font-size-complex="11pt" style:language-complex="ar" style:country-complex="SA"/>
    </style:style>
    <style:style style:name="T64" style:family="text">
      <style:text-properties style:use-window-font-color="true" loext:opacity="0%" style:font-name="Alegreya" fo:font-size="11pt" fo:language="fr" fo:country="FR" officeooo:rsid="0082a3a2" style:letter-kerning="false" style:font-name-asian="Calibri" style:font-size-asian="11pt" style:language-asian="en" style:country-asian="US" style:font-name-complex="Arial" style:font-size-complex="11pt" style:language-complex="ar" style:country-complex="SA"/>
    </style:style>
    <style:style style:name="T65" style:family="text">
      <style:text-properties style:use-window-font-color="true" loext:opacity="0%" style:font-name="Alegreya" fo:font-size="11pt" fo:language="fr" fo:country="FR" officeooo:rsid="00a8c31b" style:letter-kerning="false" style:font-name-asian="Calibri" style:font-size-asian="11pt" style:language-asian="en" style:country-asian="US" style:font-name-complex="Arial" style:font-size-complex="11pt" style:language-complex="ar" style:country-complex="SA"/>
    </style:style>
    <style:style style:name="T66" style:family="text">
      <style:text-properties style:use-window-font-color="true" loext:opacity="0%" style:font-name="Alegreya" fo:font-size="11pt" fo:language="fr" fo:country="FR" officeooo:rsid="00b4a064" style:letter-kerning="false" style:font-name-asian="Calibri" style:font-size-asian="11pt" style:language-asian="en" style:country-asian="US" style:font-name-complex="Arial" style:font-size-complex="11pt" style:language-complex="ar" style:country-complex="SA"/>
    </style:style>
    <style:style style:name="T67" style:family="text">
      <style:text-properties style:use-window-font-color="true" loext:opacity="0%" style:font-name="Alegreya" fo:font-size="11pt" fo:language="fr" fo:country="FR" officeooo:rsid="00b69b32" style:letter-kerning="false" style:font-name-asian="Calibri" style:font-size-asian="11pt" style:language-asian="en" style:country-asian="US" style:font-name-complex="Arial" style:font-size-complex="11pt" style:language-complex="ar" style:country-complex="SA"/>
    </style:style>
    <style:style style:name="T68" style:family="text">
      <style:text-properties style:use-window-font-color="true" loext:opacity="0%" style:font-name="Alegreya" fo:font-size="11pt" fo:language="fr" fo:country="FR" officeooo:rsid="00c2c089" style:letter-kerning="false" style:font-name-asian="Calibri" style:font-size-asian="11pt" style:language-asian="en" style:country-asian="US" style:font-name-complex="Arial" style:font-size-complex="11pt" style:language-complex="ar" style:country-complex="SA"/>
    </style:style>
    <style:style style:name="T69" style:family="text">
      <style:text-properties style:use-window-font-color="true" loext:opacity="0%" style:font-name="Alegreya" fo:font-size="11pt" fo:language="fr" fo:country="FR" officeooo:rsid="00c36735" style:letter-kerning="false" style:font-name-asian="Calibri" style:font-size-asian="11pt" style:language-asian="en" style:country-asian="US" style:font-name-complex="Arial" style:font-size-complex="11pt" style:language-complex="ar" style:country-complex="SA"/>
    </style:style>
    <style:style style:name="T70" style:family="text">
      <style:text-properties style:use-window-font-color="true" loext:opacity="0%" style:font-name="Alegreya" fo:font-size="11pt" fo:language="fr" fo:country="FR" officeooo:rsid="00c49fe1" style:letter-kerning="false" style:font-name-asian="Calibri" style:font-size-asian="11pt" style:language-asian="en" style:country-asian="US" style:font-name-complex="Arial" style:font-size-complex="11pt" style:language-complex="ar" style:country-complex="SA"/>
    </style:style>
    <style:style style:name="T71" style:family="text">
      <style:text-properties style:use-window-font-color="true" loext:opacity="0%" style:font-name="Alegreya" fo:font-size="11pt" fo:language="fr" fo:country="FR" officeooo:rsid="00c4b19b" style:letter-kerning="false" style:font-name-asian="Calibri" style:font-size-asian="11pt" style:language-asian="en" style:country-asian="US" style:font-name-complex="Arial" style:font-size-complex="11pt" style:language-complex="ar" style:country-complex="SA"/>
    </style:style>
    <style:style style:name="T72" style:family="text">
      <style:text-properties style:use-window-font-color="true" loext:opacity="0%" style:font-name="Alegreya" fo:font-size="11pt" fo:language="fr" fo:country="FR" officeooo:rsid="00c642cb" style:letter-kerning="false" style:font-name-asian="Calibri" style:font-size-asian="11pt" style:language-asian="en" style:country-asian="US" style:font-name-complex="Arial" style:font-size-complex="11pt" style:language-complex="ar" style:country-complex="SA"/>
    </style:style>
    <style:style style:name="T73" style:family="text">
      <style:text-properties style:use-window-font-color="true" loext:opacity="0%" style:font-name="Alegreya" fo:font-size="11pt" fo:language="fr" fo:country="FR" officeooo:rsid="00c689a6" style:letter-kerning="false" style:font-name-asian="Calibri" style:font-size-asian="11pt" style:language-asian="en" style:country-asian="US" style:font-name-complex="Arial" style:font-size-complex="11pt" style:language-complex="ar" style:country-complex="SA"/>
    </style:style>
    <style:style style:name="T74" style:family="text">
      <style:text-properties style:use-window-font-color="true" loext:opacity="0%" style:font-name="Alegreya" fo:font-size="11pt" fo:language="fr" fo:country="FR" officeooo:rsid="00c71b5d" style:letter-kerning="false" style:font-name-asian="Calibri" style:font-size-asian="11pt" style:language-asian="en" style:country-asian="US" style:font-name-complex="Arial" style:font-size-complex="11pt" style:language-complex="ar" style:country-complex="SA"/>
    </style:style>
    <style:style style:name="T75" style:family="text">
      <style:text-properties style:use-window-font-color="true" loext:opacity="0%" style:font-name="Alegreya" fo:font-size="11pt" fo:language="fr" fo:country="FR" officeooo:rsid="00c8f26f" style:letter-kerning="false" style:font-name-asian="Calibri" style:font-size-asian="11pt" style:language-asian="en" style:country-asian="US" style:font-name-complex="Arial" style:font-size-complex="11pt" style:language-complex="ar" style:country-complex="SA"/>
    </style:style>
    <style:style style:name="T76" style:family="text">
      <style:text-properties style:use-window-font-color="true" loext:opacity="0%" style:font-name="Alegreya" fo:font-size="11pt" fo:language="fr" fo:country="FR" officeooo:rsid="00cac3c9" style:letter-kerning="false" style:font-name-asian="Calibri" style:font-size-asian="11pt" style:language-asian="en" style:country-asian="US" style:font-name-complex="Arial" style:font-size-complex="11pt" style:language-complex="ar" style:country-complex="SA"/>
    </style:style>
    <style:style style:name="T77" style:family="text">
      <style:text-properties style:use-window-font-color="true" loext:opacity="0%" style:font-name="Alegreya" fo:font-size="11pt" fo:language="fr" fo:country="FR" officeooo:rsid="00cbc1fb" style:letter-kerning="false" style:font-name-asian="Calibri" style:font-size-asian="11pt" style:language-asian="en" style:country-asian="US" style:font-name-complex="Arial" style:font-size-complex="11pt" style:language-complex="ar" style:country-complex="SA"/>
    </style:style>
    <style:style style:name="T78" style:family="text">
      <style:text-properties style:use-window-font-color="true" loext:opacity="0%" style:font-name="Alegreya" fo:font-size="11pt" fo:language="fr" fo:country="FR" officeooo:rsid="00cce46f" style:letter-kerning="false" style:font-name-asian="Calibri" style:font-size-asian="11pt" style:language-asian="en" style:country-asian="US" style:font-name-complex="Arial" style:font-size-complex="11pt" style:language-complex="ar" style:country-complex="SA"/>
    </style:style>
    <style:style style:name="T79" style:family="text">
      <style:text-properties style:use-window-font-color="true" loext:opacity="0%" style:font-name="Alegreya" fo:font-size="11pt" fo:language="fr" fo:country="FR" officeooo:rsid="00cd9879" style:letter-kerning="false" style:font-name-asian="Calibri" style:font-size-asian="11pt" style:language-asian="en" style:country-asian="US" style:font-name-complex="Arial" style:font-size-complex="11pt" style:language-complex="ar" style:country-complex="SA"/>
    </style:style>
    <style:style style:name="T80" style:family="text">
      <style:text-properties style:use-window-font-color="true" loext:opacity="0%" style:font-name="Alegreya" fo:font-size="11pt" fo:language="fr" fo:country="FR" officeooo:rsid="00ce2973" style:letter-kerning="false" style:font-name-asian="Calibri" style:font-size-asian="11pt" style:language-asian="en" style:country-asian="US" style:font-name-complex="Arial" style:font-size-complex="11pt" style:language-complex="ar" style:country-complex="SA"/>
    </style:style>
    <style:style style:name="T81" style:family="text">
      <style:text-properties style:use-window-font-color="true" loext:opacity="0%" style:font-name="Alegreya" fo:font-size="11pt" fo:language="fr" fo:country="FR" officeooo:rsid="00d02ecc" style:letter-kerning="false" style:font-name-asian="Calibri" style:font-size-asian="11pt" style:language-asian="en" style:country-asian="US" style:font-name-complex="Arial" style:font-size-complex="11pt" style:language-complex="ar" style:country-complex="SA"/>
    </style:style>
    <style:style style:name="T82" style:family="text">
      <style:text-properties style:use-window-font-color="true" loext:opacity="0%" style:font-name="Alegreya" fo:font-size="11pt" fo:language="fr" fo:country="FR" officeooo:rsid="00d11dbe" style:letter-kerning="false" style:font-name-asian="Calibri" style:font-size-asian="11pt" style:language-asian="en" style:country-asian="US" style:font-name-complex="Arial" style:font-size-complex="11pt" style:language-complex="ar" style:country-complex="SA"/>
    </style:style>
    <style:style style:name="T83" style:family="text">
      <style:text-properties style:use-window-font-color="true" loext:opacity="0%" style:font-name="Alegreya" fo:font-size="11pt" fo:language="fr" fo:country="FR" officeooo:rsid="00d1200d" style:letter-kerning="false" style:font-name-asian="Calibri" style:font-size-asian="11pt" style:language-asian="en" style:country-asian="US" style:font-name-complex="Arial" style:font-size-complex="11pt" style:language-complex="ar" style:country-complex="SA"/>
    </style:style>
    <style:style style:name="T84" style:family="text">
      <style:text-properties style:use-window-font-color="true" loext:opacity="0%" style:font-name="Alegreya" fo:font-size="11pt" fo:language="fr" fo:country="FR" officeooo:rsid="00d138b2" style:letter-kerning="false" style:font-name-asian="Calibri" style:font-size-asian="11pt" style:language-asian="en" style:country-asian="US" style:font-name-complex="Arial" style:font-size-complex="11pt" style:language-complex="ar" style:country-complex="SA"/>
    </style:style>
    <style:style style:name="T85" style:family="text">
      <style:text-properties style:use-window-font-color="true" loext:opacity="0%" style:font-name="Alegreya" fo:font-size="11pt" fo:language="fr" fo:country="FR" officeooo:rsid="00d33645" style:letter-kerning="false" style:font-name-asian="Calibri" style:font-size-asian="11pt" style:language-asian="en" style:country-asian="US" style:font-name-complex="Arial" style:font-size-complex="11pt" style:language-complex="ar" style:country-complex="SA"/>
    </style:style>
    <style:style style:name="T86" style:family="text">
      <style:text-properties style:use-window-font-color="true" loext:opacity="0%" style:font-name="Alegreya" fo:font-size="11pt" fo:language="fr" fo:country="FR" officeooo:rsid="00d4971d" style:letter-kerning="false" style:font-name-asian="Calibri" style:font-size-asian="11pt" style:language-asian="en" style:country-asian="US" style:font-name-complex="Arial" style:font-size-complex="11pt" style:language-complex="ar" style:country-complex="SA"/>
    </style:style>
    <style:style style:name="T87" style:family="text">
      <style:text-properties style:use-window-font-color="true" loext:opacity="0%" style:font-name="Alegreya" fo:font-size="11pt" fo:language="fr" fo:country="FR" officeooo:rsid="00d5969a" style:letter-kerning="false" style:font-name-asian="Calibri" style:font-size-asian="11pt" style:language-asian="en" style:country-asian="US" style:font-name-complex="Arial" style:font-size-complex="11pt" style:language-complex="ar" style:country-complex="SA"/>
    </style:style>
    <style:style style:name="T88" style:family="text">
      <style:text-properties style:use-window-font-color="true" loext:opacity="0%" style:font-name="Alegreya" fo:font-size="11pt" fo:language="fr" fo:country="FR" officeooo:rsid="00deca91" style:letter-kerning="false" style:font-name-asian="Calibri" style:font-size-asian="11pt" style:language-asian="en" style:country-asian="US" style:font-name-complex="Arial" style:font-size-complex="11pt" style:language-complex="ar" style:country-complex="SA"/>
    </style:style>
    <style:style style:name="T89" style:family="text">
      <style:text-properties style:use-window-font-color="true" loext:opacity="0%" style:font-name="Alegreya" fo:font-size="11pt" fo:language="fr" fo:country="FR" officeooo:rsid="00f62768" style:letter-kerning="false" style:font-name-asian="Calibri" style:font-size-asian="11pt" style:language-asian="en" style:country-asian="US" style:font-name-complex="Arial" style:font-size-complex="11pt" style:language-complex="ar" style:country-complex="SA"/>
    </style:style>
    <style:style style:name="T90" style:family="text">
      <style:text-properties style:use-window-font-color="true" loext:opacity="0%" style:font-name="Alegreya" fo:font-size="11pt" fo:language="fr" fo:country="FR" fo:font-weight="bold"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T91" style:family="text">
      <style:text-properties style:use-window-font-color="true" loext:opacity="0%" style:font-name="Alegreya" fo:font-size="11pt" fo:language="fr" fo:country="FR" fo:font-weight="bold" officeooo:rsid="0005071c"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T92" style:family="text">
      <style:text-properties style:use-window-font-color="true" loext:opacity="0%" style:font-name="Alegreya" fo:font-size="11pt" fo:language="fr" fo:country="FR" fo:font-style="italic" officeooo:rsid="00243188" style:letter-kerning="false" style:font-name-asian="Calibri" style:font-size-asian="11pt" style:language-asian="en" style:country-asian="US" style:font-style-asian="italic" style:font-name-complex="Arial" style:font-size-complex="11pt" style:language-complex="ar" style:country-complex="SA" style:font-style-complex="italic"/>
    </style:style>
    <style:style style:name="T93" style:family="text">
      <style:text-properties style:use-window-font-color="true" loext:opacity="0%" style:font-name="Alegreya" fo:font-size="11pt" style:letter-kerning="false" style:font-name-asian="Calibri" style:font-size-asian="11pt" style:language-asian="en" style:country-asian="US" style:font-name-complex="Arial" style:font-size-complex="11pt" style:language-complex="ar" style:country-complex="SA"/>
    </style:style>
    <style:style style:name="T94" style:family="text">
      <style:text-properties style:use-window-font-color="true" loext:opacity="0%" style:font-name="Alegreya" fo:font-size="11pt" officeooo:rsid="00a78087" style:letter-kerning="false" style:font-name-asian="Calibri" style:font-size-asian="11pt" style:language-asian="en" style:country-asian="US" style:font-name-complex="Arial" style:font-size-complex="11pt" style:language-complex="ar" style:country-complex="SA"/>
    </style:style>
    <style:style style:name="T95" style:family="text">
      <style:text-properties style:use-window-font-color="true" loext:opacity="0%" style:font-name="Alegreya" fo:font-size="11pt" officeooo:rsid="00aa2b77" style:letter-kerning="false" style:font-name-asian="Calibri" style:font-size-asian="11pt" style:language-asian="en" style:country-asian="US" style:font-name-complex="Arial" style:font-size-complex="11pt" style:language-complex="ar" style:country-complex="SA"/>
    </style:style>
    <style:style style:name="T96" style:family="text">
      <style:text-properties style:use-window-font-color="true" loext:opacity="0%" style:font-name="Alegreya" fo:font-size="11pt" officeooo:rsid="00ab3252" style:letter-kerning="false" style:font-name-asian="Calibri" style:font-size-asian="11pt" style:language-asian="en" style:country-asian="US" style:font-name-complex="Arial" style:font-size-complex="11pt" style:language-complex="ar" style:country-complex="SA"/>
    </style:style>
    <style:style style:name="T97" style:family="text">
      <style:text-properties style:use-window-font-color="true" loext:opacity="0%" style:font-name="Alegreya" fo:font-size="11pt" officeooo:rsid="00abd6c4" style:letter-kerning="false" style:font-name-asian="Calibri" style:font-size-asian="11pt" style:language-asian="en" style:country-asian="US" style:font-name-complex="Arial" style:font-size-complex="11pt" style:language-complex="ar" style:country-complex="SA"/>
    </style:style>
    <style:style style:name="T98" style:family="text">
      <style:text-properties style:use-window-font-color="true" loext:opacity="0%" style:font-name="Alegreya" fo:font-size="11pt" officeooo:rsid="00adc5f9" style:letter-kerning="false" style:font-name-asian="Calibri" style:font-size-asian="11pt" style:language-asian="en" style:country-asian="US" style:font-name-complex="Arial" style:font-size-complex="11pt" style:language-complex="ar" style:country-complex="SA"/>
    </style:style>
    <style:style style:name="T99" style:family="text">
      <style:text-properties style:use-window-font-color="true" loext:opacity="0%" style:font-name="Alegreya" fo:font-size="11pt" officeooo:rsid="00afa515" style:letter-kerning="false" style:font-name-asian="Calibri" style:font-size-asian="11pt" style:language-asian="en" style:country-asian="US" style:font-name-complex="Arial" style:font-size-complex="11pt" style:language-complex="ar" style:country-complex="SA"/>
    </style:style>
    <style:style style:name="T100" style:family="text">
      <style:text-properties style:use-window-font-color="true" loext:opacity="0%" style:font-name="Alegreya" fo:font-size="11pt" officeooo:rsid="00f62768" style:letter-kerning="false" style:font-name-asian="Calibri" style:font-size-asian="11pt" style:language-asian="en" style:country-asian="US" style:font-name-complex="Arial" style:font-size-complex="11pt" style:language-complex="ar" style:country-complex="SA"/>
    </style:style>
    <style:style style:name="T101" style:family="text">
      <style:text-properties style:use-window-font-color="true" loext:opacity="0%" style:font-name="Alegreya" fo:font-size="11pt" fo:font-style="italic" style:letter-kerning="false" style:font-name-asian="Calibri" style:font-size-asian="11pt" style:language-asian="en" style:country-asian="US" style:font-style-asian="italic" style:font-name-complex="Arial" style:font-size-complex="11pt" style:language-complex="ar" style:country-complex="SA" style:font-style-complex="italic"/>
    </style:style>
    <style:style style:name="T102" style:family="text">
      <style:text-properties style:use-window-font-color="true" loext:opacity="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T103" style:family="text">
      <style:text-properties style:use-window-font-color="true" loext:opacity="0%" fo:font-size="11pt" fo:language="fr" fo:country="FR" officeooo:rsid="000490dc" style:letter-kerning="false" style:font-name-asian="Calibri" style:font-size-asian="11pt" style:language-asian="en" style:country-asian="US" style:font-name-complex="Arial" style:font-size-complex="11pt" style:language-complex="ar" style:country-complex="SA"/>
    </style:style>
    <style:style style:name="T104" style:family="text">
      <style:text-properties style:use-window-font-color="true" loext:opacity="0%" fo:font-size="11pt" fo:language="fr" fo:country="FR" officeooo:rsid="000ad6ac" style:letter-kerning="false" style:font-name-asian="Calibri" style:font-size-asian="11pt" style:language-asian="en" style:country-asian="US" style:font-name-complex="Arial" style:font-size-complex="11pt" style:language-complex="ar" style:country-complex="SA"/>
    </style:style>
    <style:style style:name="T105" style:family="text">
      <style:text-properties style:use-window-font-color="true" loext:opacity="0%" fo:font-size="11pt" fo:language="fr" fo:country="FR" officeooo:rsid="0052ddb9" style:letter-kerning="false" style:font-name-asian="Calibri" style:font-size-asian="11pt" style:language-asian="en" style:country-asian="US" style:font-name-complex="Arial" style:font-size-complex="11pt" style:language-complex="ar" style:country-complex="SA"/>
    </style:style>
    <style:style style:name="T106" style:family="text">
      <style:text-properties style:use-window-font-color="true" loext:opacity="0%" fo:font-size="11pt" fo:language="fr" fo:country="FR" officeooo:rsid="0054055d" style:letter-kerning="false" style:font-name-asian="Calibri" style:font-size-asian="11pt" style:language-asian="en" style:country-asian="US" style:font-name-complex="Arial" style:font-size-complex="11pt" style:language-complex="ar" style:country-complex="SA"/>
    </style:style>
    <style:style style:name="T107" style:family="text">
      <style:text-properties style:use-window-font-color="true" loext:opacity="0%" fo:font-size="11pt" fo:language="fr" fo:country="FR" officeooo:rsid="00588b24" style:letter-kerning="false" style:font-name-asian="Calibri" style:font-size-asian="11pt" style:language-asian="en" style:country-asian="US" style:font-name-complex="Arial" style:font-size-complex="11pt" style:language-complex="ar" style:country-complex="SA"/>
    </style:style>
    <style:style style:name="T108" style:family="text">
      <style:text-properties style:use-window-font-color="true" loext:opacity="0%" fo:font-size="11pt" fo:language="fr" fo:country="FR" officeooo:rsid="00b4a064" style:letter-kerning="false" style:font-name-asian="Calibri" style:font-size-asian="11pt" style:language-asian="en" style:country-asian="US" style:font-name-complex="Arial" style:font-size-complex="11pt" style:language-complex="ar" style:country-complex="SA"/>
    </style:style>
    <style:style style:name="T109" style:family="text">
      <style:text-properties style:use-window-font-color="true" loext:opacity="0%" fo:font-size="11pt" fo:language="fr" fo:country="FR" officeooo:rsid="00f62768" style:letter-kerning="false" style:font-name-asian="Calibri" style:font-size-asian="11pt" style:language-asian="en" style:country-asian="US" style:font-name-complex="Arial" style:font-size-complex="11pt" style:language-complex="ar" style:country-complex="SA"/>
    </style:style>
    <style:style style:name="T110" style:family="text">
      <style:text-properties style:use-window-font-color="true" loext:opacity="0%" fo:font-size="11pt" fo:language="fr" fo:country="FR" fo:font-style="italic" style:letter-kerning="false" style:font-name-asian="Calibri" style:font-size-asian="11pt" style:language-asian="en" style:country-asian="US" style:font-style-asian="italic" style:font-name-complex="Arial" style:font-size-complex="11pt" style:language-complex="ar" style:country-complex="SA" style:font-style-complex="italic"/>
    </style:style>
    <style:style style:name="T111" style:family="text">
      <style:text-properties style:use-window-font-color="true" loext:opacity="0%" style:text-position="super 58%"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T112" style:family="text">
      <style:text-properties fo:color="#ffffff" loext:opacity="100%" fo:language="fr" fo:country="FR"/>
    </style:style>
    <style:style style:name="T113" style:family="text">
      <style:text-properties fo:color="#ffffff" loext:opacity="100%" fo:language="fr" fo:country="FR" officeooo:rsid="005ef854"/>
    </style:style>
    <style:style style:name="T114" style:family="text">
      <style:text-properties fo:color="#ffffff" loext:opacity="100%" fo:language="fr" fo:country="FR" officeooo:rsid="00a575e5"/>
    </style:style>
    <style:style style:name="T115" style:family="text">
      <style:text-properties fo:color="#ffffff" loext:opacity="100%" fo:language="fr" fo:country="FR" officeooo:rsid="00aa2b77"/>
    </style:style>
    <style:style style:name="T116" style:family="text">
      <style:text-properties fo:color="#ffffff" loext:opacity="100%" fo:language="fr" fo:country="FR" officeooo:rsid="00b012c2"/>
    </style:style>
    <style:style style:name="T117" style:family="text">
      <style:text-properties fo:color="#ffffff" loext:opacity="100%" fo:language="fr" fo:country="FR" officeooo:rsid="00e0c629"/>
    </style:style>
    <style:style style:name="T118" style:family="text">
      <style:text-properties fo:color="#000000" loext:opacity="100%" fo:language="fr" fo:country="FR" style:text-underline-style="none" fo:background-color="#ffffff" loext:char-shading-value="0"/>
    </style:style>
    <style:style style:name="T119" style:family="text">
      <style:text-properties fo:color="#000000" loext:opacity="100%"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T120" style:family="text">
      <style:text-properties style:font-name-asian="Alegreya1" style:font-name-complex="Alegreya1"/>
    </style:style>
    <style:style style:name="T121" style:family="text">
      <style:text-properties officeooo:rsid="0002341a"/>
    </style:style>
    <style:style style:name="T122" style:family="text">
      <style:text-properties officeooo:rsid="000f8909"/>
    </style:style>
    <style:style style:name="T123" style:family="text">
      <style:text-properties officeooo:rsid="00159b65"/>
    </style:style>
    <style:style style:name="T124" style:family="text">
      <style:text-properties style:font-name="Alegreya" fo:font-size="11pt" fo:language="fr" fo:country="FR" style:letter-kerning="false" style:font-name-asian="Calibri" style:font-size-asian="11pt" style:language-asian="en" style:country-asian="US" style:font-name-complex="Arial" style:font-size-complex="11pt" style:language-complex="ar" style:country-complex="SA"/>
    </style:style>
    <style:style style:name="T125" style:family="text">
      <style:text-properties style:font-name="Alegreya" fo:font-size="11pt" fo:language="fr" fo:country="FR" officeooo:rsid="00176cd2" style:letter-kerning="false" style:font-name-asian="Calibri" style:font-size-asian="11pt" style:language-asian="en" style:country-asian="US" style:font-name-complex="Arial" style:font-size-complex="11pt" style:language-complex="ar" style:country-complex="SA"/>
    </style:style>
    <style:style style:name="T126" style:family="text">
      <style:text-properties style:font-name="Alegreya" fo:font-size="11pt" fo:language="fr" fo:country="FR" officeooo:rsid="00cbc1fb" style:letter-kerning="false" style:font-name-asian="Calibri" style:font-size-asian="11pt" style:language-asian="en" style:country-asian="US" style:font-name-complex="Arial" style:font-size-complex="11pt" style:language-complex="ar" style:country-complex="SA"/>
    </style:style>
    <style:style style:name="T127" style:family="text">
      <style:text-properties style:font-name="Alegreya" fo:font-size="11pt" fo:language="fr" fo:country="FR" officeooo:rsid="00deca91" style:letter-kerning="false" style:font-name-asian="Calibri" style:font-size-asian="11pt" style:language-asian="en" style:country-asian="US" style:font-name-complex="Arial" style:font-size-complex="11pt" style:language-complex="ar" style:country-complex="SA"/>
    </style:style>
    <style:style style:name="T128" style:family="text">
      <style:text-properties style:font-name="Alegreya" fo:font-size="11pt" style:letter-kerning="false" style:font-name-asian="Calibri" style:font-size-asian="11pt" style:language-asian="en" style:country-asian="US" style:font-name-complex="Arial" style:font-size-complex="11pt" style:language-complex="ar" style:country-complex="SA"/>
    </style:style>
    <style:style style:name="T129" style:family="text">
      <style:text-properties style:font-name="Alegreya" fo:font-size="11pt" officeooo:rsid="00624d7d" style:letter-kerning="false" style:font-name-asian="Calibri" style:font-size-asian="11pt" style:language-asian="en" style:country-asian="US" style:font-name-complex="Arial" style:font-size-complex="11pt" style:language-complex="ar" style:country-complex="SA"/>
    </style:style>
    <style:style style:name="T130" style:family="text">
      <style:text-properties style:font-name="Alegreya" fo:font-size="11pt" officeooo:rsid="006565d7" style:letter-kerning="false" style:font-name-asian="Calibri" style:font-size-asian="11pt" style:language-asian="en" style:country-asian="US" style:font-name-complex="Arial" style:font-size-complex="11pt" style:language-complex="ar" style:country-complex="SA"/>
    </style:style>
    <style:style style:name="T131" style:family="text">
      <style:text-properties style:font-name="Alegreya" fo:font-size="11pt" officeooo:rsid="0066db9d" style:letter-kerning="false" style:font-name-asian="Calibri" style:font-size-asian="11pt" style:language-asian="en" style:country-asian="US" style:font-name-complex="Arial" style:font-size-complex="11pt" style:language-complex="ar" style:country-complex="SA"/>
    </style:style>
    <style:style style:name="T132" style:family="text">
      <style:text-properties style:font-name="Alegreya" fo:font-size="11pt" officeooo:rsid="006f8642" style:letter-kerning="false" style:font-name-asian="Calibri" style:font-size-asian="11pt" style:language-asian="en" style:country-asian="US" style:font-name-complex="Arial" style:font-size-complex="11pt" style:language-complex="ar" style:country-complex="SA"/>
    </style:style>
    <style:style style:name="T133" style:family="text">
      <style:text-properties style:font-name="Alegreya" fo:font-size="11pt" officeooo:rsid="007161ad" style:letter-kerning="false" style:font-name-asian="Calibri" style:font-size-asian="11pt" style:language-asian="en" style:country-asian="US" style:font-name-complex="Arial" style:font-size-complex="11pt" style:language-complex="ar" style:country-complex="SA"/>
    </style:style>
    <style:style style:name="T134" style:family="text">
      <style:text-properties style:font-name="Alegreya" fo:font-size="11pt" officeooo:rsid="007294b7" style:letter-kerning="false" style:font-name-asian="Calibri" style:font-size-asian="11pt" style:language-asian="en" style:country-asian="US" style:font-name-complex="Arial" style:font-size-complex="11pt" style:language-complex="ar" style:country-complex="SA"/>
    </style:style>
    <style:style style:name="T135" style:family="text">
      <style:text-properties style:font-name="Alegreya" fo:font-size="11pt" officeooo:rsid="0074e44d" style:letter-kerning="false" style:font-name-asian="Calibri" style:font-size-asian="11pt" style:language-asian="en" style:country-asian="US" style:font-name-complex="Arial" style:font-size-complex="11pt" style:language-complex="ar" style:country-complex="SA"/>
    </style:style>
    <style:style style:name="T136" style:family="text">
      <style:text-properties style:font-name="Alegreya" fo:font-size="11pt" officeooo:rsid="0075e425" style:letter-kerning="false" style:font-name-asian="Calibri" style:font-size-asian="11pt" style:language-asian="en" style:country-asian="US" style:font-name-complex="Arial" style:font-size-complex="11pt" style:language-complex="ar" style:country-complex="SA"/>
    </style:style>
    <style:style style:name="T137" style:family="text">
      <style:text-properties style:font-name="Alegreya" fo:font-size="11pt" officeooo:rsid="0075ed9d" style:letter-kerning="false" style:font-name-asian="Calibri" style:font-size-asian="11pt" style:language-asian="en" style:country-asian="US" style:font-name-complex="Arial" style:font-size-complex="11pt" style:language-complex="ar" style:country-complex="SA"/>
    </style:style>
    <style:style style:name="T138" style:family="text">
      <style:text-properties style:font-name="Alegreya" fo:font-size="11pt" officeooo:rsid="007758ec" style:letter-kerning="false" style:font-name-asian="Calibri" style:font-size-asian="11pt" style:language-asian="en" style:country-asian="US" style:font-name-complex="Arial" style:font-size-complex="11pt" style:language-complex="ar" style:country-complex="SA"/>
    </style:style>
    <style:style style:name="T139" style:family="text">
      <style:text-properties fo:font-style="italic" style:font-style-asian="italic" style:font-style-complex="italic"/>
    </style:style>
    <style:style style:name="T140" style:family="text">
      <style:text-properties fo:font-style="italic" officeooo:rsid="007d143f" style:font-style-asian="italic" style:font-style-complex="italic"/>
    </style:style>
    <style:style style:name="T141" style:family="text">
      <style:text-properties fo:font-style="italic" officeooo:rsid="00d65ab5" style:font-style-asian="italic" style:font-style-complex="italic"/>
    </style:style>
    <style:style style:name="T142" style:family="text">
      <style:text-properties fo:font-style="italic" officeooo:rsid="00e51e8c" style:font-style-asian="italic" style:font-style-complex="italic"/>
    </style:style>
    <style:style style:name="T143" style:family="text">
      <style:text-properties officeooo:rsid="00407de8"/>
    </style:style>
    <style:style style:name="T144" style:family="text">
      <style:text-properties officeooo:rsid="004232a7"/>
    </style:style>
    <style:style style:name="T145" style:family="text">
      <style:text-properties officeooo:rsid="00459fa1"/>
    </style:style>
    <style:style style:name="T146" style:family="text">
      <style:text-properties officeooo:rsid="004730c1"/>
    </style:style>
    <style:style style:name="T147" style:family="text">
      <style:text-properties officeooo:rsid="0047438f"/>
    </style:style>
    <style:style style:name="T148" style:family="text">
      <style:text-properties officeooo:rsid="00476141"/>
    </style:style>
    <style:style style:name="T149" style:family="text">
      <style:text-properties officeooo:rsid="0048797f"/>
    </style:style>
    <style:style style:name="T150" style:family="text">
      <style:text-properties officeooo:rsid="004a5a0f"/>
    </style:style>
    <style:style style:name="T151" style:family="text">
      <style:text-properties officeooo:rsid="004b35c4"/>
    </style:style>
    <style:style style:name="T152" style:family="text">
      <style:text-properties officeooo:rsid="004e2a70"/>
    </style:style>
    <style:style style:name="T153" style:family="text">
      <style:text-properties officeooo:rsid="004e9482"/>
    </style:style>
    <style:style style:name="T154" style:family="text">
      <style:text-properties officeooo:rsid="004fd355"/>
    </style:style>
    <style:style style:name="T155" style:family="text">
      <style:text-properties officeooo:rsid="0052ddb9"/>
    </style:style>
    <style:style style:name="T156" style:family="text">
      <style:text-properties officeooo:rsid="0054055d"/>
    </style:style>
    <style:style style:name="T157" style:family="text">
      <style:text-properties officeooo:rsid="00557671"/>
    </style:style>
    <style:style style:name="T158" style:family="text">
      <style:text-properties officeooo:rsid="0056942f"/>
    </style:style>
    <style:style style:name="T159" style:family="text">
      <style:text-properties officeooo:rsid="00588b24"/>
    </style:style>
    <style:style style:name="T160" style:family="text">
      <style:text-properties officeooo:rsid="0058ba38"/>
    </style:style>
    <style:style style:name="T161" style:family="text">
      <style:text-properties officeooo:rsid="00593a46"/>
    </style:style>
    <style:style style:name="T162" style:family="text">
      <style:text-properties officeooo:rsid="005a7f59"/>
    </style:style>
    <style:style style:name="T163" style:family="text">
      <style:text-properties officeooo:rsid="005bfbd0"/>
    </style:style>
    <style:style style:name="T164" style:family="text">
      <style:text-properties officeooo:rsid="005e54a2"/>
    </style:style>
    <style:style style:name="T165" style:family="text">
      <style:text-properties officeooo:rsid="0060de2b"/>
    </style:style>
    <style:style style:name="T166" style:family="text">
      <style:text-properties officeooo:rsid="00624d7d"/>
    </style:style>
    <style:style style:name="T167" style:family="text">
      <style:text-properties officeooo:rsid="0066db9d"/>
    </style:style>
    <style:style style:name="T168" style:family="text">
      <style:text-properties officeooo:rsid="006780ec"/>
    </style:style>
    <style:style style:name="T169" style:family="text">
      <style:text-properties officeooo:rsid="006c7f45"/>
    </style:style>
    <style:style style:name="T170" style:family="text">
      <style:text-properties officeooo:rsid="006d29d3"/>
    </style:style>
    <style:style style:name="T171" style:family="text">
      <style:text-properties officeooo:rsid="006ebf77"/>
    </style:style>
    <style:style style:name="T172" style:family="text">
      <style:text-properties officeooo:rsid="006edf2d"/>
    </style:style>
    <style:style style:name="T173" style:family="text">
      <style:text-properties officeooo:rsid="006f8642"/>
    </style:style>
    <style:style style:name="T174" style:family="text">
      <style:text-properties officeooo:rsid="007161ad"/>
    </style:style>
    <style:style style:name="T175" style:family="text">
      <style:text-properties officeooo:rsid="0074e44d"/>
    </style:style>
    <style:style style:name="T176" style:family="text">
      <style:text-properties officeooo:rsid="007a11b8"/>
    </style:style>
    <style:style style:name="T177" style:family="text">
      <style:text-properties officeooo:rsid="007a1b92"/>
    </style:style>
    <style:style style:name="T178" style:family="text">
      <style:text-properties officeooo:rsid="0080cbd5"/>
    </style:style>
    <style:style style:name="T179" style:family="text">
      <style:text-properties officeooo:rsid="00828956"/>
    </style:style>
    <style:style style:name="T180" style:family="text">
      <style:text-properties officeooo:rsid="0083a66c"/>
    </style:style>
    <style:style style:name="T181" style:family="text">
      <style:text-properties officeooo:rsid="00841a23"/>
    </style:style>
    <style:style style:name="T182" style:family="text">
      <style:text-properties officeooo:rsid="0084da59"/>
    </style:style>
    <style:style style:name="T183" style:family="text">
      <style:text-properties officeooo:rsid="00868884"/>
    </style:style>
    <style:style style:name="T184" style:family="text">
      <style:text-properties officeooo:rsid="00886f49"/>
    </style:style>
    <style:style style:name="T185" style:family="text">
      <style:text-properties officeooo:rsid="0088c1f4"/>
    </style:style>
    <style:style style:name="T186" style:family="text">
      <style:text-properties officeooo:rsid="008a0050"/>
    </style:style>
    <style:style style:name="T187" style:family="text">
      <style:text-properties officeooo:rsid="008b2b6b"/>
    </style:style>
    <style:style style:name="T188" style:family="text">
      <style:text-properties officeooo:rsid="008b4683"/>
    </style:style>
    <style:style style:name="T189" style:family="text">
      <style:text-properties officeooo:rsid="008d416f"/>
    </style:style>
    <style:style style:name="T190" style:family="text">
      <style:text-properties officeooo:rsid="008e9f7d"/>
    </style:style>
    <style:style style:name="T191" style:family="text">
      <style:text-properties officeooo:rsid="008f53b8"/>
    </style:style>
    <style:style style:name="T192" style:family="text">
      <style:text-properties officeooo:rsid="009071ba"/>
    </style:style>
    <style:style style:name="T193" style:family="text">
      <style:text-properties officeooo:rsid="0091f182"/>
    </style:style>
    <style:style style:name="T194" style:family="text">
      <style:text-properties officeooo:rsid="009333a1"/>
    </style:style>
    <style:style style:name="T195" style:family="text">
      <style:text-properties officeooo:rsid="0095cfd9"/>
    </style:style>
    <style:style style:name="T196" style:family="text">
      <style:text-properties officeooo:rsid="0096f500"/>
    </style:style>
    <style:style style:name="T197" style:family="text">
      <style:text-properties officeooo:rsid="0096ffb2"/>
    </style:style>
    <style:style style:name="T198" style:family="text">
      <style:text-properties officeooo:rsid="00976566"/>
    </style:style>
    <style:style style:name="T199" style:family="text">
      <style:text-properties officeooo:rsid="0098eecf"/>
    </style:style>
    <style:style style:name="T200" style:family="text">
      <style:text-properties officeooo:rsid="009aba14"/>
    </style:style>
    <style:style style:name="T201" style:family="text">
      <style:text-properties officeooo:rsid="009c9b8d"/>
    </style:style>
    <style:style style:name="T202" style:family="text">
      <style:text-properties officeooo:rsid="009e7a9e"/>
    </style:style>
    <style:style style:name="T203" style:family="text">
      <style:text-properties officeooo:rsid="00afa515"/>
    </style:style>
    <style:style style:name="T204" style:family="text">
      <style:text-properties fo:text-transform="capitalize" fo:background-color="transparent" loext:char-shading-value="0"/>
    </style:style>
    <style:style style:name="T205" style:family="text">
      <style:text-properties officeooo:rsid="00b1a0a7"/>
    </style:style>
    <style:style style:name="T206" style:family="text">
      <style:text-properties officeooo:rsid="00b39891"/>
    </style:style>
    <style:style style:name="T207" style:family="text">
      <style:text-properties officeooo:rsid="00b4a064"/>
    </style:style>
    <style:style style:name="T208" style:family="text">
      <style:text-properties officeooo:rsid="00ba14d9"/>
    </style:style>
    <style:style style:name="T209" style:family="text">
      <style:text-properties officeooo:rsid="00ba862d"/>
    </style:style>
    <style:style style:name="T210" style:family="text">
      <style:text-properties officeooo:rsid="00bbe5ac"/>
    </style:style>
    <style:style style:name="T211" style:family="text">
      <style:text-properties officeooo:rsid="00bce2c1"/>
    </style:style>
    <style:style style:name="T212" style:family="text">
      <style:text-properties officeooo:rsid="00bce2c1" loext:padding="0cm" loext:border="none"/>
    </style:style>
    <style:style style:name="T213" style:family="text">
      <style:text-properties loext:padding="0cm" loext:border="none"/>
    </style:style>
    <style:style style:name="T214" style:family="text">
      <style:text-properties officeooo:rsid="00bede38"/>
    </style:style>
    <style:style style:name="T215" style:family="text">
      <style:text-properties officeooo:rsid="00bfc0f7"/>
    </style:style>
    <style:style style:name="T216" style:family="text">
      <style:text-properties officeooo:rsid="00c2c089"/>
    </style:style>
    <style:style style:name="T217" style:family="text">
      <style:text-properties officeooo:rsid="00c36735"/>
    </style:style>
    <style:style style:name="T218" style:family="text">
      <style:text-properties officeooo:rsid="00cac3c9"/>
    </style:style>
    <style:style style:name="T219" style:family="text">
      <style:text-properties officeooo:rsid="00d4971d"/>
    </style:style>
    <style:style style:name="T220" style:family="text">
      <style:text-properties officeooo:rsid="00d65ab5"/>
    </style:style>
    <style:style style:name="T221" style:family="text">
      <style:text-properties officeooo:rsid="00d917ed"/>
    </style:style>
    <style:style style:name="T222" style:family="text">
      <style:text-properties officeooo:rsid="00da15c1"/>
    </style:style>
    <style:style style:name="T223" style:family="text">
      <style:text-properties officeooo:rsid="00dd1623"/>
    </style:style>
    <style:style style:name="T224" style:family="text">
      <style:text-properties officeooo:rsid="00deca91"/>
    </style:style>
    <style:style style:name="T225" style:family="text">
      <style:text-properties officeooo:rsid="00e1a20a"/>
    </style:style>
    <style:style style:name="T226" style:family="text">
      <style:text-properties officeooo:rsid="00e27598"/>
    </style:style>
    <style:style style:name="T227" style:family="text">
      <style:text-properties officeooo:rsid="00e4583f"/>
    </style:style>
    <style:style style:name="T228" style:family="text">
      <style:text-properties officeooo:rsid="00e51e8c"/>
    </style:style>
    <style:style style:name="T229" style:family="text">
      <style:text-properties officeooo:rsid="00e6ba4e"/>
    </style:style>
    <style:style style:name="T230" style:family="text">
      <style:text-properties officeooo:rsid="00e6f173"/>
    </style:style>
    <style:style style:name="T231" style:family="text">
      <style:text-properties officeooo:rsid="00e89316"/>
    </style:style>
    <style:style style:name="T232" style:family="text">
      <style:text-properties fo:background-color="#ffffff" loext:char-shading-value="0"/>
    </style:style>
    <style:style style:name="T233" style:family="text">
      <style:text-properties officeooo:rsid="00e8ad13"/>
    </style:style>
    <style:style style:name="T234" style:family="text">
      <style:text-properties officeooo:rsid="00e9f518"/>
    </style:style>
    <style:style style:name="T235" style:family="text">
      <style:text-properties officeooo:rsid="00eb27b7"/>
    </style:style>
    <style:style style:name="T236" style:family="text">
      <style:text-properties officeooo:rsid="00ebef60"/>
    </style:style>
    <style:style style:name="T237" style:family="text">
      <style:text-properties officeooo:rsid="00ed811d"/>
    </style:style>
    <style:style style:name="T238" style:family="text">
      <style:text-properties officeooo:rsid="00edb339"/>
    </style:style>
    <style:style style:name="T239" style:family="text">
      <style:text-properties officeooo:rsid="00f1ff0e"/>
    </style:style>
    <style:style style:name="T240" style:family="text">
      <style:text-properties officeooo:rsid="00f20680"/>
    </style:style>
    <style:style style:name="T241" style:family="text">
      <style:text-properties officeooo:rsid="00f2c458"/>
    </style:style>
    <style:style style:name="T242" style:family="text">
      <style:text-properties officeooo:rsid="00f37977"/>
    </style:style>
    <style:style style:name="T243" style:family="text">
      <style:text-properties officeooo:rsid="00f6276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071cm" svg:stroke-linecap="butt" draw:fill="solid" draw:fill-color="#000000" draw:textarea-vertical-align="middle" draw:auto-grow-height="false" fo:min-height="1.148cm" fo:min-width="1.191cm" fo:padding-top="0cm" fo:padding-bottom="0cm" fo:padding-left="0cm" fo:padding-right="0cm" fo:wrap-option="wrap" loext:decorative="false" fo:margin-left="0cm" fo:margin-right="0cm" fo:margin-top="0cm" fo:margin-bottom="0.018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La politique de l’autruche</text:p>
      <text:p text:style-name="P134">Petit manuel de résistance <text:line-break/><text:tab/>pour les managers allergiques au changement</text:p>
      <text:p text:style-name="P4"/>
      <text:p text:style-name="P4"/>
      <text:p text:style-name="P136">Fabrice PERSIAUT</text:p>
      <text:p text:style-name="P4"/>
      <text:p text:style-name="P4"/>
      <text:p text:style-name="P4"/>
      <text:p text:style-name="P162"><text:span text:style-name="T139">Publié </text:span><text:span text:style-name="T140">pour moi</text:span></text:p>
      <text:p text:style-name="P163"/>
      <text:p text:style-name="P4"/>
      <text:p text:style-name="P4"/>
      <text:p text:style-name="P164">Dédicace</text:p>
      <text:p text:style-name="P135">J’aimerais dédier ce manuel à tous les dirigeants, managers et simples opérationnels qui ont su, dans une ère de grands changements et d’accélération des Transformations structurelles des entreprises, trouver des astuces et des stratégies innovantes, efficaces et originales pour ne pas entrer dans la facilité du politiquement correct et de la pensée majoritaire.</text:p>
      <text:p text:style-name="P4"/>
      <text:p text:style-name="P4"><text:soft-page-break/></text:p>
      <text:p text:style-name="P164">Remerciements</text:p>
      <text:p text:style-name="P112">Je tiens à remercier tout d’abord celle qui est mon ancre et mon pilier dans cette vie, mon épouse et mon phare, ma Chris à moi, pour sa relecture attentive et ses conseils précieux.</text:p>
      <text:p text:style-name="P112">Ensuite, toute cette analyse n’aurait pas été possible sans les échanges quotidiens avec mes deux binômes successifs, Farid et Sébastien : comme quoi, il faut toujours râler et ne rien prendre au sérieux, il en restera toujours quelque chose…</text:p>
      <text:p text:style-name="P113">Enfin, un gros bisou à ma tite sœur, première lectrice toujours critique de son frère qui bosse pour le Grand Capital.</text:p>
      <text:table-of-content text:style-name="Sect1" text:protected="true" text:name="Table des matière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P221">Sommaire</text:p>
          </text:index-title>
          <text:p text:style-name="P198"><text:a xlink:type="simple" xlink:href="#__RefHeading___Toc1560_1115178054" text:style-name="Index_20_Link" text:visited-style-name="Index_20_Link">Introduction<text:tab/>viii</text:a></text:p>
          <text:p text:style-name="P199"><text:a xlink:type="simple" xlink:href="#__RefHeading___Toc1562_1115178054" text:style-name="Index_20_Link" text:visited-style-name="Index_20_Link">Ce livre n’est pas un manuel du changement<text:tab/>viii</text:a></text:p>
          <text:p text:style-name="P199"><text:a xlink:type="simple" xlink:href="#__RefHeading___Toc1564_1115178054" text:style-name="Index_20_Link" text:visited-style-name="Index_20_Link">Il ne faut pas sous-estimer la nécessité du confort<text:tab/>ix</text:a></text:p>
          <text:p text:style-name="P199"><text:a xlink:type="simple" xlink:href="#__RefHeading___Toc1566_1115178054" text:style-name="Index_20_Link" text:visited-style-name="Index_20_Link">Ne pas mélanger Production et Transformation<text:tab/>x</text:a></text:p>
          <text:p text:style-name="P199"><text:a xlink:type="simple" xlink:href="#__RefHeading___Toc1568_1115178054" text:style-name="Index_20_Link" text:visited-style-name="Index_20_Link">De la dérision et de la tolérance<text:tab/>xi</text:a></text:p>
          <text:p text:style-name="P197"><text:a xlink:type="simple" xlink:href="#__RefHeading___Toc1570_1115178054" text:style-name="Index_20_Link" text:visited-style-name="Index_20_Link">La politique de l’autruche<text:tab/>1</text:a></text:p>
          <text:p text:style-name="P198"><text:a xlink:type="simple" xlink:href="#__RefHeading___Toc1778_1115178054" text:style-name="Index_20_Link" text:visited-style-name="Index_20_Link">Qu’est-ce que la politique de l’autruche ?<text:tab/>2</text:a></text:p>
          <text:p text:style-name="P199"><text:a xlink:type="simple" xlink:href="#__RefHeading___Toc1572_1115178054" text:style-name="Index_20_Link" text:visited-style-name="Index_20_Link">Commençons par une définition<text:tab/>2</text:a></text:p>
          <text:p text:style-name="P199"><text:a xlink:type="simple" xlink:href="#__RefHeading___Toc1574_1115178054" text:style-name="Index_20_Link" text:visited-style-name="Index_20_Link">Contextualisation dans l’entreprise<text:tab/>2</text:a></text:p>
          <text:p text:style-name="P199"><text:a xlink:type="simple" xlink:href="#__RefHeading___Toc3695_2546550821" text:style-name="Index_20_Link" text:visited-style-name="Index_20_Link">Pourquoi parler de Transformation actuellement ?<text:tab/>4</text:a></text:p>
          <text:p text:style-name="P198"><text:a xlink:type="simple" xlink:href="#__RefHeading___Toc1576_1115178054" text:style-name="Index_20_Link" text:visited-style-name="Index_20_Link">Pourquoi les entreprises cherchent toujours à se transformer ?<text:tab/>6</text:a></text:p>
          <text:p text:style-name="P199"><text:a xlink:type="simple" xlink:href="#__RefHeading___Toc1721_2769870995" text:style-name="Index_20_Link" text:visited-style-name="Index_20_Link">Ne pas cracher dans la soupe<text:tab/>6</text:a></text:p>
          <text:p text:style-name="P199"><text:a xlink:type="simple" xlink:href="#__RefHeading___Toc1578_1115178054" text:style-name="Index_20_Link" text:visited-style-name="Index_20_Link">La pression du marché et des actionnaires<text:tab/>8</text:a></text:p>
          <text:p text:style-name="P199"><text:a xlink:type="simple" xlink:href="#__RefHeading___Toc1580_1115178054" text:style-name="Index_20_Link" text:visited-style-name="Index_20_Link">La menace des GAFAM<text:tab/>10</text:a></text:p>
          <text:p text:style-name="P199"><text:a xlink:type="simple" xlink:href="#__RefHeading___Toc1582_1115178054" text:style-name="Index_20_Link" text:visited-style-name="Index_20_Link">Le syndrome d’hubris<text:tab/>11</text:a></text:p>
          <text:p text:style-name="P198"><text:a xlink:type="simple" xlink:href="#__RefHeading___Toc1584_1115178054" text:style-name="Index_20_Link" text:visited-style-name="Index_20_Link">Quels sont les résultats habituels d’une Transformation ?<text:tab/>15</text:a></text:p>
          <text:p text:style-name="P199"><text:a xlink:type="simple" xlink:href="#__RefHeading___Toc1693_1115178054" text:style-name="Index_20_Link" text:visited-style-name="Index_20_Link">Le sacrifice du messager<text:tab/>15</text:a></text:p>
          <text:p text:style-name="P199"><text:a xlink:type="simple" xlink:href="#__RefHeading___Toc1695_1115178054" text:style-name="Index_20_Link" text:visited-style-name="Index_20_Link">La dictature du slider<text:tab/>17</text:a></text:p>
          <text:p text:style-name="P199"><text:a xlink:type="simple" xlink:href="#__RefHeading___Toc1697_1115178054" text:style-name="Index_20_Link" text:visited-style-name="Index_20_Link"><text:soft-page-break/>Les indicateurs pastèques<text:tab/>19</text:a></text:p>
          <text:p text:style-name="P199"><text:a xlink:type="simple" xlink:href="#__RefHeading___Toc1699_1115178054" text:style-name="Index_20_Link" text:visited-style-name="Index_20_Link">Le plancher de verre<text:tab/>20</text:a></text:p>
          <text:p text:style-name="P199"><text:a xlink:type="simple" xlink:href="#__RefHeading___Toc1701_1115178054" text:style-name="Index_20_Link" text:visited-style-name="Index_20_Link">Le problème ou la solution ?<text:tab/>23</text:a></text:p>
          <text:p text:style-name="P199"><text:a xlink:type="simple" xlink:href="#__RefHeading___Toc1703_1115178054" text:style-name="Index_20_Link" text:visited-style-name="Index_20_Link">Le moment où il faut se relever les manches<text:tab/>24</text:a></text:p>
          <text:p text:style-name="P199"><text:a xlink:type="simple" xlink:href="#__RefHeading___Toc1705_1115178054" text:style-name="Index_20_Link" text:visited-style-name="Index_20_Link">Au fait, on va où les gars ?<text:tab/>26</text:a></text:p>
          <text:p text:style-name="P199"><text:a xlink:type="simple" xlink:href="#__RefHeading___Toc1707_1115178054" text:style-name="Index_20_Link" text:visited-style-name="Index_20_Link">Émerger du chaos<text:tab/>28</text:a></text:p>
          <text:p text:style-name="P199"><text:a xlink:type="simple" xlink:href="#__RefHeading___Toc1709_1115178054" text:style-name="Index_20_Link" text:visited-style-name="Index_20_Link">La poussière sous les tapis<text:tab/>30</text:a></text:p>
          <text:p text:style-name="P199"><text:a xlink:type="simple" xlink:href="#__RefHeading___Toc1711_1115178054" text:style-name="Index_20_Link" text:visited-style-name="Index_20_Link">Qui conseille quoi ?<text:tab/>32</text:a></text:p>
          <text:p text:style-name="P199"><text:a xlink:type="simple" xlink:href="#__RefHeading___Toc1713_1115178054" text:style-name="Index_20_Link" text:visited-style-name="Index_20_Link">La création de la pénurie<text:tab/>34</text:a></text:p>
          <text:p text:style-name="P199"><text:a xlink:type="simple" xlink:href="#__RefHeading___Toc1586_1115178054" text:style-name="Index_20_Link" text:visited-style-name="Index_20_Link">Le rêve de la Wunderwaffe<text:tab/>39</text:a></text:p>
          <text:p text:style-name="P199"><text:a xlink:type="simple" xlink:href="#__RefHeading___Toc1588_1115178054" text:style-name="Index_20_Link" text:visited-style-name="Index_20_Link">L’IT Legacy : un boulet au pied du sprinter<text:tab/>41</text:a></text:p>
          <text:p text:style-name="P198"><text:a xlink:type="simple" xlink:href="#__RefHeading___Toc1780_1115178054" text:style-name="Index_20_Link" text:visited-style-name="Index_20_Link">Qu’est-ce qui plante une Transformation ?<text:tab/>45</text:a></text:p>
          <text:p text:style-name="P199"><text:a xlink:type="simple" xlink:href="#__RefHeading___Toc1590_1115178054" text:style-name="Index_20_Link" text:visited-style-name="Index_20_Link">La force de la Loi<text:tab/>45</text:a></text:p>
          <text:p text:style-name="P199"><text:a xlink:type="simple" xlink:href="#__RefHeading___Toc1590_11151780541" text:style-name="Index_20_Link" text:visited-style-name="Index_20_Link">L’art du mille-feuille<text:tab/>46</text:a></text:p>
          <text:p text:style-name="P199"><text:a xlink:type="simple" xlink:href="#__RefHeading___Toc2277_1115178054" text:style-name="Index_20_Link" text:visited-style-name="Index_20_Link">Vingt ans après…<text:tab/>50</text:a></text:p>
          <text:p text:style-name="P199"><text:a xlink:type="simple" xlink:href="#__RefHeading___Toc1834_4288815894" text:style-name="Index_20_Link" text:visited-style-name="Index_20_Link">Une combustion très très lente…<text:tab/>51</text:a></text:p>
          <text:p text:style-name="P199"><text:a xlink:type="simple" xlink:href="#__RefHeading___Toc1836_4288815894" text:style-name="Index_20_Link" text:visited-style-name="Index_20_Link">L’épée de Damoclès<text:tab/>54</text:a></text:p>
          <text:p text:style-name="P199"><text:a xlink:type="simple" xlink:href="#__RefHeading___Toc1838_4288815894" text:style-name="Index_20_Link" text:visited-style-name="Index_20_Link">La malédiction des sociétés qui ont du fric<text:tab/>56</text:a></text:p>
          <text:p text:style-name="P199"><text:a xlink:type="simple" xlink:href="#__RefHeading___Toc2168_2769870995" text:style-name="Index_20_Link" text:visited-style-name="Index_20_Link">L’anti darwinisme social<text:tab/>58</text:a></text:p>
          <text:p text:style-name="P199"><text:a xlink:type="simple" xlink:href="#__RefHeading___Toc4331_2769870995" text:style-name="Index_20_Link" text:visited-style-name="Index_20_Link">Un peu de politique…<text:tab/>61</text:a></text:p>
          <text:p text:style-name="P199"><text:a xlink:type="simple" xlink:href="#__RefHeading___Toc2310_2769870995" text:style-name="Index_20_Link" text:visited-style-name="Index_20_Link">Et comment on assure la Prod dans tout ça ?,<text:tab/>63</text:a></text:p>
          <text:p text:style-name="P198"><text:a xlink:type="simple" xlink:href="#__RefHeading___Toc1592_111517805411" text:style-name="Index_20_Link" text:visited-style-name="Index_20_Link">Dura Lex, sed Lex<text:tab/>67</text:a></text:p>
          <text:p text:style-name="P199"><text:a xlink:type="simple" xlink:href="#__RefHeading___Toc2560_4125847080" text:style-name="Index_20_Link" text:visited-style-name="Index_20_Link">La Loi, c’est bien. Mais le Droit, c’est compliqué !<text:tab/>67</text:a></text:p>
          <text:p text:style-name="P199"><text:a xlink:type="simple" xlink:href="#__RefHeading___Toc22732_554501683" text:style-name="Index_20_Link" text:visited-style-name="Index_20_Link">La révolution de 2008<text:tab/>68</text:a></text:p>
          <text:p text:style-name="P199"><text:a xlink:type="simple" xlink:href="#__RefHeading___Toc22734_554501683" text:style-name="Index_20_Link" text:visited-style-name="Index_20_Link">N’oubliez pas : si c’est gratuit, c’est vous le produit !<text:tab/>71</text:a></text:p>
          <text:p text:style-name="P199"><text:a xlink:type="simple" xlink:href="#__RefHeading___Toc9774_4125847080" text:style-name="Index_20_Link" text:visited-style-name="Index_20_Link">Le débarquement des armadas réglementaires<text:tab/>73</text:a></text:p>
          <text:p text:style-name="P199"><text:a xlink:type="simple" xlink:href="#__RefHeading___Toc2562_4125847080" text:style-name="Index_20_Link" text:visited-style-name="Index_20_Link"><text:soft-page-break/>Le piège des trois petits singes<text:tab/>76</text:a></text:p>
          <text:p text:style-name="P198"><text:a xlink:type="simple" xlink:href="#__RefHeading___Toc1592_11151780541" text:style-name="Index_20_Link" text:visited-style-name="Index_20_Link">Le numérique irresponsable<text:tab/>81</text:a></text:p>
          <text:p text:style-name="P199"><text:a xlink:type="simple" xlink:href="#__RefHeading___Toc5339_4125847080" text:style-name="Index_20_Link" text:visited-style-name="Index_20_Link">Un petit rappel de bon sens<text:tab/>81</text:a></text:p>
          <text:p text:style-name="P199"><text:a xlink:type="simple" xlink:href="#__RefHeading___Toc4333_2769870995" text:style-name="Index_20_Link" text:visited-style-name="Index_20_Link">Quand tout était cher…<text:tab/>82</text:a></text:p>
          <text:p text:style-name="P199"><text:a xlink:type="simple" xlink:href="#__RefHeading___Toc2564_4125847080" text:style-name="Index_20_Link" text:visited-style-name="Index_20_Link">L’ère de l’opulence<text:tab/>83</text:a></text:p>
          <text:p text:style-name="P199"><text:a xlink:type="simple" xlink:href="#__RefHeading___Toc7084_1610056299" text:style-name="Index_20_Link" text:visited-style-name="Index_20_Link">L’impact du Numérique<text:tab/>84</text:a></text:p>
          <text:p text:style-name="P199"><text:a xlink:type="simple" xlink:href="#__RefHeading___Toc2314_27698709951" text:style-name="Index_20_Link" text:visited-style-name="Index_20_Link">La gestion de la dette et le coût de l’obsolescence<text:tab/>85</text:a></text:p>
          <text:p text:style-name="P199"><text:a xlink:type="simple" xlink:href="#__RefHeading___Toc9776_4125847080" text:style-name="Index_20_Link" text:visited-style-name="Index_20_Link">La dictature budgétaire<text:tab/>89</text:a></text:p>
          <text:p text:style-name="P199"><text:a xlink:type="simple" xlink:href="#__RefHeading___Toc2566_4125847080" text:style-name="Index_20_Link" text:visited-style-name="Index_20_Link">Les maquignons et les spywares<text:tab/>90</text:a></text:p>
          <text:p text:style-name="P199"><text:a xlink:type="simple" xlink:href="#__RefHeading___Toc8667_3199894321" text:style-name="Index_20_Link" text:visited-style-name="Index_20_Link">Pourquoi je n’ai plus confiance dans l’IT ?<text:tab/>94</text:a></text:p>
          <text:p text:style-name="P199"><text:a xlink:type="simple" xlink:href="#__RefHeading___Toc7875_137521599" text:style-name="Index_20_Link" text:visited-style-name="Index_20_Link">Le Shadow IT : artisanat ou bricolage ?<text:tab/>97</text:a></text:p>
          <text:p text:style-name="P199"><text:a xlink:type="simple" xlink:href="#__RefHeading___Toc4029_653162392" text:style-name="Index_20_Link" text:visited-style-name="Index_20_Link">L’agilité ou le retour en force de l’IT<text:tab/>100</text:a></text:p>
          <text:p text:style-name="P198"><text:a xlink:type="simple" xlink:href="#__RefHeading___Toc1780_11151780541" text:style-name="Index_20_Link" text:visited-style-name="Index_20_Link">C’est pas Sherwood, ici !<text:tab/>103</text:a></text:p>
          <text:p text:style-name="P199"><text:a xlink:type="simple" xlink:href="#__RefHeading___Toc2310_27698709951" text:style-name="Index_20_Link" text:visited-style-name="Index_20_Link">La mort de Robin des Bois<text:tab/>103</text:a></text:p>
          <text:p text:style-name="P199"><text:a xlink:type="simple" xlink:href="#__RefHeading___Toc7053_137521599" text:style-name="Index_20_Link" text:visited-style-name="Index_20_Link">Le retour de l’Artisanat<text:tab/>106</text:a></text:p>
          <text:p text:style-name="P199"><text:a xlink:type="simple" xlink:href="#__RefHeading___Toc8284_132914344" text:style-name="Index_20_Link" text:visited-style-name="Index_20_Link">Le coût de la donnée<text:tab/>112</text:a></text:p>
          <text:p text:style-name="P199"><text:a xlink:type="simple" xlink:href="#__RefHeading___Toc8286_132914344" text:style-name="Index_20_Link" text:visited-style-name="Index_20_Link">Ramener du sang nouveau<text:tab/>115</text:a></text:p>
          <text:p text:style-name="P199"><text:a xlink:type="simple" xlink:href="#__RefHeading___Toc6829_3564872834" text:style-name="Index_20_Link" text:visited-style-name="Index_20_Link">La dérive esclavagiste<text:tab/>118</text:a></text:p>
          <text:p text:style-name="P198"><text:a xlink:type="simple" xlink:href="#__RefHeading___Toc1606_1115178054%20Copie%203" text:style-name="Index_20_Link" text:visited-style-name="Index_20_Link">Un chef, c’est fait pour cheffer !<text:tab/>121</text:a></text:p>
          <text:p text:style-name="P199"><text:a xlink:type="simple" xlink:href="#__RefHeading___Toc1608_1115178054%20Copie%201" text:style-name="Index_20_Link" text:visited-style-name="Index_20_Link">Il ne suffit pas de suivre la recette<text:tab/>121</text:a></text:p>
          <text:p text:style-name="P199"><text:a xlink:type="simple" xlink:href="#__RefHeading___Toc8669_3199894321" text:style-name="Index_20_Link" text:visited-style-name="Index_20_Link">Démolir ses propres murs<text:tab/>124</text:a></text:p>
          <text:p text:style-name="P199"><text:a xlink:type="simple" xlink:href="#__RefHeading___Toc8671_3199894321" text:style-name="Index_20_Link" text:visited-style-name="Index_20_Link">Sans sponsor, ça donne quoi ?<text:tab/>128</text:a></text:p>
          <text:p text:style-name="P199"><text:a xlink:type="simple" xlink:href="#__RefHeading___Toc7088_1610056299" text:style-name="Index_20_Link" text:visited-style-name="Index_20_Link">Et si on arrêtait d’être sérieux ?<text:tab/>130</text:a></text:p>
          <text:p text:style-name="P198"><text:a xlink:type="simple" xlink:href="#__RefHeading___Toc1606_1115178054" text:style-name="Index_20_Link" text:visited-style-name="Index_20_Link">Pourquoi vouloir résister au changement ?<text:tab/>132</text:a></text:p>
          <text:p text:style-name="P199"><text:a xlink:type="simple" xlink:href="#__RefHeading___Toc1608_1115178054" text:style-name="Index_20_Link" text:visited-style-name="Index_20_Link">Est-ce une volonté ou un besoin ?<text:tab/>132</text:a></text:p>
          <text:p text:style-name="P199"><text:a xlink:type="simple" xlink:href="#__RefHeading___Toc1610_1115178054" text:style-name="Index_20_Link" text:visited-style-name="Index_20_Link">Un peu d’histoire<text:tab/>132</text:a></text:p>
          <text:p text:style-name="P199"><text:a xlink:type="simple" xlink:href="#__RefHeading___Toc1604_1115178054" text:style-name="Index_20_Link" text:visited-style-name="Index_20_Link"><text:soft-page-break/>À quoi sert toute cette préparation ?<text:tab/>133</text:a></text:p>
          <text:p text:style-name="P199"><text:a xlink:type="simple" xlink:href="#__RefHeading___Toc7090_1610056299" text:style-name="Index_20_Link" text:visited-style-name="Index_20_Link">C’était mieux avant !<text:tab/>134</text:a></text:p>
          <text:p text:style-name="P199"><text:a xlink:type="simple" xlink:href="#__RefHeading___Toc7092_1610056299" text:style-name="Index_20_Link" text:visited-style-name="Index_20_Link">Pourquoi je galère autant maintenant ?<text:tab/>135</text:a></text:p>
          <text:p text:style-name="P199"><text:a xlink:type="simple" xlink:href="#__RefHeading___Toc7094_1610056299" text:style-name="Index_20_Link" text:visited-style-name="Index_20_Link">Quel est mon cœur de métier ?<text:tab/>136</text:a></text:p>
          <text:p text:style-name="P199"><text:a xlink:type="simple" xlink:href="#__RefHeading___Toc7096_1610056299" text:style-name="Index_20_Link" text:visited-style-name="Index_20_Link">Pourquoi je devrais faire confiance à l’IT maintenant ?<text:tab/>137</text:a></text:p>
          <text:p text:style-name="P199"><text:a xlink:type="simple" xlink:href="#__RefHeading___Toc7098_1610056299" text:style-name="Index_20_Link" text:visited-style-name="Index_20_Link">Et mes collaborateurs, j’en fais quoi ?<text:tab/>138</text:a></text:p>
          <text:p text:style-name="P199"><text:a xlink:type="simple" xlink:href="#__RefHeading___Toc7100_1610056299" text:style-name="Index_20_Link" text:visited-style-name="Index_20_Link">Et pourquoi c’est encore à moi de faire les efforts ?<text:tab/>140</text:a></text:p>
          <text:p text:style-name="P199"><text:a xlink:type="simple" xlink:href="#__RefHeading___Toc7102_1610056299" text:style-name="Index_20_Link" text:visited-style-name="Index_20_Link">Et qu’est-ce qu’on risque à ne pas faire ?<text:tab/>141</text:a></text:p>
          <text:p text:style-name="P198"><text:a xlink:type="simple" xlink:href="#__RefHeading___Toc1612_1115178054" text:style-name="Index_20_Link" text:visited-style-name="Index_20_Link">Quelles sont les stratégies disponibles ?<text:tab/>143</text:a></text:p>
          <text:p text:style-name="P199"><text:a xlink:type="simple" xlink:href="#__RefHeading___Toc1614_1115178054" text:style-name="Index_20_Link" text:visited-style-name="Index_20_Link">Et d’abord pourquoi une approche stratégique ?<text:tab/>143</text:a></text:p>
          <text:p text:style-name="P199"><text:a xlink:type="simple" xlink:href="#__RefHeading___Toc4614_2514178521" text:style-name="Index_20_Link" text:visited-style-name="Index_20_Link">Panel représentatif des stratégies utilisables<text:tab/>144</text:a></text:p>
          <text:p text:style-name="P199"><text:a xlink:type="simple" xlink:href="#__RefHeading___Toc1602_1115178054" text:style-name="Index_20_Link" text:visited-style-name="Index_20_Link">Tout est dans l’organisation du service<text:tab/>161</text:a></text:p>
          <text:p text:style-name="P199"><text:a xlink:type="simple" xlink:href="#__RefHeading___Toc1602_11151780541" text:style-name="Index_20_Link" text:visited-style-name="Index_20_Link">Qu’est-ce qu’un manager, au fond ?<text:tab/>167</text:a></text:p>
          <text:p text:style-name="P198"><text:a xlink:type="simple" xlink:href="#__RefHeading___Toc1618_1115178054" text:style-name="Index_20_Link" text:visited-style-name="Index_20_Link">Et maintenant, que fait-on ?<text:tab/>169</text:a></text:p>
          <text:p text:style-name="P199"><text:a xlink:type="simple" xlink:href="#__RefHeading___Toc5807_463363166" text:style-name="Index_20_Link" text:visited-style-name="Index_20_Link">Redevenons sérieux pour un temps<text:tab/>169</text:a></text:p>
          <text:p text:style-name="P199"><text:a xlink:type="simple" xlink:href="#__RefHeading___Toc5809_463363166" text:style-name="Index_20_Link" text:visited-style-name="Index_20_Link">Ne pas remettre en cause les objectifs, mais la méthode et les messages<text:tab/>171</text:a></text:p>
          <text:p text:style-name="P199"><text:a xlink:type="simple" xlink:href="#__RefHeading___Toc4449_410582302" text:style-name="Index_20_Link" text:visited-style-name="Index_20_Link">Écouter d’abord<text:tab/>174</text:a></text:p>
          <text:p text:style-name="P199"><text:a xlink:type="simple" xlink:href="#__RefHeading___Toc5813_463363166" text:style-name="Index_20_Link" text:visited-style-name="Index_20_Link">Apporter de la valeur et regagner la confiance<text:tab/>178</text:a></text:p>
          <text:p text:style-name="P199"><text:a xlink:type="simple" xlink:href="#__RefHeading___Toc15754_4275570641" text:style-name="Index_20_Link" text:visited-style-name="Index_20_Link">Épurer les dettes<text:tab/>179</text:a></text:p>
          <text:p text:style-name="P199"><text:a xlink:type="simple" xlink:href="#__RefHeading___Toc5817_463363166" text:style-name="Index_20_Link" text:visited-style-name="Index_20_Link">Prendre le temps de changer<text:tab/>181</text:a></text:p>
          <text:p text:style-name="P199"><text:a xlink:type="simple" xlink:href="#__RefHeading___Toc15756_4275570641" text:style-name="Index_20_Link" text:visited-style-name="Index_20_Link">Apprendre à décommissionner<text:tab/>185</text:a></text:p>
          <text:p text:style-name="P199"><text:a xlink:type="simple" xlink:href="#__RefHeading___Toc4573_3306677465" text:style-name="Index_20_Link" text:visited-style-name="Index_20_Link">Dissiper les ombres<text:tab/>188</text:a></text:p>
          <text:p text:style-name="P199"><text:a xlink:type="simple" xlink:href="#__RefHeading___Toc36926_312545618" text:style-name="Index_20_Link" text:visited-style-name="Index_20_Link">Un nouveau plancher de verre<text:tab/>191</text:a></text:p>
          <text:p text:style-name="P199"><text:a xlink:type="simple" xlink:href="#__RefHeading___Toc36928_312545618" text:style-name="Index_20_Link" text:visited-style-name="Index_20_Link">Que savent vraiment les dirigeants ?<text:tab/>193</text:a></text:p>
          <text:p text:style-name="P199"><text:a xlink:type="simple" xlink:href="#__RefHeading___Toc36930_312545618" text:style-name="Index_20_Link" text:visited-style-name="Index_20_Link">Le coût de l’ignorance<text:tab/>196</text:a></text:p>
          <text:p text:style-name="P199"><text:a xlink:type="simple" xlink:href="#__RefHeading___Toc14111_3306677465" text:style-name="Index_20_Link" text:visited-style-name="Index_20_Link"><text:soft-page-break/>Et notre autruche dans tout ça ?<text:tab/>199</text:a></text:p>
        </text:index-body>
      </text:table-of-content>
      <text:h text:style-name="P216" text:outline-level="2"><text:bookmark-start text:name="_Toc131774386"/><text:bookmark-start text:name="__RefHeading___Toc1560_1115178054"/>Introduction<text:bookmark-end text:name="_Toc131774386"/><text:bookmark-end text:name="__RefHeading___Toc1560_1115178054"/></text:h>
      <text:p text:style-name="P6">Après plus de 20 ans de carrière dans ce qu’on appelait jadis « l’informatique », qui est devenu<text:span text:style-name="T176">e</text:span> ensuite « l’IT » et qu’on appelle maintenant « la Data », j’ai vécu la plupart des grandes révolutions dans les Grands Groupes du monde financier et j’ai pu assister à l’éternel combat entre les forces dites « progressistes » dont l’unique ambition est de faire évoluer la société, en amenant de nouveaux concepts et une volonté de jeter aux orties les anciennes habitudes, et de l’autre les simples employés à qui on demande d’adhérer de force à une Transformation qui ne va leur apporter que des désagréments en les bousculant dans le petit cocon de confort qu’ils s’étaient tranquillement construits depuis des années.</text:p>
      <text:p text:style-name="P6">C’est pour ces derniers que j’ai réalisé ce livre, en m’inspirant de ce que j’ai pu constater durant ces deux décennies dans différents cabinets de conseil alors que j’étais chargé justement de mettre en place ces différentes révolutions de palais.</text:p>
      <text:h text:style-name="P14" text:outline-level="3"><text:bookmark-start text:name="_Toc131774387"/><text:bookmark-start text:name="__RefHeading___Toc1562_1115178054"/>Ce livre n’est pas un manuel du changement<text:bookmark-end text:name="_Toc131774387"/><text:bookmark-end text:name="__RefHeading___Toc1562_1115178054"/></text:h>
      <text:p text:style-name="Standard"><text:span text:style-name="T1">Au contraire, il s’adresse à toutes les personnes des grosses entreprises (malheureusement, le travail dans les petites structures n’est pas assez dispersé et atomique pour appliquer les petites recettes que je </text:span><text:soft-page-break/><text:span text:style-name="T1">vais vous transmettre) qui ont trouvé un équilibre et une vraie valorisation dans le travail qu’ils effectuent actuellement et qui redoutent légitimement les nouvelles Transformations qui s’opèrent dans l’entreprise.</text:span></text:p>
      <text:p text:style-name="P6">En effet, malgré toutes les promesses du top management et la mise en place de soi-disant « accompagnement par le change management » (pour employer le jargon du moment), tout le monde ne peut pas sauter dans le train des réformes et retrouver une position intéressante dans la nouvelle organisation. Et c’est d’autant plus vrai lorsque les collaborateurs ont trouvé un réel confort et une vraie qualité de vie dans leurs occupations actuelles.</text:p>
      <text:h text:style-name="P14" text:outline-level="3"><text:bookmark-start text:name="_Toc131774388"/><text:bookmark-start text:name="__RefHeading___Toc1564_1115178054"/>Il ne faut pas sous-estimer la nécessité du confort<text:bookmark-end text:name="_Toc131774388"/><text:bookmark-end text:name="__RefHeading___Toc1564_1115178054"/></text:h>
      <text:p text:style-name="P6">Ainsi, si ces fameuses « zones de confort » correspondent presque toujours à des pans de l’entreprise où le rendement et la productivité sont faibles, elles représentent également des services et des directions dans lesquelles un vrai travail de qualité est réalisé, souvent au prix d’efforts constants et avec une expertise reconnue et spécifique.</text:p>
      <text:p text:style-name="P6">Il s’agit également très souvent d’endroits où sont réalisés des travaux importants, voire cruciaux, pour la société. Et sans la connaissance des sachants de ces services, c’est la survie même de la société qui est en jeu.</text:p>
      <text:p text:style-name="P6">On comprend alors qu’il est souvent indispensable pour ces opérationnels de créer ces fameuses « zones de confort » : elles représentent <text:soft-page-break/>également le moyen de s’assurer que les collaborateurs sont dans des conditions maîtrisées et stables pour réaliser ces travaux critiques, que personne d’autre ne sait réaliser.</text:p>
      <text:p text:style-name="P6">D’autant plus que le sous-investissement chronique dans une automatisation raisonnable ces dernières années, associé à un comportement inadapté de l’IT des Grands Groupes vis-à-vis des demandes expresses des métiers pressés par une pression réglementaire sans cesse croissante, ont forcé la plupart des services critiques à créer ces zones de savoir-faire artisanal et bien trop manuel, avec cette certitude qui s’est ancrée par l’expérience : pourquoi s’investir dans ces plans de Transformations pénibles et chronophages, alors qu’au final on arrive à faire bien mieux par nous-mêmes ?</text:p>
      <text:h text:style-name="P14" text:outline-level="3"><text:bookmark-start text:name="_Toc131774389"/><text:bookmark-start text:name="__RefHeading___Toc1566_1115178054"/>Ne pas mélanger Production et Transformation<text:bookmark-end text:name="_Toc131774389"/><text:bookmark-end text:name="__RefHeading___Toc1566_1115178054"/></text:h>
      <text:p text:style-name="P6">Il ne faut pas croire que les employés qui entrent dans les modes de résistance que je vais décrire dans ce document sont des réactionnaires de la plus belle eau, réfractaires à la nouveauté et au changement et qui attendent tranquillement la retraite.</text:p>
      <text:p text:style-name="P6">Non, la réalité est plus prosaïque : la plupart des services font de la résistance parce qu’ils n’ont tout simplement pas les moyens humains, opérationnels et techniques de mener de front des travaux critiques, avec des moyens technologiques dérisoires en regard de la criticité de leurs travaux, en même temps qu’une Transformation qui pose <text:soft-page-break/>généralement plus de questions qu’elle ne donne de réponses, pour des résultats incertains et avec des périodes « d’essuyage de plâtres » répétitives et épuisantes pour les équipes.</text:p>
      <text:p text:style-name="P6">De plus, la grande tendance de ces dernières années, après des réformes précédentes qui se sont inscrites dans des grands plans de Transformation pluriannuels et avec des budgets dédiés pharaoniques, est de réaliser maintenant le même type de réformes, aussi ambitieuses, mais avec des budgets réduits à la portion congrue.</text:p>
      <text:p text:style-name="P6">Et, comme toujours, on a inventé des mots pour faire passer la pilule : « on top » pour dire que ces nouvelles obligations s’inscrivent en plus des tâches normalement confiées au service et « Transformation permanente » pour dire que la normalité, c’est d’évoluer en continu. Bref, le changement c’est maintenant, mais c’est aussi demain et après-demain…</text:p>
      <text:h text:style-name="P14" text:outline-level="3"><text:bookmark-start text:name="_Toc131774390"/><text:bookmark-start text:name="__RefHeading___Toc1568_1115178054"/>De la dérision et de la tolérance<text:bookmark-end text:name="_Toc131774390"/><text:bookmark-end text:name="__RefHeading___Toc1568_1115178054"/></text:h>
      <text:p text:style-name="P6">Ainsi, après avoir côtoyé ces différents services au sein de mes multiples missions pour amener par la conviction, la démonstration, l’exemple… ces populations au changement, j’ai peu à peu pris conscience de leurs problèmes et de la raison de leurs réticences.</text:p>
      <text:p text:style-name="P6">J’ai maintenant quitté le conseil pour entrer justement dans un de ces Grands Groupes et nous sommes en train de mettre en place un nouveau plan de Transformation stratégique qui promet des lendemains qui chantent dans <text:span text:style-name="T150">cinq</text:span> ans, avec cette <text:soft-page-break/>épée de Damoclès constamment brandie par le top management : si on ne se transforme pas, les GAFAM vont nous bouffer tout cru.</text:p>
      <text:p text:style-name="P6">C’est peut-être vrai, mais ce n’est pas forcément le principal sujet de préoccupation des collaborateurs, entre la pandémie, l’inflation, le prix de l’énergie, les résultats scolaires des enfants, le prix de l’immobilier, les vacances à organiser, la voiture à changer, la fatigue des transports…</text:p>
      <text:p text:style-name="P6">Donc, <text:span text:style-name="T176">nous allons nous attacher</text:span> dans ce livre à présenter leur point de vue et leurs attentes. Mais on va aussi grossir le trait et ne pas hésiter à entrer dans la caricature, parce que certains managers sont des <text:span text:style-name="T176">parodies</text:span> vivantes de ce qui ne doit pas être fait.</text:p>
      <text:p text:style-name="P6">Et tous les exemples que je vais citer dans cet ouvrage sont vrais, malheureusement…</text:p>
      <text:p text:style-name="P230"/>
      <text:p text:style-name="P3"/>
      <text:p text:style-name="P3"/>
      <text:p text:style-name="P3"/>
      <text:p text:style-name="P3"/>
      <text:p text:style-name="P3"/>
      <text:p text:style-name="P39"><draw:frame draw:style-name="fr1" draw:name="Picture 4" text:anchor-type="as-char" svg:width="2.177cm" svg:height="0.743cm" draw:z-index="6"><draw:image xlink:href="Pictures/1000074400000AC70000038E4A54CC12.emf" xlink:type="simple" xlink:show="embed" xlink:actuate="onLoad" draw:mime-type="image/x-emf"/><draw:image xlink:href="Pictures/100000010000006800000022D63B1D0E.png" xlink:type="simple" xlink:show="embed" xlink:actuate="onLoad" draw:mime-type="image/png"/></draw:frame></text:p>
      <text:h text:style-name="P12" text:outline-level="1"><text:bookmark-start text:name="_Toc131774391"/><text:bookmark-start text:name="__RefHeading___Toc1570_1115178054"/>La politique de l’autruche<text:bookmark-end text:name="_Toc131774391"/><text:bookmark-end text:name="__RefHeading___Toc1570_1115178054"/></text:h>
      <text:p text:style-name="P3"/>
      <text:p text:style-name="P4"/>
      <text:p text:style-name="P3"/>
      <text:p text:style-name="P5"/>
      <text:p text:style-name="P40"><draw:custom-shape text:anchor-type="as-char" draw:z-index="1" draw:name="Forme1" draw:style-name="gr1" draw:text-style-name="P267" svg:width="1.19cm" svg:height="1.147cm"><text:p text:style-name="P218"><text:span text:style-name="T112">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3" text:outline-level="2"><text:bookmark-start text:name="__RefHeading___Toc1778_1115178054"/>Qu’est-ce que la politique de l’autruche ?<text:bookmark-end text:name="__RefHeading___Toc1778_1115178054"/></text:h>
      <text:h text:style-name="P14" text:outline-level="3"><text:bookmark-start text:name="_Toc131774392"/><text:bookmark-start text:name="__RefHeading___Toc1572_1115178054"/>Commençons par une définition<text:bookmark-end text:name="_Toc131774392"/><text:bookmark-end text:name="__RefHeading___Toc1572_1115178054"/></text:h>
      <text:p text:style-name="P6">Cette expression rappelle la légende selon laquelle les autruches s’enfouissent la tête dans le sable lorsqu’elles ont peur, ce qui leur évite de voir ce qui les menace. « Appliquer la politique de l’autruche » signifie donc que l’on refuse de voir le danger là où il est.</text:p>
      <text:h text:style-name="P14" text:outline-level="3"><text:bookmark-start text:name="_Toc131774393"/><text:bookmark-start text:name="__RefHeading___Toc1574_1115178054"/>Contextualisation dans l’entreprise<text:bookmark-end text:name="_Toc131774393"/><text:bookmark-end text:name="__RefHeading___Toc1574_1115178054"/></text:h>
      <text:p text:style-name="P6">Il est très important de ne pas chercher à voir le danger où il est, de peur de devoir être obligé de <text:span text:style-name="T242">l’affronter</text:span>.</text:p>
      <text:p text:style-name="P128"><text:span text:style-name="T1">Et cela s’applique à tous les niveaux de l’entreprise : depuis l’opérationnel qui réalise un travail abrutissant et sans valeur ajoutée, parce qu’on lui a demandé de le faire, jusqu’au chef d’entreprise qui ne veut pas se rendre compte des difficultés qu’il a véritablement à gérer, en passant par tous les différents acteurs internes et externes dont le métier est de faire évoluer cette même </text:span><text:soft-page-break/><text:span text:style-name="T1">entreprise. Même si, en général, la menace principale vient toujours de l’extérieur : soit par un nouvel arrivant qui pose des questions embarrassantes, soit par une contrainte externe qui oblige à « soulever le capot » ou « regarder sous le tapis », selon les expressions consacrées de ces empêcheurs de dormir en rond.</text:span></text:p>
      <text:p text:style-name="P6">On peut même envisager la nomination d’un nouveau dirigeant ou responsable de service dont la mission est justement de « faire le ménage » ou « donner un coup de pied dans la fourmilière ». Ces jeunes roquets prétentieux sont également à mettre au pas, sous peine de les voir vouloir appliquer de nouvelles méthodes de management et d’animation d’équipe soi-disant révolutionnaires : en fait, ils veulent juste pomper toute votre connaissance et votre expertise pour pouvoir faire faire votre travail par d’autres !</text:p>
      <text:p text:style-name="P6">Et cette volonté de tout chambouler peut s’étendre à l’entreprise dans son ensemble : on parle alors de Transformation. Et dans ce cas, tous les services et directions impliquées dans cette Transformation sont à éviter comme la peste : ils combinent fréquemment une incorrection certaine en forçant à faire des travaux incompatibles avec le bien-être du service à une ténacité pathologique qui oblige à déployer des trésors d’ingéniosité pour conserver la quiétude associée à un oubli salvateur de la hiérarchie. Il est très désagréable d’être obligé de déterrer des cadavres tranquillement enfouis depuis des temps immémoriaux : notre principale attention doit être focalisée sur le respect à accorder à nos morts.</text:p>
      <text:p text:style-name="P6"/>
      <text:h text:style-name="P14" text:outline-level="3"><text:bookmark-start text:name="__RefHeading___Toc3695_2546550821"/><text:soft-page-break/>Pourquoi parler de Transformation actuellement ?<text:bookmark-end text:name="__RefHeading___Toc3695_2546550821"/></text:h>
      <text:p text:style-name="P6">Mais d’ailleurs, en quoi consiste réellement une Transformation ? Est-ce qu’il <text:span text:style-name="T176">s</text:span>’agit réellement de réformer une entreprise de fond en comble ? Ou est-ce qu’il s’agit seulement de communiquer sur la volonté de changer ? Est-il seulement possible de changer ce genre d’entreprise ? Et pour quoi faire ? Et si c’est vraiment utile, comment fait-on une transformation ?</text:p>
      <text:p text:style-name="P126"><text:span text:style-name="T1">Ce sont des questions un peu triviales, mais qu’on ne pose pas fréquemment lors de ces Transformations. Et surtout pas aux personnes qui les subissent. Parce qu’on les oublie souvent. Mais j’ai envie de parler d’eux et de la façon dont ils peuvent s’opposer à ces Transformations parce que, même si l’entreprise n’est pas une démocratie comme on nous le répète à tire-larigot, ce n’est pas non plus un endroit où il est normal de souffrir : les Grands Groupes présentent des taux de taux de burn-outs et de dépressions complètement hallucinants : après le COVID, 38 % des managers étaient en détresse psychologique, tandis que 18 % d’entre eux se trouvaient en burn-out sévère</text:span><text:span text:style-name="T1"><text:note text:id="ftn1" text:note-class="footnote"><text:note-citation>1</text:note-citation><text:note-body><text:p text:style-name="P10">— “Observatoire mensuel des situations de travail”: étude de perception Harris Interactive pour Malakoff Humanis réalisée chaque mois entre février et juin 2021 auprès de 2 000 salariés représentatifs du secteur privé, soit 10 000 salariés interrogés sur la période – Recueil en ligne.</text:p><text:p text:style-name="P10">— Étude « Santé mentale et risques psychosociaux des salariés”, mai 2021 : étude Harris Interactive pour Malakoff Humanis réalisée auprès de 1 500 salariés du secteur privé – Recueil en ligne du 28 avril au 10 mai 2021.</text:p></text:note-body></text:note></text:span><text:span text:style-name="T1">.</text:span></text:p>
      <text:p text:style-name="P126"><text:soft-page-break/><text:span text:style-name="T1">La situation a encore empiré depuis, car après ce type de crise, la majorité des secteurs ont considéré qu’il était nécessaire de réformer leur mode de fonctionnement pour pouvoir plus facilement encaisser ce genre de crise. D’où un plan généralisé de Transformations, en particulier dans le monde de la Finance. Cet ouvrage va essayer de vous présenter comment se passe en réalité ce genre de Transformation et comment </text:span><text:span text:style-name="T14">elle</text:span><text:span text:style-name="T1"> impacte les salariés de ces entreprises.</text:span></text:p>
      <text:p text:style-name="P6">Et les salariés paient toujours les conséquences des erreurs et des décisions hasardeuses de leurs dirigeants. Les dirigeants fautifs, rarement. Alors, pourquoi veulent-ils transformer leurs entreprises ?</text:p>
      <text:p text:style-name="P231"/>
      <text:p text:style-name="P40"><draw:custom-shape text:anchor-type="as-char" draw:z-index="7" draw:name="Forme2" draw:style-name="gr1" draw:text-style-name="P267" svg:width="1.19cm" svg:height="1.147cm"><text:p text:style-name="P218"><text:span text:style-name="T112">2</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3" text:outline-level="2"><text:bookmark-start text:name="_Toc131774394"/><text:bookmark-start text:name="__RefHeading___Toc1576_1115178054"/>Pourquoi les entreprises cherchent toujours à se transformer ?<text:bookmark-end text:name="_Toc131774394"/><text:bookmark-end text:name="__RefHeading___Toc1576_1115178054"/></text:h>
      <text:h text:style-name="P14" text:outline-level="3"><text:bookmark-start text:name="__RefHeading___Toc1721_2769870995"/>Ne pas cracher dans la soupe<text:bookmark-end text:name="__RefHeading___Toc1721_2769870995"/></text:h>
      <text:p text:style-name="P6">En préambule, je voudrais clairement expliquer ma position par rapport à ces Transformations si fréquentes et si structurantes dans les grandes multinationales : je ne suis pas ici pour faire un jugement de valeurs, pour démontrer de façon magistrale si c’est nécessaire ou pas, ou même pour proposer une nouvelle approche révolutionnaire pour aborder le sujet.</text:p>
      <text:p text:style-name="P6">Je n’ai pas cette prétention. Je ne vois pas pourquoi j’y arriverais mieux que toutes les personnes qui sont passées avant moi. Et, pour me regarder dans la glace, si j’étais aussi génial, je n’avais qu’à également proposer ces solutions plus tôt, lors de toutes les autres Transformations auxquelles j’ai participé.</text:p>
      <text:p text:style-name="P6">En plus, ce serait gravement cracher dans la soupe de ma part, vu que ces différents travaux m’ont permis de gagner correctement ma vie <text:span text:style-name="T176">ces</text:span> <text:soft-page-break/>dernières années et de subvenir aux besoins de ma famille.</text:p>
      <text:p text:style-name="P6">Je n’ai pas de recette miracle pour réussir. Je ne sais pas non plus s’il faut condamner ou encenser ces Transformations. Sincèrement, après en avoir fait pendant plus de dix ans, je ne sais toujours pas s’il faut vraiment faire des grandes Transformations en mode bulldozer ou s’il faut faire évoluer les choses progressivement, à hauteur d’homme.</text:p>
      <text:p text:style-name="P6">Les Grands Groupes accumulent une telle inertie structurelle que changer des habitudes mineures peut prendre des mois, voire des années ! Dans mon entreprise actuelle, plus de 95 % de la communication interne se faisait par e-mail. Il a été décidé de passer à un outil de messagerie instantanée, histoire d’améliorer la communication avec de nouvelles fonctionnalités et également de limiter l’empreinte carbone. Deux ans plus tard, la majorité de la communication se fait toujours par mail, malgré une adoption tout à fait correcte du nouvel outil : encore une fois, le nouveau n’a pas remplacé l’ancien, il s’est juste créé une nouvelle niche à côté… parce que les process n’ont pas été modifiés pour prendre en compte ce nouvel outil, tout simplement.</text:p>
      <text:p text:style-name="P6">Donc, avec ce genre de contrainte, il est certainement nécessaire de passer par des mouvements de très grande ampleur pour avoir la force de frappe et la puissance nécessaire pour faire évoluer les choses ; d’où les fameuses Transformations.</text:p>
      <text:p text:style-name="P6"><text:soft-page-break/>Je ne remets donc pas en cause la nécessité des Transformations. Mais je vais juste rappeler ou présenter la façon dont ces Transformations sont conduites, quand la politique et les impératifs de communication sont plus importants que la vérité des résultats et les conséquences pour les personnes qui travaillent dans ces Grands Groupes. Certes, les salariés d’un groupe financier du CAC40 ne sont pas les plus mal lotis parmi les salariés français, mais ils sont soumis à de très grosses pressions, qui augmentent de façon géométrique lors de ces Transformations.</text:p>
      <text:p text:style-name="P6">C’est surtout un nouvel éclairage que je veux présenter, pour qu’on n’oublie pas que ces Transformations, ce sont des hommes et des femmes qui les font, mais aussi des hommes et des femmes qui les subissent, parce que d’autres personnes ont décidé de les déclencher, avec plein de prétextes plus fumeux les uns que les autres.</text:p>
      <text:h text:style-name="P14" text:outline-level="3"><text:bookmark-start text:name="_Toc131774395"/><text:bookmark-start text:name="__RefHeading___Toc1578_1115178054"/>La pression du marché et des actionnaires<text:bookmark-end text:name="_Toc131774395"/><text:bookmark-end text:name="__RefHeading___Toc1578_1115178054"/></text:h>
      <text:p text:style-name="P6">En général, c’est l’explication qui est mise en avant, avec une emphase maximale, du genre : « s’adapter ou mourir » !</text:p>
      <text:p text:style-name="P6">Il est vrai que les grosses entreprises sont des dinosaures et les lois de l’évolution n’ont pas fait de cadeau à nos prédécesseurs sur cette planète : comme pour les dinosaures, il faut un temps certain pour que l’information comme quoi la queue vient d’être boulottée atteigne le cerveau.</text:p>
      <text:p text:style-name="P6">Et il est également bénéfique que tout service, toute direction, soit régulièrement bousculé ou <text:soft-page-break/>challengé pour éviter que la routine s’installe, avec ses supposées mauvaises habitudes.</text:p>
      <text:p text:style-name="P6">Enfin, c’est ce que tout le monde nous affirme. Et tout le monde, c’est surtout ceux qui veulent faire évoluer les choses.</text:p>
      <text:p text:style-name="P6">La tendance naturelle d’une part majoritaire de l’humanité, ça serait plutôt de rechercher le confort et la routine, gages de sécurité et de calme : vu les conditions de stress permanentes dans lesquelles nombre de ces services vivent quotidiennement, se mettre un peu en retrait permet surtout de se concentrer sur les tâches à effectuer.</text:p>
      <text:p text:style-name="P6">C’est criant pour tous les services en tension, mais c’est également vrai à moindre mesure pour les services qui accomplissent des tâches routinières et répétitives : dans ces services, comme pour toute usine où une partie du personnel travaille à la chaîne, les employés cherchent rarement à « faire carrière » ou à révolutionner leur activité tous les jours. Ils veulent juste faire leur job, pointer à l’arrivée et au départ et qu’une paie correcte tombe tous les mois sur leur compte en banque.</text:p>
      <text:p text:style-name="P6">On est assez loin des messages portés par le top management : d’où un décalage certain dans les aspirations et dans la motivation pour embarquer dans cette Transformation imposée…</text:p>
      <text:h text:style-name="Heading_20_3" text:outline-level="3"><text:bookmark-start text:name="_Toc131774396"/><text:bookmark-start text:name="__RefHeading___Toc1580_1115178054"/><text:soft-page-break/><text:span text:style-name="T1">La menace des GAFAM</text:span><text:bookmark-end text:name="_Toc131774396"/><text:span text:style-name="T1"><text:note text:id="ftn2" text:note-class="footnote"><text:note-citation>2</text:note-citation><text:note-body><text:p text:style-name="P10">Google, Amazon, Facebook, Apple, Microsoft</text:p></text:note-body></text:note></text:span><text:bookmark-end text:name="__RefHeading___Toc1580_1115178054"/></text:h>
      <text:p text:style-name="P3">Les GAFAM sont devenus rapidement nos nouveaux meilleurs ennemis, avec deux rôles complètement opposés et pourtant parfaitement assumés :</text:p>
      <text:list text:style-name="WWNum4">
        <text:list-item>
          <text:p text:style-name="P225">Des partenaires incontournables pour les technologies qu’ils nous apportent :</text:p>
          <text:list>
            <text:list-item>
              <text:p text:style-name="P225">Microsoft (avec Microsoft Windows qui équipe la totalité des postes de travail des collaborateurs et une bonne partie des serveurs, Microsoft Office utilisé quotidiennement par tous pour les activités mail et bureautique et Microsoft Azure pour les services Cloud)</text:p>
            </text:list-item>
            <text:list-item>
              <text:p text:style-name="P225">Amazon (via essentiellement Amazon Web Services)</text:p>
            </text:list-item>
            <text:list-item>
              <text:p text:style-name="P225">Google (via Google Cloud Platform, Google Chrome, son moteur de recherche et de nombreux services en ligne)</text:p>
            </text:list-item>
            <text:list-item>
              <text:p text:style-name="P225">…</text:p>
            </text:list-item>
          </text:list>
        </text:list-item>
        <text:list-item>
          <text:p text:style-name="P225">Des ennemis potentiels cachés, vicieux et pervers, tapis dans l’ombre pour nous dépouiller de notre savoir-faire et prendre notre place en un claquement de doigts dès qu’ils l’auront décidé, dans une sorte de « grand remplacement » numérique.</text:p>
        </text:list-item>
      </text:list>
      <text:p text:style-name="P6">Donc, le seul moyen de se libérer de leur menace et de leur emprise, c’est de faire ce qu’ils font, pour qu’ils ne puissent plus prendre notre place. C’est simple et beau, comme réflexion. Et d’une logique implacable.</text:p>
      <text:p text:style-name="P6"><text:soft-page-break/>Et aussi, on va faire du Cloud et de l’IA. Super important, le Cloud et l’IA. Tous les cabinets de conseil en parlent et les concurrents ont l’air de bien avancer sur le sujet…</text:p>
      <text:p text:style-name="P6">… par contre, étant donné qu’on ne sait pas faire du Cloud et de l’IA tous seuls, on va lancer cette nouvelle Transformation en se basant sur les technologies de Cloud et d’IA proposées par les GAFAM : ce sont les meilleures sur le marché, et les moins chères !</text:p>
      <text:p text:style-name="P6">Voilà exactement comment se définit actuellement une stratégie d’entreprise autour de la dépendance aux GAFAM…</text:p>
      <text:h text:style-name="Heading_20_3" text:outline-level="3"><text:bookmark-start text:name="_Toc131774398"/><text:bookmark-start text:name="__RefHeading___Toc1582_1115178054"/><text:span text:style-name="T1">Le syndrome d’hubris</text:span><text:bookmark-end text:name="_Toc131774398"/><text:span text:style-name="T1"><text:note text:id="ftn3" text:note-class="footnote"><text:note-citation>3</text:note-citation><text:note-body><text:p text:style-name="P10">Le syndrome d’hubris est un état psychologique caractérisé par un excès de confiance en soi et une arrogance excessive. Pour un chef d’entreprise multinationale, cela peut se traduire par une conviction inébranlable en sa propre capacité à réussir et à prendre des risques démesurés, au point de perdre tout sens de la réalité et de prendre des décisions dangereuses pour l’entreprise. Cela peut conduire à des comportements imprudents et à des erreurs de jugement catastrophiques.</text:p></text:note-body></text:note></text:span><text:bookmark-end text:name="__RefHeading___Toc1582_1115178054"/></text:h>
      <text:p text:style-name="P6">C’est un phénomène qui est souvent sous-estimé, mais qui est pourtant un moteur essentiel des grandes Transformations dans les Grands Groupes : la volonté de laisser une marque dans l’Histoire.</text:p>
      <text:p text:style-name="P6">Un dirigeant de grande société multinationale du CAC40 n’a pas atteint son poste par hasard : c’est en général l’aboutissement d’un parcours de toute <text:soft-page-break/>une vie, porté par des compétences intellectuelles exceptionnelles, une vision et une force de travail hors norme. Dans une entreprise française, vu notre mode de sélection au diplôme, cela est souvent associé à l’appartenance à un sérail particulier (X, HEC, ENA…) et éventuellement à une certaine culture de l’entre-soi élitiste autour de loges ou clubs très sélectifs.</text:p>
      <text:p text:style-name="P6">Bref, on ne recrute pas et on ne place pas ce genre de personne à la tête de ce type d’entreprise suivant les mêmes critères qu’on choisit une caissière ou un agent de sécurité. Et ces individus le savent. Ils en sont même souvent persuadés. Et leur parcours les a souvent confortés dans cette idée qu’ils étaient plus compétents, plus intelligents, plus décisifs que les autres.</text:p>
      <text:p text:style-name="P6">Et c’est certainement vrai dans leur domaine d’excellence et ce pourquoi ils ont été choisis. Mais, une fois arrivé tout en haut de la pyramide, on ne peut plus monter. Et on sait qu’on devra laisser la place un jour ou l’autre, soit parce qu’une nouvelle pépite sera suffisamment brillante pour briguer sa place, soit parce que la limite d’âge arrive : on arrive rarement à ce genre de poste à 30 ans…</text:p>
      <text:p text:style-name="P6">Donc, que peut faire un nouveau Grand Chef pour laisser sa marque ? Au final, il ne peut pas faire grand-chose : ces structures sont tellement énormes que leur inertie les rend très difficiles à manœuvrer. Et c’est pour ça que la plupart se lancent dans un grand Plan de Transformation censé révolutionner l’entreprise et la rendre plus agile, plus réactive et accessoirement améliorer suffisamment ses résultats pour que les actionnaires <text:span text:style-name="T176">leur </text:span>donnent carte blanche.</text:p>
      <text:p text:style-name="P6"><text:soft-page-break/>À ce titre, il y a une blague qui circule dans les Grands Groupes et qui est assez significative de cet état d’esprit : la blague des trois enveloppes.</text:p>
      <text:p text:style-name="P19">Un PDG vient de quitter l’entreprise et a été remplacé par un nouveau pontife énarque et golfeur émérite.</text:p>
      <text:p text:style-name="P19">Lors de la passation de consignes, le sortant confie trois enveloppes en guise de recommandations numérotées de 1 à 3 (à n’ouvrir qu’en cas d’absolue nécessité) !</text:p>
      <text:p text:style-name="P19">Le Nouveau, prenant à bras-le-corps ses nouvelles fonctions depuis déjà un an, bute contre certains blocages dans l’Entreprise et ne trouve pas de parade !</text:p>
      <text:p text:style-name="P19">Il se souvient des trois enveloppes et ouvre l’enveloppe n°1 où il est écrit de façon laconique : « Mets tout sur mon dos ».</text:p>
      <text:p text:style-name="P19">Le Nouveau commence à mettre sur le dos de son prédécesseur toutes les failles organisationnelles et ne cesse à tout bout de champ de critiquer la gestion antérieure, cause de tous les problèmes !</text:p>
      <text:p text:style-name="P19">Une autre année est passée et toujours rien de nouveau de la part du Nouveau en matière d’amélioration des résultats de l’Entreprise.</text:p>
      <text:p text:style-name="P19">Il reçoit un avertissement du Conseil d’Administration pour apporter de nouvelles améliorations et augmenter les dividendes versés aux actionnaires.</text:p>
      <text:p text:style-name="P19">Il ouvre l’enveloppe n°2 dans laquelle il est recommandé de « Lancer un Plan de Transformation ».</text:p>
      <text:p text:style-name="P19"><text:soft-page-break/>Il fait valoir l’idée d’une refonte de l’organisation qui nécessitera au moins deux ans de travail… Proposition acceptée par le Conseil d’Administration et les actionnaires !</text:p>
      <text:p text:style-name="P19">Deux ans après… aucune amélioration !</text:p>
      <text:p text:style-name="P19">Il ouvre l’enveloppe n°3 en espérant trouver la solution finale et là est écrit,… « Prépare trois enveloppes ».</text:p>
      <text:p text:style-name="P6"/>
      <text:p text:style-name="P6">Ayant navigué longtemps d’un Groupe à l’autre, j’ai peur que cette blague ne soit en fait qu’une histoire vraie…</text:p>
      <text:p text:style-name="P232"/>
      <text:p text:style-name="P40"><draw:custom-shape text:anchor-type="as-char" draw:z-index="9" draw:name="Forme3" draw:style-name="gr1" draw:text-style-name="P267" svg:width="1.19cm" svg:height="1.147cm"><text:p text:style-name="P218"><text:span text:style-name="T112">3</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3" text:outline-level="2"><text:bookmark-start text:name="_Toc131774403"/><text:bookmark-start text:name="__RefHeading___Toc1584_1115178054"/>Quels sont les résultats habituels d’une Transformation ?<text:bookmark-end text:name="_Toc131774403"/><text:bookmark-end text:name="__RefHeading___Toc1584_1115178054"/></text:h>
      <text:h text:style-name="P14" text:outline-level="3"><text:bookmark-start text:name="__RefHeading___Toc1693_1115178054"/>Le sacrifice du messager<text:bookmark-end text:name="__RefHeading___Toc1693_1115178054"/></text:h>
      <text:p text:style-name="P20">Il faudrait être incroyablement naïf ou complètement déconnecté de la réalité pour croire qu’une Transformation se passe sans à-coup, sans surprise ou sans accident. Shit happens. Et plus la société est grosse, plus la Transformation est ambitieuse, plus le risque que ça merde quelque part est avéré. Murphy rules.</text:p>
      <text:p text:style-name="P20">Maintenant, le Plan de Transformation est devenu un enjeu essentiel de l’entreprise. Dans la plupart des cas, des Directions de la Transformation sont créées, qui peuvent rassembler des milliers de collaborateurs. La locomotive de la Transformation est lancée sur les rails du Progrès. Rien ne doit l’arrêter !</text:p>
      <text:p text:style-name="P126"><text:span text:style-name="T7">Tous ces messages positivistes sont consciencieusement assénés et répétés de façon à ce que ça devienne un mantra structurel dans l’entreprise. Et tout ça dans une ambiance de </text:span><text:soft-page-break/><text:span text:style-name="T7">démocratie africaine efficacement imposée : tout le monde a le droit d’être d’accord avec ce que le Chef a décidé. La part de la dissidence est également clairement définie : ceux qui ne sont pas en accord avec le Chef sont libres de partir. Ou, comme déjà entendu dans un COMEX</text:span><text:span text:style-name="T7"><text:note text:id="ftn4" text:note-class="footnote"><text:note-citation>4</text:note-citation><text:note-body><text:p text:style-name="P10">Un COMEX est un comité exécutif, qui est généralement l’organe décisionnel suprême d’une entreprise ou d’une organisation. Il est composé des membres les plus hauts placés de l’entreprise, tels que le PDG, le directeur financier, le directeur des ressources humaines et d’autres hauts dirigeants, et est responsable de la gestion globale de l’entreprise.</text:p></text:note-body></text:note></text:span><text:span text:style-name="T7">, par le DG en exercice : « Tous ceux qui ne soutiendraient pas cette orientation n’ont pas leur place à ce Comité ».</text:span></text:p>
      <text:p text:style-name="P20">Dans ce genre d’ambiance conviviale, joviale et bon enfant, on comprend qu’il devient délicat d’annoncer au Grand Chef qu’il y a quelques grains de sable dans le bel engrenage qu’il a pensé et que la machine est en panne. Surtout si cette panne est directement ou indirectement due à des décisions un peu hâtives ou inconsidérées du Lider Maximo ou de ses apôtres. Ou pire, si on se rend compte que les choix faits sont tout bonnement illégaux, ce qui arrive plus souvent qu’on ne croît dans le monde très régulé de la Finance.</text:p>
      <text:p text:style-name="P20">Comment naviguer dans ces eaux dangereuses quand on est dans les strates du management intermédiaire et qu’on doit rendre compte à ces déités toutes puissantes ? Il est forcément dangereux de dire la vérité toute nue : il est facile de prendre une balle perdue à ce moment-là et il ne faut pas croire que la tradition antique d’exécuter le porteur de mauvaise nouvelle a disparu.</text:p>
      <text:p text:style-name="P37"><text:soft-page-break/></text:p>
      <text:p text:style-name="P20">C’est bien plus rapide et efficace d’effacer la faute et le messager dans un même mouvement. Et ça a en plus le mérite de faire un exemple. Tant pis si le fautif n’est pas inquiété.</text:p>
      <text:p text:style-name="P20">Les survivants comprennent rapidement qu’il ne leur reste que deux alternatives : soit faire avancer le projet coûte que coûte, en ne s’embarrassant pas de passer éventuellement par la « bande d’arrêt d’urgence » et en reléguant les problèmes juridiques à plus tard, par exemple ; soit simplifier le problème en ne remontant plus aucune mauvaise nouvelle. Jamais. En aucun cas.</text:p>
      <text:p text:style-name="P20">C’est la solution la plus communément adoptée instinctivement par tous, avec plus ou moins de bonheur suivant la capacité politique du messager : certains phénomènes arrivent à monter tranquillement tous les échelons un à un, sans jamais dire la vérité ni résoudre les problèmes et sont souvent considérés comme des personnes de valeur exceptionnelle : en effet, il suffit qu’on leur confie les rênes pour que les projets les plus complexes se déroulent sans aucun accroc ! Quant à la présentation des résultats réels, tous les animaux politiques savent que ce n’est qu’une question d’éclairage…</text:p>
      <text:h text:style-name="P14" text:outline-level="3"><text:bookmark-start text:name="__RefHeading___Toc1695_1115178054"/>La dictature du slider<text:bookmark-end text:name="__RefHeading___Toc1695_1115178054"/></text:h>
      <text:p text:style-name="P20">Et pour éclairer habilement, rien de mieux qu’un bon Powerpoint !</text:p>
      <text:p text:style-name="P20">Le slide Powerpoint est l’alpha et l’omega d’une communication maîtrisée : c’est l’arme ultime <text:soft-page-break/>de tous les cabinets de conseil et l’accessoire indispensable à une Transformation réussie.</text:p>
      <text:p text:style-name="P20">Et l’artisan suprême de cette réussite, c’est le slider, ou le fabricant de slide. Tout le monde dispose de Powerpoint sur son ordinateur de bureau, mais peu de personnes peuvent se vanter d’être un vrai slider. De même que tout le monde utilise Word, mais combien sont capables de s’en servir pour gagner un prix Goncourt ?</text:p>
      <text:p text:style-name="P20">Et la qualité d’un bon slider est de mettre en forme les informations qu’on lui dit de transmettre. En favorisant largement la forme sur le fond : plus c’est joli, mieux c’est. Formaliser un slide, c’est surtout limiter au maximum le nombre de mots en favorisant le côté graphique et l’impact visuel, afin de « concentrer le discours ».</text:p>
      <text:p text:style-name="P20">Malheureusement, la langue française est assez bavarde et il existe une limite au nombre de mots qu’on peut retirer d’un message en conservant le niveau d’information nécessaire. D’autant plus, s’il y a un problème complexe à expliquer. Il est beaucoup plus simple de dire que tout va bien. En plus, on peut résumer ça en mettant « OK ». Ça ne prend pas de place sur le slide et c’est conforme à la démarche précédente de n’annoncer que des bonnes nouvelles.</text:p>
      <text:p text:style-name="P20">Un bon slider est rare et c’est globalement la compétence principale des consultants qui sont passés par les cabinets de conseil dont on parlait plus haut : en général, on reconnaît un ancien consultant au fait que c’est un bon slider. Je le sais parce que c’est mon cas et qu’on me l’a déjà dit.</text:p>
      <text:p text:style-name="P20"><text:soft-page-break/>Mais je n’en suis pas très fier : faire une belle mise en page, dessiner de belles icônes et utiliser des mots justes n’a jamais résolu un problème. A fortiori quand le joli slide réalisé ne présente même pas le problème…</text:p>
      <text:p text:style-name="P20">Cette tendance est tellement ancrée dans les mœurs et dans les entreprises qu’on peut juger à quel public s’adresse tel type de document Powerpoint au premier coup d’œil, en fonction du degré de sophistication graphique et du nombre de mots dans le document : plus c’est joli et moins il y a de mots, plus ça va taper haut dans la hiérarchie !</text:p>
      <text:p text:style-name="P20">Forcément, tout ce travail de préparation a un coût : la préparation d’un support d’une vingtaine de slides pour un COMEX ou un Comité Stratégique peut mobiliser jusqu’à une dizaine de personnes à temps plein pendant une quinzaine de jours…</text:p>
      <text:p text:style-name="P20">Et tout ça pour arriver à des rapports Aspartame : complètement édulcorés !</text:p>
      <text:h text:style-name="P14" text:outline-level="3"><text:bookmark-start text:name="__RefHeading___Toc1697_1115178054"/>Les indicateurs pastèques<text:bookmark-end text:name="__RefHeading___Toc1697_1115178054"/></text:h>
      <text:p text:style-name="P126"><text:span text:style-name="T7">Pour continuer sur la meilleure façon de remonter exclusivement des bonnes nouvelles à sa hiérarchie, il ne faut pas non plus oublier les informations et les indicateurs que doivent présenter ces slides : dans une société moderne et bien gérée, le pilotage se doit d’être basé sur des indicateurs objectifs et mesurables, les KPI</text:span><text:span text:style-name="T7"><text:note text:id="ftn5" text:note-class="footnote"><text:note-citation>5</text:note-citation><text:note-body><text:p text:style-name="P10">KPI signifie « Key Performance Indicator » ou indicateur clé de performance en français. C’est une mesure quantifiable utilisée pour évaluer l’efficacité d’une entreprise ou d’un processus dans la réalisation de ses objectifs.</text:p></text:note-body></text:note></text:span><text:span text:style-name="T7"> ».</text:span></text:p>
      <text:p text:style-name="P20"><text:soft-page-break/>Tout l’art du bon communicant est de définir et de faire adopter des indicateurs qui ne mesurent que des choses sans danger : ainsi, au lieu de mesurer le taux d’adoption d’une nouvelle méthode ou d’un nouvel outil pour chacun des services de l’entreprise, qui décrit une vraie notion de tendance et de progression si c’est comparé d’une période à l’autre, on peut tout aussi bien mesurer le nombre de formations et de sensibilisations suivies sur la nouvelle organisation. Ce n’est pas parce que les collaborateurs ont assisté à une présentation collective de <text:span text:style-name="T123">vingt minutes</text:span> qu’ils vont forcément s’impliquer ensuite dans la Transformation.</text:p>
      <text:p text:style-name="P20">Mais c’est ce que certains vont faire croire en créant ce genre d’indicateurs faussés ou indicateurs pastèques. Comme le fruit qui leur a donné leur nom, ces indicateurs sont verts à l’extérieur, rouges à l’intérieur et possèdent même quelquefois quelques grains noirs indigestes à l’intérieur…</text:p>
      <text:p text:style-name="P20">En général, du fait de la simplification montante de l’information déjà évoquée, les <text:span text:style-name="T151">quatre</text:span> ou <text:span text:style-name="T151">cinq</text:span> indicateurs finaux de pilotage d’une entreprise présentés aux dirigeants sont issus de la concaténation et l’agrégation d’indicateurs de plus bas niveau.</text:p>
      <text:p text:style-name="P20">S’il y a quelques indicateurs pastèques dans ces indicateurs intermédiaires et que le présentateur est habile, tout le monde n’y voit que du feu.</text:p>
      <text:h text:style-name="P14" text:outline-level="3"><text:bookmark-start text:name="__RefHeading___Toc1699_1115178054"/>Le plancher de verre<text:bookmark-end text:name="__RefHeading___Toc1699_1115178054"/></text:h>
      <text:p text:style-name="P126"><text:span text:style-name="T7">Une conséquence pittoresque de cette omniprésence du slide sans sucre </text:span><text:span text:style-name="T8">ni</text:span><text:span text:style-name="T7"> graisse ajoutée, </text:span><text:soft-page-break/><text:span text:style-name="T7">c’est que ça entraîne des inversions de paradigmes historiques dans les entreprises, en particulier dans les entreprises financières.</text:span></text:p>
      <text:p text:style-name="P20">Traditionnellement, les cadres dirigeants des entreprises financières, eux-mêmes financiers pur beurre, disposaient, pour définir les orientations stratégiques de leurs entreprises, d’informations confidentielles et sélectives par leur réseau qui leur permettaient de prendre des décisions éclairées.</text:p>
      <text:p text:style-name="P20">Tant que ces pratiques restent dans le cadre de la légalité, il est tout à fait normal que les dirigeants soient informés au mieux des intérêts de leur entreprise. Des milliers d’emplois sont en jeu et si ce réseau, formel ou informel existe, c’est qu’il a fait ses preuves dans l’aide qu’il apporte à la bonne gestion de l’entreprise.</text:p>
      <text:p text:style-name="P20">Ou on peut le croire. Ou s’en convaincre. Mais si ces Grands Groupes ont traversé le temps, c’est que ce n’était pas forcément néfaste. Bon, c’est comme ça que ça fonctionnait et plus on montait dans la hiérarchie, plus on était susceptible d’apprendre des informations non disponibles au reste des simples mortels. C’est un des principaux phantasmes qui sont associés au fameux « plafond de verre » du top management.</text:p>
      <text:p text:style-name="P20">Mais ça c’était avant. Depuis ces vingt dernières années, le cœur de métier de ces entreprises financières a bien évolué. Elles sont devenues tellement dépendantes de la technologie pour leurs activités du quotidien, y compris des technologies les plus avancées (Big Data, IA, Cloud, Data Science…) qu’elles sont peu à peu devenues des entreprises de la Tech comme ces GAFAM qu’elles exècrent et adorent en même temps…</text:p>
      <text:p text:style-name="P20"><text:soft-page-break/>Et c’est là que ça devient rigolo : les dirigeants de la Finance, à la différence des vrais dirigeants de la Tech, ne sont pas des ingénieurs ou des scientifiques. Ce sont toujours des financiers. Et des financiers qui pour l’écrasante majorité ne comprennent pas un traître mot aux problèmes techniques.</text:p>
      <text:p text:style-name="P20">Or, l’augmentation de l’emprise technologique dans le monde financier s’accompagne mécaniquement de la multiplication des problèmes techniques : aucun système ne fonctionne sans problème et plus on a de systèmes, plus on a de problèmes.</text:p>
      <text:p text:style-name="P20">Mais comment expliquer à une hiérarchie qui n’y comprend rien, même avec la meilleure volonté du monde ?</text:p>
      <text:p text:style-name="P126"><text:span text:style-name="T7">Je rappelle à ce titre une citation de Nicolas Sarkozy : </text:span><text:span text:style-name="T6">« Le nucléaire est un sujet de président, mais ça ne veut pas dire que je comprends le chantier de Flamanville. Quand je visite une centrale, je prends un air concentré mais au bout de deux minutes je suis largué ».</text:span></text:p>
      <text:p text:style-name="P20">On a exactement le même type de comportement avec des dirigeants qui n’ont simplement pas le bagage nécessaire pour comprendre les problèmes de leurs subalternes : donc, soit on accepte les grands moments de solitude en continuant à remonter les infos, mais en risquant de passer pour le porteur de mauvaise nouvelles, avec les désagréments qu’on a déjà vus ; soit on arrête de leur en parler et on résout le problème entre spécialistes.</text:p>
      <text:p text:style-name="P20"><text:soft-page-break/>Forcément, l’être humain étant ce qu’il est, peu choisissent la première option. Et au final, on arrive à la création du « plancher de verre » où ce sont les couches « inférieures » de la société qui disposent de plus d’informations sur la réalité du fonctionnement de l’entreprise que les dirigeants qui prennent effectivement les décisions…</text:p>
      <text:p text:style-name="P20">D’où un décalage certain sur les trajectoires technologiques et les politiques d’investissement entre la compréhension des dirigeants et les besoins réels, malheureusement.</text:p>
      <text:h text:style-name="P14" text:outline-level="3"><text:bookmark-start text:name="__RefHeading___Toc1701_1115178054"/>Le problème ou la solution ?<text:bookmark-end text:name="__RefHeading___Toc1701_1115178054"/></text:h>
      <text:p text:style-name="P6">Malgré tous ces obstacles, toutes les personnes impliquées de gré ou de force dans la Transformation, qu’ils soient collaborateurs ou consultants, doivent faire avancer le schmilblick, qu<text:span text:style-name="T176">o</text:span>i qu’il en coûte. La plupart du temps, pour accompagner ces grandes périodes de mutation, les Grands Groupes vont demander de se faire accompagner par un cabinet de conseil qui va leur fournir le complément incontournable du slider dans ce type de Transformation : le change manager.</text:p>
      <text:p text:style-name="P6">Le change manager est censément un sorcier qui dispose de pouvoirs occultes pour faire avaler la pilule rouge (ou la bleue ?) à n’importe quel collaborateur et qui va transformer un troupeau plutôt rétif en cheptel prêt à aller volontairement à l’abattoir.</text:p>
      <text:p text:style-name="P126"><text:span text:style-name="T1">Sur le papier, ça marche : ils ont toujours sous le coude de magnifiques slides (tiens, tiens !) </text:span><text:soft-page-break/><text:span text:style-name="T1">expliquant une méthode et une démarche imparables pour « on-boarder</text:span><text:span text:style-name="T1"><text:note text:id="ftn6" text:note-class="footnote"><text:note-citation>6</text:note-citation><text:note-body><text:p text:style-name="P10">Le terme « on-boarder » fait référence à une personne ou à un processus chargé d’intégrer ou d’accueillir de nouveaux employés dans une entreprise ou une organisation. Il peut également se référer à un logiciel ou à un système utilisé pour faciliter le processus d’intégration des nouveaux employés, en leur fournissant les ressources et les informations nécessaires pour qu’ils puissent commencer leur travail de manière efficace et productive.</text:p></text:note-body></text:note></text:span><text:span text:style-name="T1"> » tout le personnel.</text:span></text:p>
      <text:p text:style-name="P126"><text:span text:style-name="T1">Comme disait Pierre Desproges : « </text:span><text:span text:style-name="T4">Un jour j’irai vivre en Théorie, car en Théorie tout se passe bien</text:span><text:span text:style-name="T1"> ». En clair, ça ne marche jamais comme ça. Et, vu le prix que ça coûte, ce ne peut pas être la méthode de ces cabinets prestigieux qui peut être en cause.</text:span></text:p>
      <text:p text:style-name="P6">C’est donc que le maillon faible doit être du côté de l’individu. C’est la seule explication rationnelle. Arrivé à cette étape du processus, on va faire culpabiliser le rétif ou le rebelle en lui laissant une alternative faussée : « Veux-tu faire partie du problème ou de la solution ? ».</text:p>
      <text:p text:style-name="P126"><text:span text:style-name="T1">Cette approche, qui ne brille pas par une subtilité débordante, est cependant redoutablement efficace : faire partie du problème, c’est risquer le Reproche ; et un Reproche peut suffire pour bloquer une carrière </text:span><text:span text:style-name="T5">ad vitam aeternam</text:span><text:span text:style-name="T1">.</text:span></text:p>
      <text:h text:style-name="P14" text:outline-level="3"><text:bookmark-start text:name="__RefHeading___Toc1703_1115178054"/>Le moment où il faut se relever les manches<text:bookmark-end text:name="__RefHeading___Toc1703_1115178054"/></text:h>
      <text:p text:style-name="P20">On a parlé des virtuoses de la communication et du changement, mais ce ne sont pas les seules espèces d’acteurs qu’on rencontre dans une <text:soft-page-break/>Transformation bien menée. Les prestidigitateurs et les invocateurs font le spectacle, mais ne font pas avancer les sujets. Pour ça, il faut la force motrice : les « doers ».</text:p>
      <text:p text:style-name="P20">Un doer, au-delà du jargon, est tout simplement une personne qui fait. C’est une ressource rare, précieuse, mais heureusement taillable et corvéable à merci. Car le doer n’est pas motivé par l’ambition ou la reconnaissance, et très peu par l’appât du gain : il a seulement une conscience professionnelle.</text:p>
      <text:p text:style-name="P20">Tous ces doers sont en général des personnes compétentes, altruistes et autonomes. Elles ne comptent pas leur temps et sont suffisamment pragmatiques pour définir des objectifs réalistes, à hauteur d’homme, et les atteindre. Jusqu’au prochain. Si le Directeur de la Transformation est un général, le doer est un sergent. Et ce sont les sergents qui gagnent les batailles. Le général gagne la guerre. Enfin, c’est ce qu’il écrit après dans ses mémoires. Seuls les généraux écrivent des mémoires, pas les sergents.</text:p>
      <text:p text:style-name="P20">Bref, le sergent et sa petite escouade vont réussir leur petite mission, avec leurs petits moyens et on va les récompenser. À la guerre, on leur donne une médaille ou une citation, et on les renvoie au feu. Dans l’entreprise, on récompense un collaborateur qui a bien travaillé en lui donnant plus de travail. A chaque fois. Jusqu’à la rupture. Les félicitations sont rares et les revalorisations salariales généralement exclues, pour ne pas créer des « iniquités entre équipes » ! Donc, on préfère n’augmenter personne et les rares qui font avancer réellement la Transformation ne sont jamais valorisés.</text:p>
      <text:p text:style-name="P20"><text:soft-page-break/>Le doer est viscéralement convaincu qu’il est nécessaire de faire évoluer les choses, pour une simple raison de bon sens et de contribution au Bien Commun : en général, les doers prennent leur essor en plein chaos, quand tout part en sucette. Parce que, dans une Transformation, ce qui est toujours tu, c’est que les idées géniales qui ont été proposées pour résoudre tous les problèmes diagnostiqués ne vont pas fonctionner du jour au lendemain, par un claquement de doigt magique !</text:p>
      <text:p text:style-name="P20">Il va d’abord falloir identifier les dysfonctionnements, établir un diagnostic, proposer une solution, trouver les ressources et les budgets pour la mettre en œuvre et enfin prendre le temps effectif du changement, en corrigeant et en ajustant pas à pas.</text:p>
      <text:h text:style-name="P14" text:outline-level="3"><text:bookmark-start text:name="__RefHeading___Toc1705_1115178054"/>Au fait, on va où les gars ?<text:bookmark-end text:name="__RefHeading___Toc1705_1115178054"/></text:h>
      <text:p text:style-name="P20">Enfin, ce serait la façon raisonnable de faire. Ce n’est jamais la méthodologie appliquée. Parce que le « faire-savoir » est beaucoup plus important que le « savoir-faire » dans une Transformation réussie : n’oublions pas qu’il faut montrer des résultats positifs en peu de mots sur de jolis slides. Alors, on a inventé le concept de « quick win », ou « victoire rapide ».</text:p>
      <text:p text:style-name="P20">Un quick win, ou mieux plusieurs quick wins, c’est le Graal de la Transformation : c’est l’Art de Faire Croire que ce qui a marché sur une expérimentation à petite échelle, sur un périmètre maîtrisé et avec un panel d’acteurs hyper-motivés peut être généralisé à l’échelle d’une entreprise de plusieurs milliers de collaborateurs, avec des <text:soft-page-break/>problématiques très diverses et des motivations très différentes.</text:p>
      <text:p text:style-name="P20">Avec les quick wins, il faut aussi amener deux autres Grands Concepts de la Transformation, qui se retrouvent toujours à la place d’honneur dans les slides des COMEX ou des Comités Stratégiques des Transformations : les POC et les POV.</text:p>
      <text:p text:style-name="P20">Les POC (Proof Of Concept) et les POV (Proof Of value) correspondent également à des expérimentations, mais sur des périmètres encore plus limités que les quick wins : c’est juste vérifier si une idée est applicable dans le contexte très particulier de l’entreprise et cette vérification est généralement axée autour de l’implémentation d’un outil « magique » proposée par un éditeur pour résoudre tous les soucis de l’entreprise, et en plus faire le café.</text:p>
      <text:p text:style-name="P20">Bref, ça permet de faire rêver les décideurs en utilisant les grands buzzwords du moment. Petit florilège sur les dernières années, rien qu’au niveau technologique en Finance :</text:p>
      <text:list text:style-name="WWNum5">
        <text:list-item>
          <text:p text:style-name="P233">en 2018 : Big Data &amp; Advanced Analytics, Datascience</text:p>
        </text:list-item>
        <text:list-item>
          <text:p text:style-name="P233">en 2019 : Data Centric Architecture</text:p>
        </text:list-item>
        <text:list-item>
          <text:p text:style-name="P233">en 2020 : Blockchain &amp; Robotic Process Automation</text:p>
        </text:list-item>
        <text:list-item>
          <text:p text:style-name="P233">en 2021 : Metaverse, Data Streaming &amp; Real Time</text:p>
        </text:list-item>
        <text:list-item>
          <text:p text:style-name="P234">en 2022 : Data Mesh &amp; Datamarket Place</text:p>
        </text:list-item>
      </text:list>
      <text:p text:style-name="P6">Et je ne présente que les sujets sur lesquels j’ai été impliqué dans une seule entreprise. Sachant que le déploiement de chacun de ces chantiers, dans un grand groupe, représente un travail de plusieurs <text:soft-page-break/>années, on arrive rapidement dans un état d’instabilité permanente où un clou chasse l’autre et on n’a ni boussole ni orientation.</text:p>
      <text:p text:style-name="P6">Ajouté au fait que, pour les raisons d’affichage au plus <text:span text:style-name="T176">haut</text:span> niveau dont on a déjà parlé, le management intermédiaire va souvent préférer la progression par « sauts quantiques » plutôt que la méthode des petits pas.</text:p>
      <text:h text:style-name="P14" text:outline-level="3"><text:bookmark-start text:name="__RefHeading___Toc1707_1115178054"/>Émerger du chaos<text:bookmark-end text:name="__RefHeading___Toc1707_1115178054"/></text:h>
      <text:p text:style-name="P6">Sur le papier, c’est effectivement une approche qui a du sens : au lieu de prendre un temps fou à faire une bascule progressive d’un ancien mode de fonctionnement à un nouveau, avec le travail en double que ça représente pendant un temps certain, on va favoriser le « Big Bang » où, après une période de formation normalement suffisante, on va basculer du jour au lendemain sur le nouveau mode de fonctionnement.</text:p>
      <text:p text:style-name="P6">Mais on n’habite toujours pas en Théorie.</text:p>
      <text:p text:style-name="P126"><text:span text:style-name="T1">Pour que cette approche fonctionne, il faut faire un travail sérieux et colossal en amont, pour anticiper tous les dysfonctionnements possibles et mettre les moyens pour limiter la casse pour les opérationnels. Or, ces études coûtent cher et prennent du temps. Et je rappelle qu’il faut afficher des quick wins dans des jolis slides. Donc, on va au mieux bâcler ces phases d’études, quand on ne les arbitre</text:span><text:span text:style-name="T1"><text:note text:id="ftn7" text:note-class="footnote"><text:note-citation>7</text:note-citation><text:note-body><text:p text:style-name="P10">À la différence du monde sportif, le terme “arbitrer” en entreprise veut presque systématiquement dire “supprimer pour des raisons budgétaires”.</text:p></text:note-body></text:note></text:span><text:span text:style-name="T1"> pas purement et simplement.</text:span></text:p>
      <text:p text:style-name="P6"><text:soft-page-break/>En général, le résultat est conforme aux attendus : si on met en place tous les éléments pour que ça foire, on ne peut que se féliciter quand on atteint ses objectifs. Donc, c’est le chaos. Ou plutôt les Limbes. Un endroit informe entre le Paradis promis et l’Enfer. Plutôt dans la banlieue proche de l’Enfer quand même.</text:p>
      <text:p text:style-name="P6">Après un Big Bang, il est impossible de se retourner vers les anciens process et les anciens outillages : pour éviter que les gens n’y retournent par habitude et confort, ils ont été déconnectés et désactivés. Aucune autre alternative que d’adopter le nouveau mode de fonctionnement.</text:p>
      <text:p text:style-name="P6">Sauf que ce nouveau mode ne fonctionne généralement pas. Vu que la phase d’étude préalable a été bâclée, les réalités opérationnelles du travail des différents services n’ont pas été correctement évaluées, et le Diable étant dans les détails, il a un nouvel habitat où il peut s’amuser…</text:p>
      <text:p text:style-name="P6">Habituellement, c’est dans ces périodes de chaos que les doers apparaissent : excédés par un quotidien qui ne fonctionne plus, ils prennent les choses en main et commencent à résoudre les problèmes à leur niveau. En plus de leurs tâches habituelles. Pour justement pouvoir effectuer leurs tâches habituelles. Car la hiérarchie, et surtout le top management, ne peut (ne veut ?) pas entendre que des services qui fonctionnaient correctement avant ne puissent plus fonctionner avec la Transformation. D’autant que tous les indicateurs qui sont remontés sont au vert !</text:p>
      <text:p text:style-name="P6">À la fin des fins, ce ne sont pas les dirigeants, ni les cabinets de conseils, ni les sliders, ni les change managers qui font avancer la Transformation. <text:soft-page-break/>Pourtant ce sont eux qui récolteront les lauriers de la victoire s’ils arrivent à présenter les résultats de façon suffisamment positive.</text:p>
      <text:p text:style-name="P6">Ce sont les opérationnels qui font leur boulot. Ou plus exactement qui s’efforcent de remettre sur pied un environnement suffisamment stable pour faire leur boulot. On ne récompense pas ces gens-là.</text:p>
      <text:h text:style-name="P14" text:outline-level="3"><text:bookmark-start text:name="__RefHeading___Toc1709_1115178054"/>La poussière sous les tapis<text:bookmark-end text:name="__RefHeading___Toc1709_1115178054"/></text:h>
      <text:p text:style-name="P20">En complément des doers opérationnels dont on a déjà parlé, il existe une autre sous-espèce intéressante : les directeurs de projet et de programme, aka les pitbulls.</text:p>
      <text:p text:style-name="P20">Ce sont des doers particuliers, parce qu’ils sont directement au service de la Transformation, directement aux ordres du Chef. On utilise leur volonté de faire avancer le schmilblick pour défoncer tous les murs qu’ils vont rencontrer sur le chemin ; que ce soient des problèmes techniques, organisationnels, juridiques…</text:p>
      <text:p text:style-name="P20">Leur métier est de faire avancer les choses vaille que vaille. Donc de faire des choix. Trouver des solutions de contournement. Et éventuellement de prendre la « bande d’arrêt d’urgence » quand le Chef le demande.</text:p>
      <text:p text:style-name="P20">Intéressant, ce concept de « bande d’arrêt d’urgence ». Sur l’autoroute, c’est par là que les secours arrivent. Personne d’autre n’a le droit de l’emprunter. Dans l’entreprise, c’est une voie alternative qui permet d’avancer en se libérant d’un certain nombre de contraintes. Administratives, juridiques, techniques, budgétaires… bref, on fonce.</text:p>
      <text:p text:style-name="P20"><text:soft-page-break/>Et on arrive à la cible en trichant un peu. Mais dans cette approche le but est plus important que le chemin. C’est anti-zen.</text:p>
      <text:p text:style-name="P20">Et ça crée de la dette. Vu qu’on a fait des raccourcis, des simplifications, il faut penser plus tard à l’effort à faire pour remettre les choses d’équerre. Enfin, faudrait. Mais ça coûte cher. Et puis ça fait payer deux fois : une fois pour faire au rabais sur la fameuse bande et une autre fois, très chère, pour remettre les choses dans le moule. Parce que ça coûte toujours beaucoup plus cher de refaire que de faire : il faut reconcevoir, détruire et reconstruire.</text:p>
      <text:p text:style-name="P20">Et pour quel bénéfice ? Le produit a été livré, non ? En plus, c’est ce qui a été écrit dans un joli slide : projet Tartempion livré. On n’a pas forcément insisté sur le fait que c’était le MVP 1 du projet qui avait été livré. Voire oublié de le dire.</text:p>
      <text:p text:style-name="P20">À propos, c’est quoi un MVP ? Minimum Viable Product. C’est un concept agile : on commence par livrer un produit qui répond à un besoin métier minimal et on s’occupera ensuite de compléter avec les autres fonctionnalités pour le mettre aux normes au bout de quelques itérations, dans un produit fini.</text:p>
      <text:p text:style-name="P20">Mais les Chefs ne comprennent pas l’agilité. Ce sont des financiers. Ils comprennent les chiffres. Et on leur a annoncé qu’on a livré le produit aux métiers, qui sont d’ailleurs ravis de ce qu’on leur a livré. Pourquoi payer encore pour un truc qui fonctionne ? Surtout qu’on ne leur a pas vraiment expliqué que le truc livré n’était pas fini, en fait.</text:p>
      <text:p text:style-name="P20">On va donc en rester là. Et cacher la poussière sur le tapis. On a avancé. On a livré. C’est tout ce qui compte. Le but du directeur de projet ou de <text:soft-page-break/>programme est atteint. Il a fait son taf. Il n’a pas à se préoccuper des finitions. D’autres s’en chargeront, quand ils auront récupéré le budget pour le faire. On les appelle les Product Managers.</text:p>
      <text:p text:style-name="P20">Sauf que, dans une Transformation en marche, il faut tourner la page et passer à autre chose, à une autre priorité. On va laisser la poussière sous le tapis pour le moment. Jusqu’à ce que tout le monde l’oublie. Jusqu’à ce que l’Audit ou une mission du régulateur vienne soulever les tapis…</text:p>
      <text:h text:style-name="P14" text:outline-level="3"><text:bookmark-start text:name="__RefHeading___Toc1711_1115178054"/>Qui conseille quoi ?<text:bookmark-end text:name="__RefHeading___Toc1711_1115178054"/></text:h>
      <text:p text:style-name="P6">Si tous ces Grands Groupes se lancent dans ces orgies de travaux démesurés, c’est aussi parce qu’on leur dit de le faire : un dirigeant de grande firme financière va rarement prendre seul des décisions de cette ampleur. Il va d’abord se faire accompagner par de grands cabinets en stratégie qui ont pour noms Bain, BCG, Deloitte ou PwC, pour en citer quelques-uns parmi les plus connus.</text:p>
      <text:p text:style-name="P6">Et ces experts en stratégie vont vendre très cher leur compréhension du marché et des grandes évolutions de la société, ainsi que leur savoir-faire, afin que l’entreprise puisse prendre son nouveau virage stratégique pour les <text:span text:style-name="T151">dix</text:span> ou <text:span text:style-name="T151">quinze</text:span> ans à venir. À noter que ces visions stratégiques à <text:span text:style-name="T151">quinze</text:span> ans doivent quand même être revues par d’autres cabinets tous les <text:span text:style-name="T151">cinq</text:span> ans : le futur a une fâcheuse habitude à ne jamais être d’accord avec les prévisions quand il se transforme en présent…</text:p>
      <text:p text:style-name="P126"><text:span text:style-name="T1">Donc tous ces cabinets de conseil vont fournir aux dirigeants de fabuleuses analyses sur le futur et </text:span><text:soft-page-break/><text:span text:style-name="T1">vont « benchmarker</text:span><text:span text:style-name="T1"><text:note text:id="ftn8" text:note-class="footnote"><text:note-citation>8</text:note-citation><text:note-body><text:p text:style-name="P10">“Benchmarker” est un terme de jargon qui désigne une personne ou une entreprise qui compare ses performances à celles d’autres entreprises ou organisations similaires pour identifier les domaines où des améliorations peuvent être apportées.</text:p></text:note-body></text:note></text:span><text:span text:style-name="T1"> » l’entreprise face à ses concurrents. Et là on arrive à un joli paradoxe : un cabinet de conseil doit vendre des offres et des prestations, c’est sa raison de vivre. Mais il ne peut pas avoir un seul client à la fois, ce ne serait pas économiquement viable.</text:span></text:p>
      <text:p text:style-name="P6">Il va donc développer une offre globale, la plus générique possible pour s’appliquer à plusieurs contextes d’entreprises à la fois, et va chercher à la vendre à un maximum de clients. Développer ce genre d’offre coûte cher et prend du temps. Il faut en plus disposer des experts et des spécialistes qui peuvent la porter et la mettre en œuvre : ça ne peut se faire qu’à certains moments clés où beaucoup d’étoiles s’alignent : une opportunité ouverte par une évolution technologique majeure, une augmentation de la pression réglementaire, la constitution d’une équipe d’experts opérationnels et une certaine instabilité dans le contexte économique qui pousse les clients à vouloir améliorer leurs résultats. En général, il faut qu’au moins trois de ces conditions soient réunies pour que le lancement d’une Transformation soit possible.</text:p>
      <text:p text:style-name="P6">Et c’est à ce moment-là que le jeu de dupes commence : en effet, ces conditions vont concerner toutes les entreprises d’un secteur en même temps et l’offre sera vendue au même moment à tous les clients potentiels. Donc, le chef d’entreprise qui cherche à obtenir un « avantage disruptif » sur sa concurrence, selon le jargon de rigueur, va au final <text:soft-page-break/>faire exactement la même chose que ses concurrents et au même moment !</text:p>
      <text:p text:style-name="P126"><text:span text:style-name="T1">Le jeu est tellement bien réglé que ces dirigeants participent en général aux mêmes conférences ou groupes de réflexion et savent exactement où en sont leurs homologues dans leur prise de décision. L’un d’eux m’avait même dit lors d’un « pitch » de présentation, à l’époque où je cherchais vendre mon offre : «</text:span><text:span text:style-name="T5"> vous savez, pour nous, les plans de Transformation, c’est comme courir un 100 mètres avec un lion affamé derrière nous. On se moque de qui est le premier. L’important est de ne pas être le dernier </text:span><text:span text:style-name="T1">».</text:span></text:p>
      <text:p text:style-name="P6">En réalité, les cabinets de conseil ne sont pas là pour proposer des solutions révolutionnaires à des problèmes complexes : ils sont d’abord utilisés comme caution morale pour justifier une Transformation et trouver les arguments pour l’étayer. Ensuite, ils fournissent également la force de frappe nécessaire pour lancer ces grands chantiers et pour les piloter, bien entendu, ainsi que pour donner les grandes lignes des choses à faire, mais leur monde est idyllique.</text:p>
      <text:h text:style-name="P14" text:outline-level="3"><text:bookmark-start text:name="__RefHeading___Toc1713_1115178054"/>La création de la pénurie<text:bookmark-end text:name="__RefHeading___Toc1713_1115178054"/></text:h>
      <text:p text:style-name="P6">Bizarrement, entre les gains et les améliorations annoncées par les cabinets de conseil sur une perspective à cinq ans et la réalité de ce qui est constaté à cette date, ça ne concorde jamais. Mais vraiment jamais. Mais ce n’est pas grave, vu qu’à cette époque, les cabinets de conseil sont partis depuis longtemps : leur travail n’est pas de réaliser…</text:p>
      <text:p text:style-name="P6"><text:soft-page-break/>Par contre, une fois que ces grands visionnaires ont ébauché le croquis de leur grande fresque du futur, il faut embaucher une armée de personnes capables de prendre le pinceau pour dessiner et peindre tous les détails de cette grande œuvre.</text:p>
      <text:p text:style-name="P6">Et, comme chacune de ces grandes Transformations s’inscrit toujours dans une phase de bascule, comme indiqué plus tôt, ça veut dire qu’on doit partir sur des nouvelles bases impliquant de nouvelles méthodes, de nouvelles aptitudes et surtout de nouvelles compétences. Donc, ça veut dire des hommes et des femmes qui ont ces nouvelles compétences.</text:p>
      <text:p text:style-name="P6">Et là, on est confronté au vieux conflit entre l’Offre et la Demande. Au début d’une phase de transition, les personnes disposant des nouvelles compétences sont à la fois très rares et très demandées, vu qu’elles sont indispensables pour accompagner les Transformations qui se lancent en même temps dans tout un secteur économique.</text:p>
      <text:p text:style-name="P6">On assiste alors à un phénomène classique et normal : l’augmentation des prix. Les salaires des rares spécialistes s’envolent et ceux qui ont une mentalité de mercenaires vont rapidement chercher à se vendre au plus offrant, ce qui augmente encore l’inflation salariale.</text:p>
      <text:p text:style-name="P6">En même temps, comme ces compétences sont indispensables pour accompagner la Transformation, les dirigeants vont essayer de compenser la pénurie en formant leurs propres troupes. Dans le jargon, on appelle ça de l’« up-skilling » ou du « re-skilling », suivant la quantité de <text:soft-page-break/>nouvelles connaissances que le collaborateur devra ingurgiter.</text:p>
      <text:p text:style-name="P6">Et c’est là que l’exercice trouve rapidement ses limites : dans le contexte hyper-technologique actuel, le ticket d’entrée pour pouvoir prétendre à seulement être éligible à ces nouvelles formations est très élevé. Nous sommes actuellement dans l’ère de la Data, et ça demande de créer plein de nouveaux métiers, qui pour la plupart n’existaient pas il y a trois ans : data scientists, data analysts, data architects, data management officers, data quality managers, data stewards, data owners, data engineers, AI engineers… et on en invente des nouveaux tous les jours. Pas pour faire joli, mais parce qu’on en a besoin pour faire tourner les délicates machineries ultra-complexes de la Data.</text:p>
      <text:p text:style-name="P6">Pour pouvoir seulement être sélectionnés à suivre l’année de formation qui les élèvera à leur nouveau statut, il faut au moins que les collaborateurs aient un diplôme d’ingénieur ou un Master 2 en économétrie, statistiques, informatique… Bref, il faut des matheux de très bon niveau.</text:p>
      <text:p text:style-name="P6">Eh bien, ça ne correspond pas forcément au vivier des collaborateurs des grandes entreprises qui se sont lancées dans ces Transformations : les Bac+5 ne sont pas si nombreux que ça dans l’IT ou les services métiers, par exemple. Ce genre de recrutement élitiste n’est devenu la norme que dans les dix dernières années ; avant c’était plutôt des techniciens supérieurs (Bac+2) qui étaient recrutés.</text:p>
      <text:p text:style-name="P6">Et ils ont pleinement assuré leur job : ils n’ont pas fait plus de boulettes et d’erreurs que les ingénieurs qui ont été recrutés plus tard. La preuve : <text:soft-page-break/>la majeure partie de ce qu’ils ont mis en place fonctionne toujours actuellement et est utilisé quotidiennement. Seulement, quand on veut les faire évoluer vers des nouveaux métiers qui demandent un prérequis très important sur des sujets aussi exigeants que les mathématiques supérieures, ça bloque souvent. Et, sur des sujets plus techniques, comme les nouveaux langages et technologies liées au Big Data, par exemple, on rencontre des blocages similaires : comment recycler un super spécialiste qui fait du COBOL depuis vingt-cinq ans sur des nouveaux langages qui ne partagent pas du tout les mêmes principes de codage ou de fonctionnement ?</text:p>
      <text:p text:style-name="P6">En clair, les viviers potentiels de talents internes aux entreprises se tarissent très vite et on retourne à la case départ : recruter des ressources en pénurie ou recourir massivement aux cabinets de conseil qui recrutent massivement ces pépites par des politiques salariales très agressives. En contrepartie, ils les louent très très cher (plusieurs milliers d’euros TTC par jour parfois) aux entreprises auxquelles ils ont proposé de lancer ces transformations. Malynx, le lynx.</text:p>
      <text:p text:style-name="P6">Mais le tableau n’est pas complètement noir non plus : lorsque la Demande est tellement plus forte que l’Offre, l’Offre également s’adapte. C’est ce que tous les économistes nous affirment depuis des années : les marchés sont censés savoir se gérer d’eux-mêmes si on leur laisse le temps. Même si dans le cas de figure qui nous intéresse, le facteur temps est gravement impacté : le temps est compté, vu que tout le monde veut arriver avant son concurrent.</text:p>
      <text:p text:style-name="P126"><text:span text:style-name="T1">L’Offre s’adapte donc, mais pas forcément à la vitesse attendue : ainsi, il y a encore quatre ou cinq </text:span><text:soft-page-break/><text:span text:style-name="T1">ans, tout le monde cherchait des data scientists. En 2012, le Harvard Business Review avait qualifié le data scientist comme le « job le plus sexy du 21e siècle » !</text:span><text:span text:style-name="T1"><text:note text:id="ftn9" text:note-class="footnote"><text:note-citation>9</text:note-citation><text:note-body><text:p text:style-name="Footnote"><text:span text:style-name="T1">Data Scientist : The Sexiest Job of the 21st Century. Harvard Business Review. 2012. </text:span><text:a xlink:type="simple" xlink:href="https://hbr.org/2012/10/data-scientist-the-sexiest-job-of-the-21st-century" text:style-name="Internet_20_link" text:visited-style-name="Visited_20_Internet_20_Link"><text:span text:style-name="Internet_20_link"><text:span text:style-name="T1">https://hbr.org/2012/10/data-scientist-the-sexiest-job-of-the-21st-century</text:span></text:span></text:a></text:p></text:note-body></text:note></text:span><text:span text:style-name="T1"> Et puisque Harvard l’a écrit, pratiquement toutes les écoles d’ingénieurs et les universités en IT, économétrie, statistiques… ont créé une filière en data science et ont formé des dizaines de milliers de data scientists juniors, tout juste sortis d’école.</text:span></text:p>
      <text:p text:style-name="P6">Forcément, il n’a pas fallu des années pour saturer le marché et ceux qui sortent d’école maintenant connaissent la galère habituelle d’un junior qui sort d’école avec un diplôme certes coté, mais qui doit se confronter à des data scientists plus expérimentés sortis d’école il y a quelques années. Bref, un état normal.</text:p>
      <text:p text:style-name="P6">Actuellement, la pénurie est plutôt axée sur les profils techniques : data engineers, data architects, AI engineers… jusqu’à ce que les nouvelles promotions inondent peu à peu le marché et que la solution se stabilise. En attendant, il est très difficile de recruter et de fidéliser ces indispensables « plombiers de la Data » ; et ça impacte forcément les travaux en cours.</text:p>
      <text:p text:style-name="P6">Quand on parle de « plombiers de la Data », on peut filer la métaphore : il est très difficile de trouver un bon artisan plombier quand on en a besoin et on est trop souvent obligé de se retrancher sur le premier numéro de téléphone dans l’annuaire, avec un prix qui est rarement à la hauteur de la prestation… et c’est exactement pareil avec ces <text:soft-page-break/>profils techniques rares : en période de pénurie, les bons data engineers sont déjà pris ailleurs et ceux qui sont disponibles ne sont pas forcément les couteaux les plus affûtés du tiroir. Ça veut aussi dire que le travail qu’ils vont réaliser n’est pas forcément à l’État de l’Art non plus : les rustines et les bouts de ficelle sont souvent légion et la pérennité dans le temps est loin d’être assurée.</text:p>
      <text:p text:style-name="P6">Au final, c’est comme quand on fait intervenir en urgence un plombier à Paris pour une fuite d’eau le week-end de Pâques : ça coûte cher, c’est mal fait, ça tiendra pas dans le temps et faudra refaire plus tard, mais de toute façon, il n’y a pas le choix non plus…</text:p>
      <text:h text:style-name="Heading_20_3" text:outline-level="3"><text:bookmark-start text:name="__RefHeading___Toc1586_1115178054"/><text:span text:style-name="T1">Le rêve de la Wunderwaffe</text:span><text:span text:style-name="T1"><text:note text:id="ftn10" text:note-class="footnote"><text:note-citation>10</text:note-citation><text:note-body><text:p text:style-name="Footnote"><text:span text:style-name="T2">Wunderwaffe</text:span><text:span text:style-name="T1"> (en </text:span><text:a xlink:type="simple" xlink:href="https://fr.wikipedia.org/wiki/Allemand" text:style-name="Internet_20_link" text:visited-style-name="Visited_20_Internet_20_Link"><text:span text:style-name="Internet_20_link"><text:span text:style-name="T118">allemand</text:span></text:span></text:a><text:span text:style-name="T1"> « arme miraculeuse », de </text:span><text:span text:style-name="T4">Wunder</text:span><text:span text:style-name="T1">, « miracle » et </text:span><text:span text:style-name="T4">Waffe</text:span><text:span text:style-name="T1">, « arme » ; au pluriel, </text:span><text:span text:style-name="T4">Wunderwaffen</text:span><text:span text:style-name="T1">) est un terme utilisé par le </text:span><text:a xlink:type="simple" xlink:href="https://fr.wikipedia.org/wiki/Ministère_du_Reich_à_l'Éducation_du_peuple_et_à_la_Propagande" text:style-name="Internet_20_link" text:visited-style-name="Visited_20_Internet_20_Link"><text:span text:style-name="Internet_20_link"><text:span text:style-name="T118">ministère du Reich à l’Éducation du peuple et à la Propagande</text:span></text:span></text:a><text:span text:style-name="T1"> pour désigner des armes révolutionnaires censées permettre le renversement de la situation militaire catastrophique du </text:span><text:a xlink:type="simple" xlink:href="https://fr.wikipedia.org/wiki/Troisième_Reich" text:style-name="Internet_20_link" text:visited-style-name="Visited_20_Internet_20_Link"><text:span text:style-name="Internet_20_link"><text:span text:style-name="T118">Troisième Reich</text:span></text:span></text:a><text:span text:style-name="T1"> à la fin de la </text:span><text:a xlink:type="simple" xlink:href="https://fr.wikipedia.org/wiki/Seconde_Guerre_mondiale" text:style-name="Internet_20_link" text:visited-style-name="Visited_20_Internet_20_Link"><text:span text:style-name="Internet_20_link"><text:span text:style-name="T118">Seconde Guerre mondiale</text:span></text:span></text:a><text:span text:style-name="T1"> et assurer sa victoire ultime</text:span></text:p></text:note-body></text:note></text:span><text:bookmark-end text:name="__RefHeading___Toc1586_1115178054"/></text:h>
      <text:p text:style-name="P6">Dans une ère hyper technologique comme la nôtre, avec toutes les innovations successives qui se précipitent et l’<text:span text:style-name="T152">I</text:span>ntelligence <text:span text:style-name="T152">A</text:span>rtificielle qui frappe à nos portes, tous les dirigeants espèrent disposer à court ou moyen terme d’une nouvelle avancée technologique majeure ou d’un nouvel outil qui va résoudre tous leurs problèmes d’un coup.</text:p>
      <text:p text:style-name="P6">Mais ce n’est pas nouveau comme attitude. C’est l’attitude de l’humain depuis qu’il a inventé les outils et la religion : attendre le miracle. Mais on ne <text:soft-page-break/>vit toujours pas en Théorie. Et dans notre réalité, tout ce qui a été construit l’a été par des humains. Avec leurs faiblesses et leurs erreurs. Et leurs constructions ne font que refléter ces faiblesses et ces erreurs. Je pense qu’il est inconcevable pour une personne extérieure au milieu d’imaginer le nombre d’erreurs et de dysfonctionnements qui existent au quotidien dans les systèmes d’information d’une banque systémique française, par exemple BNP Paribas, Société Générale ou Crédit Agricole. On parle de plusieurs milliers d’incidents par jour.</text:p>
      <text:p text:style-name="P6">Mais ça ne veut pas dire que ça ne fonctionne pas. Le simple fait qu’on suive ces incidents prouve qu’on les traite et qu’on les corrige au fur et à mesure. Et ces incidents sont liés à de multiples facteurs indépendants : des bugs techniques, des erreurs de manipulation, des incompréhensions, des coupures de courant… Une blague d’informaticien dit que 95 % des bugs sont localisés entre la chaise et l’écran. Et c’est vrai.</text:p>
      <text:p text:style-name="P6">L’humain est faillible. C’est pour ça qu’il a créé les ordinateurs. Mais ce sont toujours des humains qui les utilisent et les programment. Ce sont les humains qui travaillent et ont des interactions les uns avec les autres. En fait, tous les problèmes viennent des humains.</text:p>
      <text:p text:style-name="P6">Et on trouve toujours un éditeur de logiciel, un fabricant d’outil ou un cabinet de conseil qui va éclairer les problèmes rencontrés sous un angle très particulier, lui permettant de proposer sa solution comme la panacée universelle. Ça fait cinq mille ans que ça marche : l’homme a besoin de croire.</text:p>
      <text:p text:style-name="P6"><text:soft-page-break/>La foi marche parfois, les croyants le disent. L’outil miracle, jamais. Si la Transformation ne suit pas les étapes préliminaires de revoir d’abord les processus, puis d’accompagner les collaborateurs et enfin et seulement de mettre en place les outils choisis consciemment pour être adaptés à tout ça, ça ne peut pas fonctionner.</text:p>
      <text:p text:style-name="P6">Et dans 90 % des cas, on commence la Transformation par l’acquisition des nouveaux outils…’</text:p>
      <text:h text:style-name="Heading_20_3" text:outline-level="3"><text:bookmark-start text:name="__RefHeading___Toc1588_1115178054"/><text:span text:style-name="T1">L</text:span><text:bookmark-start text:name="_Toc131774397"/><text:span text:style-name="T1">’IT </text:span><text:bookmark-end text:name="_Toc131774397"/><text:span text:style-name="T1">Legacy : un boulet au pied du sprinter</text:span><text:bookmark-end text:name="__RefHeading___Toc1588_1115178054"/></text:h>
      <text:p text:style-name="P6">Deux petits avertissements pour commencer : tout d’abord les éléments que je vais présenter ici concernent presque exclusivement la gestion de l’IT dans les services financiers, ce qui est très particulier. Ensuite, quand je parle de sprinter, j’endosse le rôle d’un de ces directeurs de projet ou de programme dont je parlais plus haut. C’est aussi parce que je connais particulièrement bien ces fonctions, les ayant occupées pendant des années dans ma carrière.</text:p>
      <text:p text:style-name="P126"><text:span text:style-name="T1">Je vais d’abord présenter sommairement quelques généralités sur les SI</text:span><text:span text:style-name="T1"><text:note text:id="ftn11" text:note-class="footnote"><text:note-citation>11</text:note-citation><text:note-body><text:p text:style-name="P10">SI : Systèmes d’Information</text:p></text:note-body></text:note></text:span><text:span text:style-name="T1"> des entreprises financières, parce que ce n’est pas un sujet dont on parle couramment et que les phantasmes ont la vie dure dans la Tech. Donc, pour être clair : on est loin de Google ou d’Apple, mais ça fonctionne. Ça fonctionne d’ailleurs en général beaucoup mieux que ce que peuvent produire ces géants, quand on se focalise sur l’objectif : gérer des comptes et des contrats avec plein de chiffres dedans.</text:span></text:p>
      <text:p text:style-name="P6"><text:soft-page-break/>Par contre, c’est clairement beaucoup moins automatisé : ça occupe énormément de monde au quotidien et ça coûte très cher. Et c’est justement parce que ça coûte très cher que c’est un des objectifs majeurs de toute Transformation : la réduction des coûts de l’IT.</text:p>
      <text:p text:style-name="P6">Revenons sur ces fameux SI financiers : on y retrouve pratiquement toutes les technologies que l’informatique a mises en œuvre depuis les débuts du traitement automatisé de l’information en masse, dans les années 1960. On y trouve communément :</text:p>
      <text:list text:style-name="WWNum6">
        <text:list-item>
          <text:p text:style-name="P235">Des systèmes mainframe, autour de technologies datant des années 1970 (COBOL par exemple),</text:p>
        </text:list-item>
        <text:list-item>
          <text:p text:style-name="P235">Des bases de données SQL, autour de technologies disponibles dans les années 1990 telles que des bases de données Oracle,</text:p>
        </text:list-item>
        <text:list-item>
          <text:p text:style-name="P235">Des bases de données issues du milieu de l’open source, qui sont arrivées dans les grandes entreprises depuis le début des années 2000,</text:p>
        </text:list-item>
        <text:list-item>
          <text:p text:style-name="P235">Des systèmes Big Data, autour de technologies disponibles uniquement depuis les années 2010,</text:p>
        </text:list-item>
        <text:list-item>
          <text:p text:style-name="P235">Des bases de données NoSQL, pour stocker des données non-structurées (audio, vidéo, image…), autour de technologies disponibles uniquement depuis les années 2010,</text:p>
        </text:list-item>
        <text:list-item>
          <text:p text:style-name="P235">Des bases de données hébergées dans le Cloud, avec les dernières technologies des licornes des années 2020, telles que Snowflake,</text:p>
        </text:list-item>
        <text:list-item>
          <text:p text:style-name="P244"><text:soft-page-break/><text:span text:style-name="T1">Et on ajoute à tout ça tous les langages et les frameworks</text:span><text:span text:style-name="T1"><text:note text:id="ftn12" text:note-class="footnote"><text:note-citation>12</text:note-citation><text:note-body><text:p text:style-name="P10">Un framework informatique est un ensemble d’outils, de bibliothèques et de conventions de codage qui fournissent une structure de base pour développer des applications logicielles. Il permet aux développeurs de travailler de manière plus efficace en leur offrant des fonctionnalités prêtes à l’emploi et en leur permettant de se concentrer sur la résolution de problèmes spécifiques plutôt que sur des tâches de bas niveau.</text:p></text:note-body></text:note></text:span><text:span text:style-name="T1"> nécessaires pour les faire fonctionner…</text:span></text:p>
        </text:list-item>
      </text:list>
      <text:p text:style-name="P9"/>
      <text:p text:style-name="P6">Quand on complète tout ce panel avec de multiples développements à droite et à gauche dans les Directions métier, à partir des outils mis à disposition (Excel, Access ou SAS), on arrive à un embrouillamini indescriptible et incompréhensible où même la plus organisée des chattes n’y retrouverait pas ses petits.</text:p>
      <text:p text:style-name="P6">Et tout ce joli petit monde, assisté par des milliers de spécialistes, doit cohabiter dans un joyeux bordel, parce que tous ces éléments disparates sont indispensables au fonctionnement de l’entreprise ! Une société financière manipule essentiellement des fichiers de nombres. Et sa principale activité est de surveiller ces fichiers. Tout le temps. Que ce soit pour des raisons économiques, opérationnelles ou réglementaires.</text:p>
      <text:p text:style-name="P6">Donc, tous ces travaux réalisés ont un sens, voire sont obligatoires pour la plupart. Il faut donc qu’ils soient réalisés coûte que coûte, Transformation ou pas Transformation. Il ne reste alors que deux options : soit on intègre ces travaux historiques dans le « scope » de la Transformation, soit on les conserve tels quels et on fait la Transformation à côté.</text:p>
      <text:p text:style-name="P6"><text:soft-page-break/>Les deux options sont possibles. Les deux options ont été tentées. Les deux options ont échoué dans l’effrayante majorité des cas. Voyons pourquoi.</text:p>
      <text:p text:style-name="P236"/>
      <text:p text:style-name="P40"><draw:custom-shape text:anchor-type="as-char" draw:z-index="10" draw:name="Forme4" draw:style-name="gr1" draw:text-style-name="P267" svg:width="1.19cm" svg:height="1.147cm"><text:p text:style-name="P218"><text:span text:style-name="T112">4</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3" text:outline-level="2"><text:bookmark-start text:name="__RefHeading___Toc1780_1115178054"/>Qu’est-ce qui plante une Transformation ?<text:bookmark-end text:name="__RefHeading___Toc1780_1115178054"/></text:h>
      <text:h text:style-name="P14" text:outline-level="3"><text:bookmark-start text:name="__RefHeading___Toc1590_1115178054"/>La force de la Loi<text:bookmark-end text:name="__RefHeading___Toc1590_1115178054"/></text:h>
      <text:p text:style-name="P6">La diversité des technologies informatiques que j’ai présentée précédemment n’est pas qu’une des causes des difficultés rencontrées pour mener à bien une Transformation réussie, mais c’est surtout la conséquence de la façon dont le milieu de la Finance a répondu à l’augmentation de la pression réglementaire ces dernières années, et plus particulièrement depuis 2008.</text:p>
      <text:p text:style-name="P126"><text:span text:style-name="T1">Attention : je ne dis pas que ces réglementations sont inutiles ou excessives. Vu comment les économies mondiales ont payé le prix fort en 2008 (et dans une moindre mesure lors des crises suivantes), il était indispensable de mettre des garde-fous pour éviter que des salauds inconscients sans foi ni loi ne puissent reproduire ces crises terribles. À noter que les réglementations qui ont été imposées ne sont pas là pour interdire de prendre des risques inconsidérés ou de faire des choses illégales, mais pour s’assurer que, quels que soient les aléas rencontrés, les systèmes sont assez solides </text:span><text:soft-page-break/><text:span text:style-name="T1">pour s’en sortir et continuer à faire fonctionner l’économie.</text:span></text:p>
      <text:p text:style-name="P6">Malheureusement, on ne pourra certainement jamais empêcher que des personnes sans morale ni conscience fassent n’importent quoi avec l’argent des autres. Il y a toujours eu des voleurs. Je crains qu’il y en aura toujours. Et l’innovation dans la Finance est au moins aussi inventive que dans la Tech. À nouvelles possibilités, nouvelles occasions de faire des bêtises avec…</text:p>
      <text:p text:style-name="P6">Donc, on ne peut que se rassurer du fait de l’existence de ces nouvelles réglementations qui font que notre argent est mieux protégé : je suis un client des banques et des assurances comme les autres et, à ce titre, je préfère savoir que mon propre fric est à l’abri !</text:p>
      <text:p text:style-name="P6">Donc, la Loi, c’est bien. Et bien alors, pourquoi ça a merdé ?</text:p>
      <text:h text:style-name="Heading_20_3" text:outline-level="3"><text:bookmark-start text:name="_Toc13177439211"/><text:bookmark-start text:name="__RefHeading___Toc1590_11151780541"/><text:span text:style-name="T1">L</text:span><text:bookmark-end text:name="_Toc13177439211"/><text:span text:style-name="T1">’art du mille-feuille</text:span><text:bookmark-end text:name="__RefHeading___Toc1590_11151780541"/></text:h>
      <text:p text:style-name="P6">J’ai parlé de diversité technologique tout à l’heure. Je vais maintenant présenter ça sous un autre prisme : celui de la paléontologie.</text:p>
      <text:p text:style-name="P6">Quel rapport entre des SI informatiques et la recherche de fossiles, me demanderez-vous ? Tout simplement, la notion de couches et de strates temporelles. En effet, chaque technologie représente une époque et chaque changement de strate technologique correspond en général à l’arrivée d’une nouvelle réglementation.</text:p>
      <text:p text:style-name="P126"><text:soft-page-break/><text:span text:style-name="T1">Il existe une Règle d’Or tacite et implicite en Finance : «</text:span><text:span text:style-name="T3"> Sauf pour répondre à de nouvelles exigences réglementaires, on ne modifie jamais un SI financier qui fonctionne</text:span><text:span text:style-name="T1">. »</text:span></text:p>
      <text:p text:style-name="P126"><text:span text:style-name="T1">Et quand on dit jamais, c’est vraiment jamais : à tel point que la majeure partie des systèmes cœurs qui gèrent les transactions financières entre banques ont été écrits en assembleur</text:span><text:span text:style-name="T1"><text:note text:id="ftn13" text:note-class="footnote"><text:note-citation>13</text:note-citation><text:note-body><text:p text:style-name="P10">L’assembleur est un langage de programmation de bas niveau qui permet de créer des programmes en utilisant des instructions directement compréhensibles par le processeur d’un ordinateur. Il se situe entre le langage machine (binaire) et les langages de haut niveau. Les programmes écrits en assembleur sont généralement plus rapides et plus optimisés que ceux écrits dans des langages de haut niveau, mais ils sont également plus difficiles à écrire et à maintenir.</text:p></text:note-body></text:note></text:span><text:span text:style-name="T1"> dans les années 1960. Ils fonctionnent toujours très bien et accomplissent toujours leurs fonctions sans faillir ni défaillir. D’ailleurs, il vaut mieux qu’ils n’aient pas de problème. Ceux qui ont créé et développé ces programmes sont décédés maintenant et personne ne comprend plus ces technologies…</text:span></text:p>
      <text:p text:style-name="P126"><text:span text:style-name="T1">Lorsqu’une nouvelle réglementation débarque et impose de nouvelles contraintes, il convient tout d’abord d’évaluer si ce qui est demandé est implémentable avec la technologie utilisée historiquement. La plupart du temps, vu que ça n’avait pas été envisagé initialement, c’est compliqué, long à mettre en œuvre et ça coûte très cher : en IT, ce sont surtout les modifications de l’existant qui sont douloureuses ; partir </text:span><text:span text:style-name="T5">from scratch</text:span><text:span text:style-name="T1"> est toujours plus facile. Donc, faire évoluer le système existant est quelquefois possible, mais il arrive toujours un moment où ça coince.</text:span></text:p>
      <text:p text:style-name="P126"><text:soft-page-break/><text:span text:style-name="T1">C’est à ce moment-là qu’on se dit qu’on va construire quelque chose de nouveau « au-dessus » de l’existant en utilisant les toutes dernières technologies disponibles à date. Et on crée ainsi une nouvelle strate technologique.</text:span></text:p>
      <text:p text:style-name="P6">Pourquoi est-ce qu’on ne récrit pas l’existant avec les possibilités offertes par la nouvelle technologie ? En effet, quand on examine posément les possibilités de faire, on a clairement deux options à chaque fois :</text:p>
      <text:list text:style-name="WWNum7">
        <text:list-item>
          <text:p text:style-name="P245"><text:span text:style-name="T9">Option 1 :</text:span><text:span text:style-name="T1"> je crée une nouvelle couche technologique au-dessus des couches existantes,</text:span></text:p>
        </text:list-item>
        <text:list-item>
          <text:p text:style-name="P245"><text:span text:style-name="T9">Option 2 :</text:span><text:span text:style-name="T1"> je reprends tout l’existant écrit dans l’ancienne technologie et je le migre dans la nouvelle technologie.</text:span></text:p>
        </text:list-item>
      </text:list>
      <text:p text:style-name="P6">Intellectuellement, la deuxième solution est très attrayante. En plus, c’est le moyen de faire régulièrement le « ménage » dans les vieux codes pour les nettoyer et les optimiser avec les possibilités offertes par les nouvelles technologies. C’est d’ailleurs ce qui était fait partout jusqu’à l’aube des années 2000.</text:p>
      <text:p text:style-name="P6">Toutefois, avec l’arrivée de chaque nouvelle réglementation, est arrivé son lot de contraintes et de contrôles. Le monde financier n’est pas seulement extrêmement régulé pour le bien de tous, il est aussi tellement contrôlé qu’il a fallu mettre en place des certifications sur son fonctionnement à toutes les étapes. Et il y a plein d’organismes mandatés pour valider ces certifications imposées par les régulateurs.</text:p>
      <text:p text:style-name="P126"><text:soft-page-break/><text:span text:style-name="T1">Donc, si on adopte le mode « annule et remplace » vis-à-vis de l’ancien système, en faisant tout basculer dans un nouveau qui reprend l’intégralité des fonctionnalités de l’ancien, il faut également refaire certifier ce nouveau système. Ce qui coûte très cher et prend un temps considérable. On peut estimer que le coût de la re-certification est égal au coût de développement de la nouvelle solution.</text:span></text:p>
      <text:p text:style-name="P6">Quand on présente ces alternatives dans un joli slide aux dirigeants, sachant qu’ils sont déjà excédés par le fait qu’ils sont obligés de mettre en place une nouvelle réglementation qu’ils n’ont jamais demandée, on obtient ce genre de choix, en grossissant le trait :</text:p>
      <text:list text:continue-numbering="true" text:style-name="WWNum7">
        <text:list-item>
          <text:p text:style-name="P245"><text:span text:style-name="T9">Option 1 : </text:span><text:span text:style-name="T1">coûte un bras, va prendre deux ans, mais on est obligé de le faire,</text:span></text:p>
        </text:list-item>
        <text:list-item>
          <text:p text:style-name="P245"><text:span text:style-name="T9">Option 2 :</text:span><text:span text:style-name="T1"> coût triplé </text:span><text:span text:style-name="T5">a minima</text:span><text:span text:style-name="T1"> (développement des nouvelles fonctionnalités + migration des anciennes fonctionnalités + re-certification), délai quadruplé, pas d’avantage concurrentiel, pas d’amélioration fonctionnelle.</text:span></text:p>
        </text:list-item>
      </text:list>
      <text:p text:style-name="P6">La décision est généralement rapide. Et l’option 2 vite oubliée. Voilà comment on lance la construction d’un mille-feuille technologique. On verra un peu plus loin qu’il y a des arguments qui ont été « oubliés » dans les slides Powerpoint, mais comme c’étaient de mauvaises nouvelles…</text:p>
      <text:h text:style-name="P14" text:outline-level="3"><text:bookmark-start text:name="__RefHeading___Toc2277_1115178054"/><text:soft-page-break/>Vingt ans après…<text:bookmark-end text:name="__RefHeading___Toc2277_1115178054"/></text:h>
      <text:p text:style-name="P126"><text:span text:style-name="T1">Il y a une règle qu’il ne faut jamais oublier quand on travaille dans des systèmes aussi complexes que les systèmes d’information financiers, avec autant de contraintes et de variables, sans que personne n’ait la capacité de tout comprendre et de tout synthétiser. Cette règle tient en deux mots : Murphy rules</text:span><text:span text:style-name="T1"><text:note text:id="ftn14" text:note-class="footnote"><text:note-citation>14</text:note-citation><text:note-body><text:p text:style-name="P10">La règle de Murphy, souvent appelée « Loi de Murphy », est une règle empirique qui stipule que si quelque chose peut mal tourner, cela finira inévitablement par mal tourner. En d’autres termes, elle suggère que tout ce qui peut mal se passer se produira, et au pire moment possible. La règle de Murphy est souvent citée en ingénierie, en informatique et dans d’autres domaines où les erreurs peuvent avoir des conséquences importantes, afin d’encourager les professionnels à anticiper les problèmes potentiels et à prendre des mesures pour les éviter.</text:p></text:note-body></text:note></text:span><text:span text:style-name="T1">.</text:span></text:p>
      <text:p text:style-name="P6">Et, dans ce cas précis, Murphy s’est lâché !</text:p>
      <text:p text:style-name="P6">Malgré Nostradamus, malgré les travaux d’actuariat, malgré les promesses des cabinets de conseil en stratégie, il faut rappeler une évidence : personne ne sait prédire le futur. Au mieux, on va faire des statistiques et établir des probabilités, mais personne ne sait de quoi demain sera fait.</text:p>
      <text:p text:style-name="P6">Ainsi, personne n’avait anticipé que, sur les vingt dernières années, on assisterait à la fois à :</text:p>
      <text:list text:style-name="WWNum8">
        <text:list-item>
          <text:p text:style-name="P237">Une augmentation et une accélération de la pression réglementaire, suite à des agissements inconsidérés d’une poignée de financiers irresponsables,</text:p>
        </text:list-item>
        <text:list-item>
          <text:p text:style-name="P237"><text:soft-page-break/>Un effondrement du coût du stockage et du traitement des données, par un facteur 100 000 sur la période,</text:p>
        </text:list-item>
        <text:list-item>
          <text:p text:style-name="P237">L’arrivée de nouvelles technologies autour du Big Data, de la data science et de l’IA, permise par cette baisse des coûts,</text:p>
        </text:list-item>
        <text:list-item>
          <text:p text:style-name="P237">La mise en place par l’UE de la réglementation RGPD pour protéger les données personnelles des citoyens européens.</text:p>
        </text:list-item>
      </text:list>
      <text:p text:style-name="P6">Prises séparément, ce sont toutes des bonnes nouvelles et de vraies avancées pour la société dans son ensemble. Personne, ni les cabinets de conseil, ni les astrologues consultés par certains dirigeants, n’avait anticipé que ces quatre ingrédients allaient précisément créer un cocktail détonnant vingt ans plus tard. Murphy est subtil et patient.</text:p>
      <text:h text:style-name="P15" text:outline-level="3"><text:bookmark-start text:name="__RefHeading___Toc1834_4288815894"/>Une combustion très très lente…<text:bookmark-end text:name="__RefHeading___Toc1834_4288815894"/></text:h>
      <text:p text:style-name="P6">Pour des raisons pragmatiques et économiques, le fameux mille-feuille technologique s’est peu à peu constitué sous la pression réglementaire, mais pas de façon linéaire et constante. Les métiers concernés ont tout d’abord essayé de trouver des solutions avec les services IT, mais ces derniers n’étaient pas adaptés pour répondre en temps et en heure aux exigences des régulateurs. On verra un peu plus loin pourquoi l’IT n’a pas su répondre à la demande et comment elle reste souvent à la traîne sur ces sujets.</text:p>
      <text:p text:style-name="P126"><text:span text:style-name="T1">Les métiers ont donc profité d’une première opportunité qui s’ouvrait à la fin des années 2000 quand de nombreux éditeurs ont commencé à </text:span><text:soft-page-break/><text:span text:style-name="T1">proposer des évolutions des outils d’analyse statistiques qu’ils utilisaient depuis des années pour les rendre plus interactifs et plus faciles d’emploi, avec des interfaces graphiques très conviviales. En combinant ces outils « user-friendly » et l’effondrement du prix du stockage, les métiers ont commencé à se convaincre que ce que l’IT faisait mal et pour des coûts exorbitants (selon eux), ils étaient tout à fait capables de le réaliser eux-mêmes avec les bons outils, et pour pas cher !</text:span></text:p>
      <text:p text:style-name="P126"><text:span text:style-name="T1">C’est le début de ce qu’on a rapidement appelé le « Shadow IT</text:span><text:span text:style-name="T1"><text:note text:id="ftn15" text:note-class="footnote"><text:note-citation>15</text:note-citation><text:note-body><text:p text:style-name="P10">Le Shadow IT fait référence à l’utilisation de logiciels, de services ou de technologies non approuvés par une organisation, souvent par des employés, sans la supervision ou l’approbation de l’IT ou de la direction de l’entreprise.</text:p></text:note-body></text:note></text:span><text:span text:style-name="T1"> », autour de technologies aussi diverses que SAS, Excel ou Access. À noter que, avec des personnes astucieuses, talentueuses et volontaires, il est très possible de réaliser des applications très complexes avec des logiciels aussi basiques qu’Excel ou Access. C’est ainsi que des pans entiers de réglementations ont peu à peu été couverts par ce Shadow IT, sous contrôle direct des métiers et sans aucun contrôle de l’IT historique.</text:span></text:p>
      <text:p text:style-name="P6">Toutefois, même si certaines conséquences de ces décisions sont négatives, comme on le verra plus loin, il ne faut pas jeter la pierre à ceux qui les ont prises et qui ont réalisé ces travaux : ils n’ont fait que répondre à une obligation légale, avec des moyens dérisoires, parce que leur IT était incapable de répondre dans les délais imposés par le régulateur.</text:p>
      <text:p text:style-name="P6">Pour faire leurs travaux, souvent basés sur des analyses statistiques de grande ampleur, les métiers <text:soft-page-break/>se sont débrouillés comme ils le pouvaient : ils ont réalisé des extractions de données dans les différents systèmes de gestion de l’entreprise, ont effectué les analyses demandées et ont livré au régulateur les reportings <text:span text:style-name="T153">exigés</text:span>. Ils ont fait leur job. Et ils continuent de le faire avec ces outillages jusqu’à maintenant. Fin de la phase 1.</text:p>
      <text:p text:style-name="P6">La phase 2 a été déclenchée par l’arrivée des technologies qu’on a qualifié de « Big Data » : on avait enfin la possibilité de stocker tout ce qu’on voulait (données de gestion, mais aussi images, vidéos, enregistrements audio, données de capteurs…) presque sans limite. Par rapport à la décennie précédente, le coût est devenu ridiculement bas et ça a ouvert des perspectives inédites pour analyser les données, quelles qu’elles soient. Parce qu’avec le Big Data a explosé la data science et son rejeton, l’Intelligence Artificielle.</text:p>
      <text:p text:style-name="P126"><text:span text:style-name="T1">Répondant à la tendance humaine bien connue du « </text:span><text:span text:style-name="T4">si c’est gratuit, j’en prendrai deux</text:span><text:span text:style-name="T1"> », on a construit des datalakes</text:span><text:span text:style-name="T1"><text:note text:id="ftn16" text:note-class="footnote"><text:note-citation>16</text:note-citation><text:note-body><text:p text:style-name="P10">Un datalake est une plateforme de stockage de données qui permet de stocker et de traiter de grands volumes de données, structurées et non structurées, provenant de diverses sources, dans leur format d’origine.</text:p></text:note-body></text:note></text:span><text:span text:style-name="T1"> un peu partout et on a commencé à les alimenter avec toutes les informations qu’on avait sous la main. C’était la grande époque des POC Big Data dans tous les services IT des Grands Groupes. Et on en a stocké des trucs. Plein. Pendant des mois, voire des années. Jusqu’à ce qu’on ne sache plus ce qu’on avait dans les datalakes, tellement il y en avait. Et rapidement, on n’a plus su quoi en faire, même si quelques applications très critiques ont été montées dans ces datalakes, histoire de justifier les investissements </text:span><text:soft-page-break/><text:span text:style-name="T1">colossaux qui ont été entrepris. Mais, pour le reste, le datalake s’est peu à peu transformé en data swamp</text:span><text:span text:style-name="T1"><text:note text:id="ftn17" text:note-class="footnote"><text:note-citation>17</text:note-citation><text:note-body><text:p text:style-name="P10">Un data swamp est un environnement de données mal organisé et mal géré, caractérisé par une accumulation de données inutiles, mal étiquetées, non structurées et de qualité médiocre, ce qui rend difficile l’analyse et l’utilisation efficace de ces données.</text:p></text:note-body></text:note></text:span><text:span text:style-name="T1"> et les expérimentations se sont peu </text:span><text:span text:style-name="T12">à peu</text:span><text:span text:style-name="T1"> éteintes. Fin de la phase 2.</text:span></text:p>
      <text:p text:style-name="P6">La phase 3 est arrivée avec la mise en place de la réglementation RGPD sur la protection des données personnelles. Et c’est à partir de ce moment-là que les choses se sont vraiment compliquées : cette réglementation impose de traiter de façon fondamentalement différente les données personnelles des individus et, en particulier, des clients. Or les entreprises financières manipulent énormément de données personnelles, au sens RGPD. Quant aux entreprises d’assurance, on peut même dire que c’est leur activité essentielle depuis toujours.</text:p>
      <text:h text:style-name="P14" text:outline-level="3"><text:bookmark-start text:name="__RefHeading___Toc1836_4288815894"/>L’épée de Damoclès<text:bookmark-end text:name="__RefHeading___Toc1836_4288815894"/></text:h>
      <text:p text:style-name="P6">Et c’est là que le bât blesse : la réglementation RGPD impose de nouvelles façons de faire, mais les SI existants ne fonctionnent pas de cette manière. Et n’ont même jamais été conçus pour fonctionner de cette manière. Et comme toujours, la réglementation ne précise pas comment l’appliquer. Elle exige seulement qu’elle soit appliquée. Et cette fois, c’est beaucoup plus compliqué que les fois précédentes : la nouvelle réglementation s’applique sur toutes les données personnelles ; et surtout, ça concerne toutes <text:soft-page-break/>les données personnelles qui sont utilisées dans toutes les couches du mille-feuille.</text:p>
      <text:p text:style-name="P6">Forcément, ça remet en cause le concept même du mille-feuille qui a été tranquillement élaboré sur deux décennies ! Actuellement, personne ne sait comment résoudre ce problème : doit-on tout casser et tout reconstruire, avec des délais et des coûts absolument incontrôlables, ou va-t-on trouver une solution miracle pour résoudre le problème en l’abordant selon une toute nouvelle approche « disruptive » ? Le miracle est possible, quoique peu probable, comme on l’a vu précédemment.</text:p>
      <text:p text:style-name="P6">Mais dans tous les cas, tant que la solution n’est pas trouvée, chaque société risque la Sanction. Et pour tous les groupes financiers, la hauteur de la sanction est astronomique : 4 % du chiffre d’affaires annuel mondial de chaque groupe ! Rien que si on prend les trois premières banques françaises (BNP Paribas, Société Générale et Crédit Agricole), cela représente à chaque fois entre un et deux milliards d’euros ; sans compter l’impact d’image et la perte de clientèle que ça entraîne…</text:p>
      <text:p text:style-name="P126"><text:span text:style-name="T1">Et tout ça ne concerne que la partie émergée : sous la surface, il y a tout le Shadow IT. Personne ne sait vraiment comment les données sont extraites : peu ou pas de documentation, des solutions bout-de-ficelle, un turn-over important… ça n’aide pas à tout comprendre. Et, selon la réglementation RGPD, le seul fait d’extraire des données personnelles, pour quelque usage que ce soit, doit être documenté et justifié. Bref, pour se mettre en conformité, il faudrait « soulever le capot » et vérifier tous les codes de toutes les extractions pour les documenter </text:span><text:span text:style-name="T5">a </text:span><text:soft-page-break/><text:span text:style-name="T5">posteriori</text:span><text:span text:style-name="T1">. Le travail est colossal et risque de déterrer des cadavres que personne ne veut voir.</text:span></text:p>
      <text:p text:style-name="P6">Comment présenter ça dans un joli slide à des dirigeants financiers ?</text:p>
      <text:list text:style-name="WWNum9">
        <text:list-item>
          <text:p text:style-name="P238">Gain économique : zéro</text:p>
        </text:list-item>
        <text:list-item>
          <text:p text:style-name="P238">Gain opérationnel : zéro</text:p>
        </text:list-item>
        <text:list-item>
          <text:p text:style-name="P238">Coût : non évaluable</text:p>
        </text:list-item>
        <text:list-item>
          <text:p text:style-name="P238">Risque : peut-être 1 milliard ou plus, mais c’est pas sûr. Par contre, si ça arrive, c’est chaud !</text:p>
        </text:list-item>
      </text:list>
      <text:p text:style-name="P6">Face à un risque potentiel aussi vague, il y a en général d’autres priorités qui sont plus importantes et la remontée de ce genre de problématique est reportée… aux calendes grecques, dans le meilleur des cas.</text:p>
      <text:h text:style-name="P14" text:outline-level="3"><text:bookmark-start text:name="__RefHeading___Toc1838_4288815894"/>La malédiction des sociétés qui ont du fric<text:bookmark-end text:name="__RefHeading___Toc1838_4288815894"/></text:h>
      <text:p text:style-name="P6">Dans le contexte économique actuel, avec l’inflation galopante, la crise énergétique et l’incertitude économique liée aux aléas climatiques, le milieu financier fait preuve d’une stabilité étonnante. C’est actuellement le seul secteur économique que les actions de Poutine n’ont pas impacté : l’argent coule à flot, les bénéfices s’accumulent et les actionnaires sont contents.</text:p>
      <text:p text:style-name="P6">Et ça dure depuis la crise des subprimes en 2008 ! On peut raisonnablement penser que c’est la conséquence de toutes les réglementations que l’UE a imposées, mais ça a réellement rendu le système financier imperméable à tous les aléas rencontrés ces quinze dernières années. Et durant toute cette période ces banques, ces assurances, ces sociétés de gestion ont fait ce pour quoi elles ont été conçues : <text:soft-page-break/>faire du fric. Et elles ont parfaitement rempli leur mission.</text:p>
      <text:p text:style-name="P126"><text:span text:style-name="T1">Donc, depuis quinze ans, les caisses sont pleines. Les banques de détail peuvent éventuellement arguer du fait que la concurrence des pure-players du numérique leur taille des croupières, mais au final les groupes se portent très bien et battent régulièrement des records de bénéfices et de dividendes versés. Et quand ces groupes financiers disposent en plus d’une activ</text:span><text:span text:style-name="T11">it</text:span><text:span text:style-name="T1">é d’assurance, et plus particulièrement d’assurance-vie, c’est le jackpot : la fiscalité très favorable de l’assurance-vie en fait des machines à cash très, très, très rentable</text:span><text:span text:style-name="T11">s</text:span><text:span text:style-name="T1">. Bref, depuis vingt ans, les moyens étaient disponibles.</text:span></text:p>
      <text:p text:style-name="P6">Mais l’argent, c’est aussi le pouvoir. Et beaucoup d’argent, c’est beaucoup de pouvoir. Des fois, autant de pouvoir, ça peut faire tourner la tête et donner la volonté d’exercer ce pouvoir. Et dans cette relation de qui manie le mieux le bâton et la carotte, il faut rappeler une façon très commune d’aborder les rapports de pouvoir dans les sociétés financières : les métiers de la Finance représentent des Centres de Profit et l’IT représente un Centre de Coût.</text:p>
      <text:p text:style-name="P6">C’est une vision historique profondément ancrée, qui date des premiers temps de l’Informatique, mais qui n’a pas fondamentalement changé dans la mentalité des métiers de la Finance : à savoir que ce sont eux qui rapportent de l’argent et l’IT ne fait que le dilapider. Et, malgré tout ce que l’IT a permis de faire grâce à l’automatisation, le traitement en masse, les analyses… cette ségrégation persiste sans prendre en compte que le cœur de métier de ces sociétés financières <text:soft-page-break/>maintenant, c’est souvent l’IT, comme on l’a vu précédemment. Mais les habitudes ont la vie dure…</text:p>
      <text:p text:style-name="P6">Les métiers maîtrisent les cordons de la bourse : ils ont la possibilité de distribuer les fonds à qui et quand ils le veulent. Et il faut leur demander poliment pour les obtenir. C’est ça le vrai pouvoir dans une entreprise. Par contre, pour que ça marche, il faut que ces investissements soient correctement employés. Et ce n’est malheureusement pas toujours le cas. En fait, ces dernières années, on a plutôt constaté un manque criant d’investissements stratégiques et globalement un vieillissement des « infrastructures ». Comment a-t-on abouti à ce paradoxe ?</text:p>
      <text:h text:style-name="P26" text:outline-level="3"><text:bookmark-start text:name="__RefHeading___Toc2168_2769870995"/>L’anti darwinisme social<text:bookmark-end text:name="__RefHeading___Toc2168_2769870995"/></text:h>
      <text:p text:style-name="P27">J’aime bien donner des noms pompeux aux concepts fumeux que j’invente : c’est un truc de consultant pour paraître intelligent. Mais dans ce cas, c’est marrant parce que c’est justement le contre-pied exact d’un concept de consultant qui circule depuis des années : le darwinisme social.</text:p>
      <text:p text:style-name="P27">En gros, le darwinisme social, ce sont quelques génies auto-déclarés qui ont inventé le concept que la sélection naturelle s’applique aussi au Marché : seuls les plus adaptés survivent. En corollaire, ça veut dire que la concurrence et la pression du marché créent un contexte évolutif positif à l’innovation et aux solutions disruptives. Sur le papier.</text:p>
      <text:p text:style-name="P185"><text:span text:style-name="T1">Dans le cas des Grands Groupes financiers systémiques, ce n’est pas le cas. Mais alors pas du </text:span><text:soft-page-break/><text:span text:style-name="T1">tout. En fait, depuis 2008, on a construit un contexte de stabilité pour ces entreprises, suivant le principe du « too big to fail</text:span><text:span text:style-name="T1"><text:note text:id="ftn18" text:note-class="footnote"><text:note-citation>18</text:note-citation><text:note-body><text:p text:style-name="P10">Le concept de « too big to fail » (trop gros pour faire faillite) fait référence à l’idée qu’une entreprise ou une institution financière est considérée comme étant tellement grande et importante pour l’économie qu’elle ne peut pas se permettre de faire faillite. Par conséquent, elle peut recevoir un soutien financier du gouvernement ou de la banque centrale pour éviter une crise économique majeure. Ce concept est souvent associé aux grandes banques et institutions financières qui ont un impact significatif sur l’économie mondiale.</text:p></text:note-body></text:note></text:span><text:span text:style-name="T1"> » : quoi qu’il arrive, le niveau des réserves financières de la société et le soutien inconditionnel du système politique et économique font que ces organismes seront renfloués en cas de gros pépin. Ça fera certainement un peu de dégâts collatéraux, mais c’est le prix de l’immortalité.</text:span></text:p>
      <text:p text:style-name="P27">Donc, forcément, le rapport au risque change dans ce cas. Non pas que les dirigeants vont prendre plus de risques, par habitude et pour ménager les dividendes des actionnaires, mais le problème de la survie immédiate sort de l’équation.</text:p>
      <text:p text:style-name="P27">Quand, en plus, cet organisme est assis sur un tas d’or de plusieurs centaines de milliards d’euros avec une fiscalité très favorable et des engagements sur des dizaines d’années, comme dans le cas de l’assurance-vie par exemple, la notion même de l’urgence à s’adapter disparaît. La seule urgence, c’est le régulateur qui va la mettre quand il va demander l’application d’une nouvelle réglementation à telle ou telle date.</text:p>
      <text:p text:style-name="P27">Et encore, même ça ce n’est pas gagné ! Il est souvent plus économique de ne pas appliquer la réglementation que de se mettre en conformité : le <text:soft-page-break/>coût de l’amende est souvent dérisoire par rapport au coût de mise en place de la solution qui va assurer la future conformité ; donc pourquoi se violenter pour rien ?</text:p>
      <text:p text:style-name="P27">Les régulateurs européens se sont récemment rendu compte de ce biais et commencent à suivre ce que les américains appliquent depuis des années déjà : des amendes qui font vraiment mal. Et vu la surface financière de ces titans, il faut parler en milliards d’euros. C’est le seul moyen pour qu’ils commencent à envisager de se poser des questions sur une éventuelle opportunité de lancer une réflexion sur la possibilité de bouger dans quelques années : des dinosaures, je le répète…</text:p>
      <text:p text:style-name="P27">Donc, pour résumer : on a un système qui s’est tranquillement encroûté dans une routine confortable et rentable, où tout incite à ne pas se presser. Il est urgent d’attendre : de toute façon, l’argent tombe dans les caisses et rien ne menace l’entreprise.</text:p>
      <text:p text:style-name="P27">Dans ces conditions, c’est la vision stratégique qui se rétrécit peu à peu : pas besoin d’être visionnaire quand les résultats sont assurés et prévisibles. Mais ce n’est pourtant pas une raison pour afficher un sourire de façade : les dirigeants doivent toujours valoriser leurs actions, quitte à changer complètement de discours en fonction de l’actualité. Ainsi, juste avant la pandémie, le gros souci chez les financiers européens, c’était les taux bas. A cause de ces taux bas, le contexte était difficile et la faillite à nos portes. Ensuite, on a eu le COVID : à cause de la pandémie, le contexte était difficile et la faillite à nos portes. Et maintenant, <text:span text:style-name="T154">ce sont</text:span> les conséquences de la guerre en Ukraine, le contexte inflationniste et la remontée des taux. Et <text:soft-page-break/>devinez ? À cause de ces taux élevés, le contexte est difficile et la faillite à nos portes !</text:p>
      <text:p text:style-name="P27">Après avoir bien rigolé sur le manque d’imagination autour de ces communications, comprenons le pourquoi de ces attitudes de drama queens : tout simplement l’appât du gain, comme toujours. L’agitation du spectre de la faillite, c’est bien entendu un leurre : le vrai souci, pour ces dirigeants, c’est d’assurer le niveau de rentabilité pour les actionnaires. Or, quand on a passé quinze ans à battre des records tous les ans, la barre est haute et les actionnaires exigeants.</text:p>
      <text:p text:style-name="P27">Forcément, si on compare le niveau de rentabilité avec l’industrie, par exemple, on comprend vite pourquoi les industriels sont obligés d’innover en permanence pour conserver ou améliorer leurs marges, si étroites soient-elles. Ainsi, si on compare avec les 5 à 10 % de marge bénéficiaire moyenne dans l’industrie automobile, la Finance propose des rentabilités jusqu’à trois fois plus importantes. Ça permet de relativiser.</text:p>
      <text:h text:style-name="P16" text:outline-level="3"><text:bookmark-start text:name="__RefHeading___Toc4331_2769870995"/>Un peu de politique…<text:bookmark-end text:name="__RefHeading___Toc4331_2769870995"/></text:h>
      <text:p text:style-name="P27">Tout ce contexte où l’urgence a disparu a permis le retour en force de la deuxième force motrice des Grands Groupes, après l’argent : la politique interne. Ou comment gérer ses réseaux et ses allégeances dans un système féodal d’entreprise. Et le meilleur outil pour ça reste le clientélisme.</text:p>
      <text:p text:style-name="P27">Essayons de nous mettre dans la tête du dirigeant à ce moment-là : il a intérêt à favoriser budgétairement tout ce qui va permettre d’asseoir son pouvoir. Et il ne va pas non plus refiler trop <text:soft-page-break/>d’argent à l’IT : de toute façon, ils coûtent cher et les métiers assurent qu’ils peuvent faire mieux, plus vite et beaucoup moins cher. En plus, il y a plein de nouveaux outils formidables qui sont sortis : les cabinets de conseil lui en ont déjà présenté quelques-uns et ça a été abordé au dernier dîner des dirigeants financiers. De toute façon, il ne comprend pas grand-chose à ces trucs techniques et, si on prend des cabinets de conseil, c’est aussi pour leur faire confiance, non ?</text:p>
      <text:p text:style-name="P27">Visiblement, c’est du gagnant-gagnant. Et personne ne lui a remonté des signaux négatifs dans les jolis slides des comités où ils en ont parlé, bien entendu. Objectivement, il prend la meilleure décision possible, dans ce contexte. Sauf que les cabinets n’ont pas forcément les mêmes intérêts et les mêmes objectifs que le dirigeant d’entreprise…</text:p>
      <text:p text:style-name="P27">Dans la plupart des cas, les consultants des cabinets en stratégie n’y comprennent pas plus sur les enjeux technologiques ou juridiques que les dirigeants qu’ils sont censés conseiller : ce ne sont ni des ingénieurs, ni des juristes, voilà tout. Ils vont donc conseiller en fonction de leurs propres affinités et compréhensions, qui ont la plupart du temps un tropisme très fort vers les métiers, ayant fait les mêmes études et travaillé sur des sujets similaires.</text:p>
      <text:p text:style-name="P27">Et surtout, dans ces approches métiers, la solution va toujours être basée sur des hommes et des femmes qui vont devenir immédiatement ce qu’on appelle des ressources clés dans l’entreprise. En d’autres termes, s’ils ne sont plus là, tout s’arrête. Il suffit que, pour des raisons d’urgence ou de saturation opérationnelle, les nouveaux processus impliquant ces ressources clés ne soient pas <text:soft-page-break/>documentés pour qu’on transforme ces ressources clés en bibliothèques vivantes : comme dans les pays de culture orale, à chaque fois qu’une de ces ressources part (mobilité, démission, burn-out, maladie…), c’est une bibliothèque qui brûle et un service qui s’arrête. On comprend le stress associé à ce genre de fonctions.</text:p>
      <text:p text:style-name="P27">Ensuite, le cabinet doit vendre des prestations et remplir des missions. Plus il vend de prestations, mieux c’est pour lui. Et toute mission a toujours un début et une fin. Après la mission, la responsabilité du cabinet n’est plus engagée, s’il a effectivement livré les livrables attendus. Et comme je l’ai déjà dit, personne ne sait prédire l’avenir…</text:p>
      <text:p text:style-name="P27">Donc, les conséquences à vingt ans de solutions prises dans l’urgence pour répondre à des obligations réglementaires, pour d’obscures raisons techniques ou juridiques, ça n’est pas du tout de leur responsabilité. Leur intérêt est plutôt de s’aligner sur les intérêts du dirigeant et de consolider leur relation avec l’entreprise ; c’est le gage de futurs contrats.</text:p>
      <text:p text:style-name="P27">Tout ça va également renforcer le lien de vassalité entre le dirigeant et les directions qui le soutiennent. Comme dans tout système politique, ce n’est pas la vision à long terme qui compte, mais la survie et la réélection.</text:p>
      <text:h text:style-name="P26" text:outline-level="3"><text:bookmark-start text:name="__RefHeading___Toc2310_2769870995"/>Et comment on assure la Prod dans tout ça ?,<text:bookmark-end text:name="__RefHeading___Toc2310_2769870995"/></text:h>
      <text:p text:style-name="P27">Revenons à nos moutons, sur la question qui nous avait guidé vers toutes ces explications : pourquoi est-il si difficile de mener de front une Transformation et la Production des travaux du <text:soft-page-break/>quotidien ? La réponse est au final très simple : tout simplement parce que ça retombe toujours sur les mêmes !</text:p>
      <text:p text:style-name="P27">La Transformation s’adresse toujours en priorité aux fonctions les plus critiques de l’entreprise, parce que justement elles sont critiques. Plus précisément, si la Transformation ne s’adressait pas à ces fonctions, elle ne répondrait pas à ses objectifs de base, qui sont justement de sécuriser et d’améliorer les fonctions critiques de l’entreprise ! En même temps, ces fonctions sont critiques parce qu’elles produisent des résultats fondamentaux pour l’entreprise, avec des sachants rares qui sont les seuls à savoir produire ces résultats.</text:p>
      <text:p text:style-name="P185"><text:span text:style-name="T1">Si on leur demande de s’impliquer dans la Transformation, ils ne peuvent plus produire ce qui est </text:span><text:span text:style-name="T14">la </text:span><text:span text:style-name="T1">raison d’être de leurs services. Et s’ils ne s’impliquent pas, la Transformation ne peut pas se faire. Mais la Transformation est d’abord destinée à améliorer le fonctionnement de ces services. On appelle cette figure de style un Ouroboros</text:span><text:span text:style-name="T1"><text:note text:id="ftn19" text:note-class="footnote"><text:note-citation>19</text:note-citation><text:note-body><text:p text:style-name="P10">Un ouroboros est un symbole représentant un serpent ou un dragon qui se mord la queue, créant ainsi un cercle ou une boucle infinie.</text:p></text:note-body></text:note></text:span><text:span text:style-name="T1">.</text:span></text:p>
      <text:p text:style-name="P27">Donc, concernant nos deux alternatives :</text:p>
      <text:list text:style-name="WWNum10">
        <text:list-item>
          <text:p text:style-name="P239">Intégrer les travaux de Production dans le « scope » de la Transformation : trop difficile, parce que les opérationnels ne peuvent pas dégager suffisamment de temps pour s’impliquer dans la Transformation en assurant la Production,</text:p>
        </text:list-item>
        <text:list-item>
          <text:p text:style-name="P239"><text:soft-page-break/>Faire la Transformation à côté : la Transformation perd pratiquement tout son intérêt parce qu’elle ne va pas sécuriser la production de résultats critiques pour l’entreprise.</text:p>
        </text:list-item>
      </text:list>
      <text:p text:style-name="P27">Donc, deux impasses. Et la disponibilité des sachants est d’autant plus limitée que le process est faiblement automatisé. Or, les fameux logiciels miracles ne sont généralement pas prévus pour l’automatisation : ils sont destinés à une utilisation directe par des opérationnels métiers. Ils vont simplement constituer une couche supplémentaire tout en haut du mille-feuille.</text:p>
      <text:p text:style-name="P27">Le seul moyen de résoudre ce dilemme est de prendre le temps et de mettre les moyens de documenter ces process, de trouver les bons outils et de mettre en place les automatisations nécessaires. Et il ne faut pas oublier également le temps et le coût à consacrer à la certification de ce nouveau mode opératoire.</text:p>
      <text:p text:style-name="P27">Mais c’est un travail de très longue haleine qui s’inscrit très difficilement dans le contexte d’une Transformation où il faut présenter rapidement des résultats visibles à des coûts réduits. Pas facile d’expliquer tout ça sur un joli slide sans que ça puisse être interprété comme une mauvaise nouvelle…</text:p>
      <text:p text:style-name="P8"/>
      <text:p text:style-name="P25">En conclusion, il n’y a pas qu’un seul moyen de planter une Transformation. On peut même dire qu’il y a même nettement plus de raisons de la planter que de raisons de la réussir. Toutefois, si on veut la réussir, il faut bien comprendre le contexte, les difficultés structurelles et organisationnelles et surtout les personnes. Malheureusement, dans la plupart des Transformations à marche forcée, les personnes sont trop souvent des variables d’ajustement et on ne cherche pas réellement à les embarquer, faute de moyens alloués : comme on va le voir, malgré les budgets pharaoniques qui peuvent être alloués à une Transformation, la part consacrée à réellement se transformer est toujours minime, du fait des héritages dont on a déjà parlé.</text:p>
      <text:p text:style-name="P126"><text:span text:style-name="T1">Et tout ça ne p</text:span><text:span text:style-name="T102">rend même pas en compte le contexte réglementaire : est-ce qu’ils ont réellement le droit de faire ce qu’ils envisagent ?</text:span></text:p>
      <text:p text:style-name="P6"/>
      <text:p text:style-name="P8"/>
      <text:p text:style-name="P41"><draw:custom-shape text:anchor-type="as-char" draw:z-index="11" draw:name="Forme5" draw:style-name="gr1" draw:text-style-name="P267" svg:width="1.19cm" svg:height="1.147cm"><text:p text:style-name="P219"><text:span text:style-name="T116">5</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3" text:outline-level="2"><text:bookmark-start text:name="__RefHeading___Toc1592_111517805411"/>Dura Lex, sed Lex<text:bookmark-end text:name="__RefHeading___Toc1592_111517805411"/></text:h>
      <text:h text:style-name="P14" text:outline-level="3"><text:bookmark-start text:name="__RefHeading___Toc2560_4125847080"/>La Loi, c’est bien. Mais le Droit, c’est compliqué !<text:bookmark-end text:name="__RefHeading___Toc2560_4125847080"/></text:h>
      <text:p text:style-name="P126"><text:span text:style-name="T1">On vient de voir que les occasions d’échouer liées au contexte interne ne manquent pas, mais ce ne sont pas les seules ! Il faut aussi prendre en compte le contexte global dans lequel s’inscrit cette Transformation dans un grand groupe. Et sur la composition m</text:span><text:span text:style-name="T19">ê</text:span><text:span text:style-name="T102">me d’un grand groupe financier.</text:span></text:p>
      <text:p text:style-name="P114">Je vais prendre pour exemple un grand groupe de bancassurance français, qui est en fait constitué d’une foultitude d’entités différentes, chacune représentée sous la forme d’une société de raison sociale différente. On va y trouver pêle-mêle des banques de détail, des banques d’investissement, des sociétés de crédit à la consommation, des sociétés de leasing, des compagnies d’assurances (Épargne, Retraite, Prévoyance, Dommages et Emprunteur), des sociétés de gestion d’actifs, des banques privées ou de gestion de fortunes, des sociétés de gestion immobilière… et en général quelques holdings pour consolider le tout.</text:p>
      <text:p text:style-name="P126"><text:span text:style-name="T102">Dans le groupe où je travaille actuellement, il y a ainsi plus de cent sociétés différentes qui </text:span><text:soft-page-break/><text:span text:style-name="T102">cohabitent en France et à l’International. Et c’est un cas assez banal, tous comptes faits, dans les Grands Groupes multinationaux.</text:span></text:p>
      <text:p text:style-name="P114">Cependant, ces Grands Groupes ont été créés sur la durée, par croissance interne et externe, pour répondre à des intérêts de développement stratégique et de consolidation financière afin de produire des résultats et rémunérer les actionnaires. Le concept même de bancassurance, par exemple, est un concept lié à une trajectoire stratégique et à des enjeux de consolidation comptable. Mais ce n’est pas un concept juridique. Et la Loi ne le reconnaît absolument pas.</text:p>
      <text:p text:style-name="P114">Ainsi, toutes les sociétés que j’ai décrites fonctionnent chacune dans leur contexte juridique et régalien propre : les banques avec les banques, les sociétés d’assurance avec les sociétés d’assurance, les compagnies immobilières avec les compagnies immobilières…</text:p>
      <text:p text:style-name="P114">Et, si la Loi permet à toutes ces compagnies de consolider leurs résultats financiers dans une même structure, elle ne permet pas de partager et de mutualiser les autres assets de l’entreprise. En particulier de mettre en commun le bien le plus précieux de ces sociétés qui ne font que manipuler des données tous les jours : la Data.</text:p>
      <text:h text:style-name="Heading_20_3" text:outline-level="3"><text:bookmark-start text:name="__RefHeading___Toc22732_554501683"/>La révolution de 2008<text:bookmark-end text:name="__RefHeading___Toc22732_554501683"/></text:h>
      <text:p text:style-name="P115">Rassurez-vous ! Des soixante-huitards attardés ne se sont pas dissimulés dans les sphères de la Finance pour prendre le pouvoir quarante ans plus tard ! Non, la raison est bien plus pragmatique : <text:soft-page-break/>quand on laisse les financiers pouvoir faire n’importe quoi, il y en a qui le font !</text:p>
      <text:p text:style-name="P115">Et la crise des subprimes de 2008 a fait mal, très mal. Plus encore que faire mal, elle a fait peur : les mêmes outils qui ont créé une richesse sans précédent dans l’histoire de l’humanité peuvent aussi servir à détruire cette richesse, sans que personne ne sache vraiment comment ni pourquoi.</text:p>
      <text:p text:style-name="P115">Suite à la crise financière de 2008, <text:span text:style-name="T208">l’UE</text:span> a décidé de mettre en place une série de réformes <text:span text:style-name="T208">pour</text:span> harmoniser et renforcer la législation en matière de régulation financière sur l’ensemble du territoire européen, <text:span text:style-name="T208">avec trois objectifs principaux :</text:span></text:p>
      <text:list text:style-name="L1">
        <text:list-item>
          <text:p text:style-name="P246">Combattre les risques d’une nouvelle crise bancaire en Europe <text:span text:style-name="T208">en</text:span> consolid<text:span text:style-name="T208">ant</text:span> et stabilis<text:span text:style-name="T208">ant</text:span> le secteur bancaire et financier européen. C’est le but des réformes visant à réaliser une « Union Bancaire européenne ».</text:p>
        </text:list-item>
        <text:list-item>
          <text:p text:style-name="P246">Empêcher la reproduction des mécanismes et des comportements susceptibles d’entraîner à nouveau une crise d’une gravité comparable à la crise des subprimes. Le renforcement de la réglementation des secteurs bancaire et financier et des mécanismes de leur surveillance <text:span text:style-name="T208">s</text:span>ont les principaux axes de réforme.</text:p>
        </text:list-item>
        <text:list-item>
          <text:p text:style-name="P246">Faire en sorte que le secteur bancaire et financier soit au service de l’économie et reconquérir la confiance des particuliers vis-à-vis du secteur bancaire et financier.</text:p>
        </text:list-item>
      </text:list>
      <text:p text:style-name="P115"/>
      <text:p text:style-name="P116"><text:soft-page-break/>Cela s’est traduit par une avalanche de textes et de directives que je ne vais pas énumérer ici, mais qui ont tous le même objectif : augmenter les fonds propres de l’entreprise et, surtout, mettre en place les mécanismes de contrôle qui s’en assurent. On ne peut que s’en féliciter, bien que cette nouvelle approche très réglementée ait eu une conséquence un peu inattendue dans la gouvernance des sociétés financières : la prise de pouvoir progressive des fonctions dites « régaliennes » dans les instances décisionnaires.</text:p>
      <text:p text:style-name="P116"><text:span text:style-name="T209">Si, pendant des années, les directions Juridiques, Conformité, Risques… ont été considérées au mieux comme un mal nécessaire et </text:span><text:span text:style-name="T214">au pire</text:span><text:span text:style-name="T209"> </text:span><text:span text:style-name="T210">comme des empêcheurs de faire du business librement, l’arrivée des nouvelles réglementations a fortement changé la donne. Ce sont elles maintenant qui valident les orientations du business en vérifiant leur conformité aux différentes réglementations et qui ont un droit de veto sur certains projets, si leur licéité</text:span><text:span text:style-name="T210"><text:note text:id="ftn20" text:note-class="footnote"><text:note-citation>20</text:note-citation><text:note-body><text:p text:style-name="P188"><text:span text:style-name="T211">Licéité : </text:span><text:span text:style-name="T213">Caractère de ce qui est licite, </text:span><text:span text:style-name="T212">conforme à la loi</text:span></text:p></text:note-body></text:note></text:span><text:span text:style-name="T210"> est hasardeuse.</text:span></text:p>
      <text:p text:style-name="P117">Par conséquent, leur statut dans l’entreprise s’en est trouvé grandement <text:span text:style-name="T214">renforcé</text:span> <text:span text:style-name="T214">et, sans faire complètement la pluie et le beau temps, elles ont maintenant souvent le dernier mot dans les projets métiers et IT. Ça n’a pas forcément amélioré l’opinion des directions métiers sur leur rôle, mais ça a surtout permis de prendre en compte les sujets réglementaires et juridiques de façon beaucoup plus rigoureuse </text:span><text:span text:style-name="T215">et constructive.</text:span></text:p>
      <text:p text:style-name="P118">En particulier, elles ont maintenant le pouvoir de mettre leur nez dans les différents projets ou <text:soft-page-break/>initiatives des métiers. Et on peut dire qu’ils sont créatifs dans leur envie d’utiliser les données qui sont confiées par leurs clients !</text:p>
      <text:h text:style-name="Heading_20_3" text:outline-level="3"><text:bookmark-start text:name="__RefHeading___Toc22734_554501683"/>N’oubliez pas : si c’est gratuit, c’est vous le produit<text:note text:id="ftn21" text:note-class="footnote"><text:note-citation>21</text:note-citation><text:note-body><text:p text:style-name="P189"><text:a xlink:type="simple" xlink:href="https://www.youtube.com/watch?v=8vLSf1i4E7A&amp;t=4s" text:style-name="Internet_20_link" text:visited-style-name="Visited_20_Internet_20_Link"><text:span text:style-name="T215">Just for the fun</text:span></text:a></text:p></text:note-body></text:note> !<text:bookmark-end text:name="__RefHeading___Toc22734_554501683"/></text:h>
      <text:p text:style-name="P114">Le phantasme le plus absolu de tous les dirigeants de sociétés appartenant à un groupe de bancassurance est de mixer les données de leurs clients pour avoir une connaissance parfaite de :</text:p>
      <text:list text:style-name="WWNum11">
        <text:list-item>
          <text:p text:style-name="P247">Leurs habitudes de consommation, via leurs paiements en CB et en ligne,</text:p>
        </text:list-item>
        <text:list-item>
          <text:p text:style-name="P247">Leur épargne bancaire et assurantielle,</text:p>
        </text:list-item>
        <text:list-item>
          <text:p text:style-name="P247">Tous les produits bancaires, assurantiels et immobiliers qu’ils possèdent</text:p>
        </text:list-item>
        <text:list-item>
          <text:p text:style-name="P247">Leur capital immobilier,</text:p>
        </text:list-item>
        <text:list-item>
          <text:p text:style-name="P247">Les informations que le client a remplies dans son questionnaire de santé lors de la souscription d’un contrat d’assurance-vie,</text:p>
        </text:list-item>
        <text:list-item>
          <text:p text:style-name="P248">etc.</text:p>
        </text:list-item>
      </text:list>
      <text:p text:style-name="P114">Sauf qu’ils non pas le droit. La Loi l’interdit. Et la Loi est là pour nous protéger tous :</text:p>
      <text:list text:style-name="L2">
        <text:list-item>
          <text:p text:style-name="P249">Le Secret Bancaire interdit aux banques de divulguer les informations financières sur leurs clients à des sociétés non bancaires.</text:p>
        </text:list-item>
        <text:list-item>
          <text:p text:style-name="P249">Le Secret Médical interdit aux sociétés d’assurance de transmettre des informations médicales de quelque nature que ce soit à d’autres sociétés.</text:p>
        </text:list-item>
        <text:list-item>
          <text:p text:style-name="P249"><text:soft-page-break/>La réglementation RGPD régule de façon très fine comment les données des clients doivent être collectées, manipulées et utilisées. Et, à part quelques cas spécifiques très clairement encadrés et décrits parfaitement par la réglementation, c’est toujours le client qui a le dernier mot en donnant son consentement explicite et éclairé à l’utilisation de ses données.</text:p>
        </text:list-item>
      </text:list>
      <text:p text:style-name="P114">En clair, ça veut dire qu’il faut demander poliment aux clients leur accord pour pouvoir utiliser leurs données afin de les analyser et d’en tirer des enseignements pour leur vendre encore plus de produits. Et c’est justement ce que les sociétés ne veulent pas demander car, dans la majorité des cas, les clients vont refuser de donner leur accord !</text:p>
      <text:p text:style-name="P114">Soyons clients. Donneriez-vous votre consentement à ce genre de requête : « Autorisez-vous la société bancaire XXXX à communiquer vos données de paiements bancaires (CB, virements, chèques…) et vos données de revenus (salaires, loyers et autres revenus…) à la société d’assurance YYYY, afin de vous proposer des produits d’assurance plus personnalisés et adaptés ? ».</text:p>
      <text:p text:style-name="P126"><text:span text:style-name="T102">Autant les gens le font librement sur Facebook ou Amazon, car ce consentement est inclus dans la démarche d’ouverture de compte, autant ils refusent de le faire </text:span><text:span text:style-name="T110">a posteriori</text:span><text:span text:style-name="T102">, d’autant plus quand les données concernées sont leurs données bancaires ou assurantielles !</text:span></text:p>
      <text:p text:style-name="P114">Pourtant, les capacités ouvertes par la data science et l’Intelligence Artificielle offrent réellement ce genre de possibilités de personnaliser les produits <text:soft-page-break/>offerts au client. Pour le bénéfice du client, certes, mais surtout pour permettre au groupe de bancassurance de vendre encore plus de produits à encore plus de clients. Mais c’est justement tout l’enjeu de cette connaissance étendue du client.</text:p>
      <text:p text:style-name="P114">Donc ce recueil du consentement est crucial pour toutes ces activités liées à la Data. Mais loin d’être acquis. Et pourtant indispensable si on suit l’esprit de la réglementation RGPD. Et c’est la source potentielle de mauvaises nouvelles à annoncer !</text:p>
      <text:p text:style-name="P114">Et quand la température du patient n’est pas bonne, une des solutions toujours disponible est de casser le thermomètre…</text:p>
      <text:h text:style-name="Heading_20_3" text:outline-level="3"><text:bookmark-start text:name="__RefHeading___Toc9774_4125847080"/>Le débarquement des armadas réglementaires<text:bookmark-end text:name="__RefHeading___Toc9774_4125847080"/></text:h>
      <text:p text:style-name="P129"><text:span text:style-name="T102">Si le contexte réglementaire actuel est compliqué, ce n’est rien en comparaison avec ce qu’il sera dans quelques années ! </text:span><text:span text:style-name="T103">En effet, les réglementations existantes sont essentiellement axées sur l’application de contr</text:span><text:span text:style-name="T20">ôles et de garde-fous financiers d’une part (Solvency II, Bâle 2 &amp; 3, BCBS239…) ou sur la protection des données personnelles des clients et des collaborateurs, avec RGPD.</text:span></text:p>
      <text:p text:style-name="P130"><text:span text:style-name="T102">L’Union Européenne est en train de finaliser tout un arsenal réglementaire, dont certains textes vont sortir dans les tous prochains mois, sur des domaines beaucoup plus étendus, et principalement centrés sur la mise sous contr</text:span><text:span text:style-name="T19">ôle de l’Intelligence Artificielle et de la Data.</text:span></text:p>
      <text:p text:style-name="P130"><text:soft-page-break/><text:span text:style-name="T19">Sans entrer dans les détails, on peut </text:span><text:span text:style-name="T21">présenter ainsi les trois grandes réglementations en instance de publication :</text:span></text:p>
      <text:list text:style-name="L3">
        <text:list-item>
          <text:p text:style-name="P261"><text:span text:style-name="T91">Artificial Intelligence Act </text:span><text:span text:style-name="T21">: ce texte est destiné </text:span><text:span text:style-name="T57">à </text:span><text:span text:style-name="T21">encadrer l’usage et la commercialisation des IA, afin d’aider à l’innovation tout en garantissant la sécurité et les droits des utilisateurs. Il précise les domaines où l’IA est interdite (exploitation des personnes vulnérables, identification biométrique à distance, les systèmes de « score social » ou les techniques subliminales), les domaines où l’IA est considérée à « haut risque » (la santé, les systèmes de régulation des équipements hautement dangereux comme les centrales nucléaires…), les domaines où l’IA est considérée à « risque moyen » (tous les systèmes d’IA demandant d’être surveillés, comme les mécanismes de tarification, par exemple) et les domaines où l’IA est complètement autorisée (pour les objets connectés du quotidien, de la maison et des véhicules).</text:span></text:p>
        </text:list-item>
        <text:list-item>
          <text:p text:style-name="P262"><text:span text:style-name="T90">Data Governance Act </text:span><text:span text:style-name="T19">: </text:span><text:span text:style-name="T22">ce texte va favoriser la réutilisation des données possédées par le secteur public, encadrer et réguler l’émergence d’un nouveau modèle commercial autour de l’intermédiation des données et promouvoir « l’altruisme des données », en encadrant le partage de données à but non lucratif. </text:span><text:span text:style-name="T23">Ce nouveau règlement se juxtapose à la réglementation RGPD et les frontières entre les différents domaines d’application restent </text:span><text:soft-page-break/><text:span text:style-name="T23">floues et vont demander des ajustements significatifs dans les réglementations locales.</text:span></text:p>
        </text:list-item>
        <text:list-item>
          <text:p text:style-name="P263"><text:span text:style-name="T90">Data Act </text:span><text:span text:style-name="T19">: c’est le dernier gros morceau, destiné à réguler et encadrer les échanges de données entre entreprises et consommateurs (B2C) et entre entreprises (B2B). Le texte cherche également à réguler les abus possibles de position dominante de certains acteurs et à définir les normes d’interopérabilité qui permettront de pouvoir échanger et utiliser librement ces données. Comme dans le texte précédent, la frontière avec le règlement RGPD concernant la protection des données personnelles reste encore à affiner.</text:span></text:p>
        </text:list-item>
      </text:list>
      <text:p text:style-name="P131"><text:span text:style-name="T21">C</text:span><text:span text:style-name="T19">es trois nouvelles réglementations vont amener une vraie révolution sur la façon dont on va pouvoir partager et utiliser les données, en particulier toutes les données de l’Internet des objets connectés (IoT) et sur la façon dont ces données vont pouvoir être exploitées, au bénéfice de l’individu et du citoyen européen.</text:span></text:p>
      <text:p text:style-name="P131"><text:span text:style-name="T19">Mais ces trois textes, si puissants et contraignants soient-ils, ne représentent que la première vague de l’offensive réglementaire : au final, c’est plus d’une douzaine de textes qui sont dans les cartons et qui vont sortir dans les trois prochaines années : </text:span><text:span text:style-name="T24">la réglementation sur la Data va être le prochain enjeu de tous les Grands Groupes, parce que leur activité se recentre de plus en plus sur la manipulation des données et sur leur exploitation.</text:span></text:p>
      <text:p text:style-name="P46">Cependant, la subtilité juridique autour de l’application de ces textes va rendre la mise en place de ces réglementations très complexes : près de cinq <text:soft-page-break/>ans après la mise en application de la réglementation RGPD, toutes les entreprises sont confrontées au quotidien aux difficultés d’application de cette réglementation et les débats d’interprétation sont sans fin entre experts juristes !</text:p>
      <text:p text:style-name="P46">La réglementation de la Data représente une nouvelle contrainte forte pour les entreprises et, malheureusement, un nouveau défi pour lequel elles ne sont pas forcément armées : comme autour des nouvelles technologies de l’IT, ces nouveaux domaines réglementaires demandent de nouvelles compétences, rares et chères. Et très peu de Grands Groupes ont encore pris la mesure de l’enjeu et disposent d’équipes dédiées et compétentes sur ces problématiques.</text:p>
      <text:p text:style-name="P46">Dans les deux prochaines années, il va également falloir gérer une autre pénurie autour des légistes spécialistes dans le Droit de la Data…</text:p>
      <text:h text:style-name="P45" text:outline-level="3"><text:bookmark-start text:name="__RefHeading___Toc2562_4125847080"/><text:span text:style-name="T1">Le piège des trois petits singes</text:span><text:span text:style-name="T1"><text:note text:id="ftn22" text:note-class="footnote"><text:note-citation>22</text:note-citation><text:note-body><text:p text:style-name="P11">Le concept des trois petits singes est une représentation visuelle de la sagesse orientale qui enseigne « ne pas voir le mal, ne pas entendre le mal, ne pas dire le mal ». Les trois petits singes sont généralement représentés en train de se couvrir les yeux, les oreilles et la bouche respectivement, symbolisant ainsi le fait de ne pas voir, entendre ou dire le mal.</text:p></text:note-body></text:note></text:span><text:bookmark-end text:name="__RefHeading___Toc2562_4125847080"/></text:h>
      <text:p text:style-name="P6">C’est dans ce genre de contexte juridique très compliqué qu’il faut parfois devoir annoncer de vraies mauvaises nouvelles. Et, comme on l’a déjà dit, rien dans le mode de communication bien huilé de la Transformation n’est prévu pour ça. À tel point que certains font du refus d’obstacle : j’ai très récemment été confronté au problème et je suis toujours <text:soft-page-break/>abasourdi par la façon dont le problème a été traité. Ou n’a pas été traité plutôt !</text:p>
      <text:p text:style-name="P6">Dans le milieu financier, comme je l’ai déjà dit, les réglementations s’accumulent et s’entrecroisent, pour protéger le système et les clients. Plutôt qu’un mille-feuille, on peut plutôt parler dans ce cas d’un patchwork législatif, et la principale difficulté est de comprendre ce qui est autorisé et interdit avec les données des clients, afin de déterminer quel est le terrain de jeu du business.</text:p>
      <text:p text:style-name="P6">Ça prend beaucoup de temps et ça mobilise beaucoup de personnes avec des compétences multiples : Chief Data Officers, Data Managers, Data Protection Officers, juristes, spécialistes de la Conformité et des Risques… de toutes les entreprises et entités impliquées dans les transactions commerciales ou les opérations analysées.</text:p>
      <text:p text:style-name="P6">Une fois que tout ce beau monde s’est mis d’accord, il faut analyser ce qu’il faut faire et dans quelles conditions, afin que les différentes initiatives ou les projets soient réalisés de façon conforme. Ce n’est jamais simple. Et, dès qu’on aborde les sujets légaux, il y a une grande part laissée à l’interprétation et à la jurisprudence, donc rien n’est jamais sûr non plus. Mais, pas à pas et cas par cas, on avance, on avance et au final une réponse cohérente et consensuelle se précise.</text:p>
      <text:p text:style-name="P6">Dans le cas récent que je voulais évoquer, on s’est rendu compte que les ambitions de la Direction Générale, et la façon dont elle voulait aborder le sujet, entraient en conflit avec au moins trois réglementations différentes : la réglementation RGPD, dans la possibilité à utiliser les données des clients en fonction de leur consentement ; la <text:soft-page-break/>réglementation sur le secret bancaire, par la volonté de faire des analyses statistiques mixant des données bancaires (couvertes par le secret bancaire) et des données assurantielles ; le code des assurances par la volonté d’exploiter des données d’assurance (éventuellement couvertes par le secret médical) pour enrichir la connaissance que nous avons de nos clients.</text:p>
      <text:p text:style-name="P6">Ces trois réglementations sont très strictes, très contraignantes, et surtout très sévères envers les contrevenants. Il est possible d’utiliser ces typologies de données, mais les conditions d’utilisation sont drastiques et de multiples précautions techniques et opérationnelles doivent être prises. Et surtout ces précautions restreignent fortement l’exploitabilité de ces données : en fait, en les appliquant correctement, ça restreint tellement le contexte d’utilisation que ça limite beaucoup l’intérêt de les exploiter.</text:p>
      <text:p text:style-name="P6">Il reste toutefois possible de respecter les réglementations en répondant aux demandes, mais c’est comme jouer sur le fil du rasoir : la marge de manœuvre est très limitée et de toute façon il faut revoir les ambitions à la baisse si on veut favoriser la conformité : en résumé, le jeu n’en vaut plus tellement la chandelle.</text:p>
      <text:p text:style-name="P6">Enfin, pour couronner le tout, il ne faut pas oublier les sanctions. Toute infraction expose à des sanctions et, dans ces cas précis, les sanctions encourues sont particulièrement sévères : depuis des sanctions financières qui peuvent s’exprimer en milliards d’euros pour RGPD jusqu’à des sanctions pénales pouvant aller jusqu’à plusieurs années de prison pour le dirigeant d’entreprise, en cas <text:soft-page-break/>d’infraction au secret bancaire ou au secret médical. L’addition est lourde. Et le pire de tout est que le dirigeant n’est pas forcément au courant de ce qu’il risque : la réglementation RGPD est récente et loin d’être maîtrisée par tous et, pour le secret bancaire et le secret médical, on est dans des subtilités qui échappent au commun des mortels.</text:p>
      <text:p text:style-name="P6">Donc, dilemme : comment expliquer au comité stratégique que non seulement il ne sera pas possible de faire tout ce qui a été demandé mais qu’en plus, si on le fait mal, le patron risque d’aller en zonzon et qu’il faudra prévoir un budget oranges dans les notes de frais ?</text:p>
      <text:p text:style-name="P6">La solution qui a été utilisée me fait encore frissonner et me révolte toujours, par sa lâcheté et son inconscience : les jolis slides présentés au comité, après de jours et des jours de raffinage et de polissage ont effectivement présenté la réduction imposée de périmètre pour se mettre en conformité. En appliquant à la lettre les instructions de ces slides, pas de souci de conformité. Mission accomplie.</text:p>
      <text:p text:style-name="P6">Par contre, les slides qui avaient été préparés en collaboration par toutes les fonctions dites « régaliennes » (DPO, Conformité, Juridique, Risques…) et qui étaient là pour rappeler les risques pénaux encourus non seulement par ces services, mais également par le chef d’entreprise himself, ont tout bonnement disparu du support présenté lors du comité ! Purement et simplement supprimés, aussi bien dans le corps du document que dans les annexes.</text:p>
      <text:p text:style-name="P6">Et la rédaction, très subtile, a présenté l’obligation de réduire le périmètre comme une exigence des fonctions régaliennes. Toutefois, sans <text:soft-page-break/>compréhension des risques réels pris, ça présente indirectement ces fonctions comme des empêcheurs de tourner en rond et de faire du business ; et ça en fait d’excellents boucs émissaires !</text:p>
      <text:p text:style-name="P6">Résultat des courses : la mauvaise nouvelle a été annoncée, mais sans l’expliquer. La Direction Générale et son comité sont déçus et frustrés. Et ils n’ont pas été avertis des risques réels du jeu auquel ils jouent. Les fonctions régaliennes sont ouvertement désignées comme des nuisibles qui ne travaillent pas dans l’intérêt de la société et tous les ingrédients sont réunis pour que la prochaine fois on passe par la bande d’arrêt d’urgence… direct vers la case prison.</text:p>
      <text:p text:style-name="P182"><text:span text:style-name="T15">Et c’est ainsi que se transmet l’habitude de ne rien voir, rien dire et rien entendre : les décisions sont prises de bonne foi, sur la base d’informations biaisées et à l’objectivité douteuse, pour se dédouaner en mettant en cause des professionnels qui ne font rien d’autre que jouer leur r</text:span><text:span text:style-name="T61">ôle de lanceur d’alerte ! </text:span><text:span text:style-name="T1">À noter que c’est aussi un élément de </text:span><text:span text:style-name="T15">discours</text:span><text:span text:style-name="T1"> très usité dans la Transformation et qu’Orwell aurait apprécié : dénigrer toute personne qui ne sert pas les intérêts individuels d’un des dirigeants comme opposé au sacro-saint intérêt collectif ! Ça marche à tous les coups.</text:span></text:p>
      <text:h text:style-name="P180" text:outline-level="3"/>
      <text:p text:style-name="P8"/>
      <text:p text:style-name="P41"><draw:custom-shape text:anchor-type="as-char" draw:z-index="2" draw:name="Forme6" draw:style-name="gr1" draw:text-style-name="P267" svg:width="1.19cm" svg:height="1.147cm"><text:p text:style-name="P219"><text:span text:style-name="T114">6</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3" text:outline-level="2"><text:bookmark-start text:name="__RefHeading___Toc1592_11151780541"/>Le numérique irresponsable<text:bookmark-end text:name="__RefHeading___Toc1592_11151780541"/><text:bookmark text:name="_Toc1317743991"/></text:h>
      <text:h text:style-name="P14" text:outline-level="3"><text:bookmark-start text:name="__RefHeading___Toc5339_4125847080"/>Un petit rappel de bon sens<text:bookmark-end text:name="__RefHeading___Toc5339_4125847080"/></text:h>
      <text:p text:style-name="P114">Ce chapitre va essentiellement présenter un bilan à charge sur la façon dont a été gérée l’IT des Grands Groupes depuis des années. Le manque de vision à long terme, de vraies politiques d’investissement cohérentes, la méconnaissance des enjeux technologiques, la facilité et les petits arrangements entre amis… ont abouti au final à un gaspillage d’argent et de ressources hallucinant.</text:p>
      <text:p text:style-name="P126"><text:span text:style-name="T102">Quand on analyse tous ces éléments </text:span><text:span text:style-name="T110">a posteriori </text:span><text:span text:style-name="T102">en vision purement comptable, on peut comprendre que le réflexe du nouveau responsable va être de lancer une Transformation pour effacer d’un coup de gomme magique toutes ces erreurs qui coûtent « un pognon de dingue », pour reprendre une citation récente.</text:span></text:p>
      <text:p text:style-name="P126"><text:span text:style-name="T102">Mais, si on peut reprocher beaucoup de choses à l’IT, comme on le verra dans ce chapitre, il ne faut pas oublier que le contexte informatique, aussi bien pour les personnels impliqués que pour les technologies, est un contexte technique et scientifique, basé sur la causalité : en clair, si on ne comprend pas pourquoi on a fait ces erreurs, les </text:span><text:soft-page-break/><text:span text:style-name="T102">mêmes causes risquent de produire les mêmes conséquences…</text:span></text:p>
      <text:h text:style-name="P14" text:outline-level="3"><text:bookmark-start text:name="__RefHeading___Toc4333_2769870995"/>Quand tout était cher…<text:bookmark-end text:name="__RefHeading___Toc4333_2769870995"/></text:h>
      <text:p text:style-name="P126"><text:span text:style-name="T1">Les (r)évolutions technologiques de ces dernières années nous ont fait oublier la façon dont on gérait l’IT il y a seulement vingt ans, quand stocker de la donnée et la traiter co</text:span><text:span text:style-name="T102">ûtait très cher. Mais vraiment très cher. Je rappelle que les coûts ont été divisés par 100 000 en un peu plus de vingt ans !</text:span></text:p>
      <text:p text:style-name="P114">Donc, il était une fois des sociétés financières qui devaient utiliser des systèmes informatiques pour répondre à leurs besoins de gestion et d’analyse et qui devaient remonter des informations à leurs autorités de tutelle, à leurs clients et à leurs dirigeants. Bref, les mêmes besoins et exigences de base que maintenant, même si on s’intéressait plus aux sommes et aux agrégations de données qu’aux données détaillées. Et l’IT devait répondre à ces besoins et à ces exigences, en respectant des budgets et des plannings serrés. Comme maintenant.</text:p>
      <text:p text:style-name="P126"><text:span text:style-name="T102">Sauf que, comme le matériel était très cher, les équipes IT ont mis en place des processus très stricts et des astuces permettant de réduire au maximum les ressources techniques à mettre en œuvre. Le moins qu’on puisse dire, c’est que l’ingéniosité et l’astuce étaient à l’honneur ! Avec des solutions qui nous étonnent maintenant quand on les analyse avec le recul</text:span><text:span text:style-name="T102"><text:note text:id="ftn23" text:note-class="footnote"><text:note-citation>23</text:note-citation><text:note-body><text:p text:style-name="Footnote">Comme enregistrer plusieurs informations différentes dans un m<text:span text:style-name="T18">ême champ, pour optimiser le stockage</text:span></text:p></text:note-body></text:note></text:span><text:span text:style-name="T102">, mais ça fait toujours le job.</text:span></text:p>
      <text:p text:style-name="P114"><text:soft-page-break/>C’était une ère de sobriété numérique par obligation. Et le gaspillage de ressources était rare.</text:p>
      <text:h text:style-name="P14" text:outline-level="3"><text:bookmark-start text:name="__RefHeading___Toc2564_4125847080"/>L’ère de l’opulence<text:bookmark-end text:name="__RefHeading___Toc2564_4125847080"/></text:h>
      <text:p text:style-name="P137">Quand le prix du stockage a commencé à s’effondrer, tout le monde a considéré ça comme une aubaine et chacun s’est dit : je vais enfin pouvoir stocker tout ce dont j’ai besoin pour faire mon boulot !</text:p>
      <text:p text:style-name="P137">L’arrivée conjointe des nouvelles technologies user-friendly à destination des métiers a fait que, côté métier, chacun a pu commencer à créer son propre petit système d’information parallèle.</text:p>
      <text:p text:style-name="P126"><text:span text:style-name="T119">Mais l’IT n’a pas été en reste : pourquoi se priver ? L</text:span><text:span text:style-name="T102">’effondrement du prix du stockage et de la RAM a permis l’émergence de nouvelles technologies telles que le Big Data et c’est à partir de ce moment-là que l’abondance a étouffé le bon sens : pourquoi se contenter de n’utiliser et de ne conserver que les données qui nous intéressent, vu qu’on a la possibilité de TOUT conserver, et pour pas cher ? On ne sait jamais, ça peut servir… Et pourquoi s’embêter à partager des données avec d’autres utilisateurs si je peux faire une copie de toute la base de données pour mon usage propre, et pour presque rien ?</text:span></text:p>
      <text:p text:style-name="P126"><text:span text:style-name="T102">Ce sont ces comportements individuels accumulés et inflationnistes qui ont abouti à la situation actuelle : des data swamps partout, où personne ne connaît ou comprend les données qui y sont stockées ; des espaces de stockage encombrés de téraoctets de données redondantes et inutilisées ; des équipes qui se contentent de ne travailler que sur un petit lopin de données connues et maîtrisées face </text:span><text:soft-page-break/><text:span text:style-name="T102">à des étendues infinies de données mal définies et à la qualité discutable.</text:span></text:p>
      <text:p text:style-name="P114">Et personne n’avait anticipé les vraies conséquences au long terme : l’impact sur le climat !</text:p>
      <text:h text:style-name="Heading_20_3" text:outline-level="3"><text:bookmark-start text:name="__RefHeading___Toc7084_1610056299"/>L’impact du Numérique<text:bookmark-end text:name="__RefHeading___Toc7084_1610056299"/></text:h>
      <text:p text:style-name="P114">10 %, c’est la part de l’électricité produite en France qui sert à alimenter des datacenters, afin de stocker et traiter des données utilisées dans toutes les applications numériques que nous utilisons tous les jours…</text:p>
      <text:p text:style-name="P114">En faisant notre autocritique, on peut également affirmer qu’une bonne partie de cet impact négatif est directement liée à l’activité des entreprises de la Finance qui manipulent de la Data du matin au soir et du soir au matin !</text:p>
      <text:p text:style-name="P114">On peut se poser la question de comment nous en sommes arrivés là, et on pourrait répondre que nous subissons les conséquences d’une vie de riches insouciants qui font payer les générations suivantes… et on ne serait pas si éloignés de la Vérité.</text:p>
      <text:p text:style-name="P114">En fait, ce qu’on vit actuellement autour de la dépendance énergétique aux énergies fossiles, on peut également le transposer au stockage des données : tant que le stockage et la RAM coûtaient cher, la frugalité et l’ingéniosité s’imposaient, et la sobriété numérique était la norme.</text:p>
      <text:p text:style-name="P126"><text:span text:style-name="T102">Il faut maintenant rappeler un principe tout simple que l’opulence tend à occulter : en IT, le bon sens reste une valeur sûre. Et l’approche Numérique </text:span><text:soft-page-break/><text:span text:style-name="T102">Responsable reste une approche de bon sens et de pragmatisme.</text:span></text:p>
      <text:p text:style-name="P114">Je pense que les anciens de l’IT vont bien rigoler, mais ils vont redevenir une source d’inspiration nécessaire pour nos futures façons de travailler. Mais je ne cherche pas non plus à faire le procès des anciens ou une chasse aux sorcières tous azimuts : je suis seulement en train de recenser toute la dette accumulée en quelques années par des décisions trop peu éclairées. Et si la dette climatique est la plus grave et la plus inquiétante, ce n’est pas la seule…</text:p>
      <text:h text:style-name="P14" text:outline-level="3"><text:bookmark-start text:name="__RefHeading___Toc2314_27698709951"/>La gestion de la dette et le coût de l’obsolescence<text:bookmark-end text:name="__RefHeading___Toc2314_27698709951"/></text:h>
      <text:p text:style-name="P114">J’ai présenté plus haut le mille-feuille de l’IT, qui s’est construit au fil du temps parce que c’était la solution qui a semblé à l’époque la plus pragmatique pour répondre à la pression réglementaire croissante.</text:p>
      <text:p text:style-name="P114">L’analogie avec la paléontologie, si elle a le mérite de ramener la dimension temporelle de la construction, a toutefois un défaut : en paléontologie, toutes les strates enterrées représentent des périodes mortes. On n’y trouve que des fossiles et des traces d’une vie passée. Dans un système informatique en mille-feuilles, toutes les couches doivent fonctionner, même les plus anciennes, parce qu’elles assurent toute une ou plusieurs fonctions clés de l’entreprise.</text:p>
      <text:p text:style-name="P126"><text:span text:style-name="T102">Donc il faut en assurer la maintenance. Et ça a plusieurs conséquences qui n’avaient pas forcément été présentées au dirigeant le jour où il a décidé de rajouter une nouvelle couche à l’édifice. Parce </text:span><text:soft-page-break/><text:span text:style-name="T102">qu’entretenir le fonctionnement d’un système, quel qu’il soit, ça a un coût. Même en </text:span><text:span text:style-name="T105">ne </text:span><text:span text:style-name="T102">faisant aucune évolution du système, il existe toujours des charges incompressibles et obligatoires :</text:span></text:p>
      <text:list text:style-name="WWNum12">
        <text:list-item>
          <text:p text:style-name="P250">Frais d’amortissement des bâtiments : les datacenters sont hébergés dans des bâtiments,</text:p>
        </text:list-item>
        <text:list-item>
          <text:p text:style-name="P250">Frais d’électricité et de climatisation des bâtiments : ça consomme et ça chauffe,</text:p>
        </text:list-item>
        <text:list-item>
          <text:p text:style-name="P250">Frais de personnels liés à l’entretien de ces bâtiments : ménage, sécurité…</text:p>
        </text:list-item>
        <text:list-item>
          <text:p text:style-name="P250">Frais d’amortissement et de remplacement des composants informatiques : il faut renouveler régulièrement les serveurs qui s’usent avec le temps,</text:p>
        </text:list-item>
        <text:list-item>
          <text:p text:style-name="P250">Frais de personnels chargés de la maintenance : il faut toujours des gens pour faire,</text:p>
        </text:list-item>
        <text:list-item>
          <text:p text:style-name="P251">Frais de logiciels pour faire tourner les applications : systèmes d’exploitation, progiciels, support éditeurs…</text:p>
        </text:list-item>
      </text:list>
      <text:p text:style-name="P114">Si les autres points sont assez facilement maîtrisables et anticipables (à l’exception peut-être du coût de l’énergie), le dernier point peut réserver des surprises aussi inattendues qu’onéreuses. Car la plupart des technologies utilisées sont des techno<text:span text:style-name="T155">logie</text:span>s propriétaires, c’est-à-dire sous la propriété intellectuelle d’un éditeur de logiciels. Et même si la tendance récente tend à privilégier plutôt les technologies open source, il est toujours nécessaire de s’associer à un éditeur qui va être chargé d’utiliser ces technologies open source dans un outil qu’il sera chargé de maintenir à jour et en <text:soft-page-break/>état de fonctionner, sous couvert d’un contrat de support.</text:p>
      <text:p text:style-name="P114">Et c’est là qu’est la faille : ces contrats de support ont un coût, qu’il faut renouveler tous les ans si on veut être sûr que l’éditeur va intervenir en cas de gros plantage du système. Sans support, le système peut s’arrêter ou l’éditeur peut décider de ne plus faire fonctionner le système et rien ne permettra de le <text:span text:style-name="T155">re</text:span>faire fonctionner ; ce qui est inenvisageable à cause de la criticité des fonctions assurées par ces logiciels.</text:p>
      <text:p text:style-name="P114">Et l’éditeur conserve aussi toujours un atout majeur dans sa manche : les montées de version ! Pratiquement, afin de s’assurer qu’un système est à l’État de l’Art au niveau de la sécurité et des performances, un éditeur va régulièrement proposer des évolutions et des patchs correctifs. En général, il propose un à deux patchs correctifs (ou versions mineures) par an et une grosse évolution (ou version majeure) tous les deux à trois ans.</text:p>
      <text:p text:style-name="P114">Et le contrat de support prévoit généralement que les versions mineures sont gratuites, mais que l’éditeur ne supporte au maximum que les trois dernières versions majeures. Les montées de versions majeures sont généralement payantes et doivent de plus s’accompagner d’un certain nombre de jours de prestation pour vérifier qu’il n’y a pas de régression technique ou fonctionnelle à corriger. Donc, ça veut dire que tous les six à neuf ans, l’IT doit prévoir un budget conséquent, juste pour que le système fonctionne comme il a toujours fonctionné, sans aucun apport fonctionnel ! Et, plus la technologie est ancienne, plus les éditeurs ont tendance à faire monter le prix des montées de <text:soft-page-break/>version : avec des clients captifs, l’occasion est trop belle !</text:p>
      <text:p text:style-name="P114">Bien entendu, les éditeurs vont justifier leur montée de version par la mise à disposition de fonctionnalités supplémentaires, mais qui ne servent à rien pour le client, vu qu’elles ne seront pas activées pour ces applications qui n’ont aucune vocation à évoluer. Pour caricaturer, c’est un peu comme pour les utilisateurs de Microsoft Word : Microsoft va proposer un nouveau Pack Office tous les deux ans, avec plein de nouvelles fonctionnalités que personne ne va utiliser, parce que ça ne sert à rien dans le quotidien des utilisateurs.</text:p>
      <text:p text:style-name="P114">Et c’est ainsi que tout cet IT Legacy devient un boulet de plus en plus cher au fur et à mesure que les années passent, sans qu’on puisse raisonnablement décider de débrancher le malade, car il est toujours vivant ! Et il est de très mauvais goût de mettre en avant le coût délirant de l’entretien de cet héritage : ce serait mettre en cause toute la gestion de la société par le passé et le message n’est pas politiquement acceptable.</text:p>
      <text:p text:style-name="P114">Et ça, c’est pour les systèmes complets qui fonctionnent. J’ai parlé plus haut des cas de plus en plus fréquents où le système n’a pas été terminé, à cause d’un passage un peu rapide par la voie d’arrêt d’urgence. On appelle cet exercice la gestion de la dette technique. Et, suivant les cas, ça peut ne coûter que quelques milliers d’euros (négligeable à l’échelle de ces sociétés), jusqu’à plusieurs millions d’euros ; ce qui ampute gravement le budget de la Transformation dans ce cas.</text:p>
      <text:p text:style-name="P126"><text:soft-page-break/><text:span text:style-name="T102">Parce que la gestion de l’obsolescence et de la dette technique entrent toujours dans le domaine d’intervention de la Transformation : si on lance ces grands plans stratégiques, c’est d’abord pour moderniser ! Donc, quand il faut retirer du budget de Transformation tous les coûts nécessaires pour simplement faire vivre l’existant, la part réelle de la Transformation effective peut n’être que de 30 à 40 % du budget totalement alloué. Et ça oblige également à entretenir la dépendance technologique vis-à-vis d’éditeur</text:span><text:span text:style-name="T106">s</text:span><text:span text:style-name="T102"> qui ont beau jeu à ne considérer leurs clients que comme des vaches à lait, tant qu’ils sont obligés de payer…</text:span></text:p>
      <text:p text:style-name="P114">Quant à essayer d’évaluer le coût réel de ce Legacy et de le comparer au coût lié à une vraie réécriture et migration complète dans de nouvelles technologies, ce serait envisageable à condition que l’IT puisse facturer le coût réel des prestations qu’elle fournit, mais c’est très rarement le cas dans les Grands Groupes où le modèle de coût n’est pas conçu de cette façon, comme on le verra plus loin.</text:p>
      <text:h text:style-name="Heading_20_3" text:outline-level="3"><text:bookmark-start text:name="__RefHeading___Toc9776_4125847080"/>La dictature budgétaire<text:bookmark-end text:name="__RefHeading___Toc9776_4125847080"/></text:h>
      <text:p text:style-name="P114">Dans ce contexte où les budgets pharaoniques annoncés réduisent comme neige au soleil quand ils arrivent enfin dans les équipes qui doivent véritablement mettre en place les nouveaux éléments de la Transformation, comment faire pour réaliser véritablement les projets demandés, quand en plus les ressources sont rares et forcément chères ?</text:p>
      <text:p text:style-name="P114">Je vous rassure tout de suite, et pour rester cohérent avec ce que je disais plus haut : les miracles n’existant pas, c’est impossible. C’est pourquoi un <text:soft-page-break/>nouveau concept a été inventé : faire plus avec moins.</text:p>
      <text:p text:style-name="P114">En gros : comme tout le fric est utilisé pour faire des choses qui ne sont pas de la pure Transformation, on va demander aux opérationnels de faire la Transformation en plus de leurs autres tâches. Comme ça c’est gratuit. Et, pour faire bonne figure, on va parler de « renoncement » : c’est à dire que, même en tournant dans tous les sens, il est clair qu’on ne pourra pas tout faire ce qui était prévu avec le budget alloué. Donc, on va charger au maximum les équipes en place pour quand même faire autant de réalisations que possible, tout en insistant sur le fait qu’il y a quelques sujets qu’on va être obligé d’abandonner et que c’est un véritable crève-cœur.</text:p>
      <text:p text:style-name="P114">Et pour ne pas tout abandonner, et risquer un crève-cœur encore plus atroce, il va vraiment falloir que les équipes fassent un effort sur les trucs qu’on a demandés « on top ». On ne peut tout de même pas annoncer à la Direction Générale que la Transformation n’avance pas parce que certains ne veulent pas prendre leur part… et voilà comment on camoufle tranquillement un coût qui devrait être porté par la Transformation et qui est en fait dilué dans le fonctionnement global des services. Au risque de mettre ses services sous une pression intolérable, comme on l’a vu précédemment…</text:p>
      <text:h text:style-name="Heading_20_3" text:outline-level="3"><text:bookmark-start text:name="__RefHeading___Toc2566_4125847080"/><text:span text:style-name="T1">Les maquignons </text:span><text:bookmark-start text:name="__RefHeading___Toc4335_2769870995"/><text:span text:style-name="T1">et les spywares</text:span><text:bookmark-end text:name="__RefHeading___Toc2566_4125847080"/></text:h>
      <text:p text:style-name="P126"><text:span text:style-name="T1">À c</text:span><text:span text:style-name="T102">ôté des cabinets de conseil en stratégie, il existe un autre type de cabinets auquel les Grands </text:span><text:soft-page-break/><text:span text:style-name="T102">Groupes sont complètement dépendants : les ESN</text:span><text:span text:style-name="T102"><text:note text:id="ftn24" text:note-class="footnote"><text:note-citation>24</text:note-citation><text:note-body><text:p text:style-name="Footnote">Entreprise de Services du Numérique : Dans le domaine de l’informatique et de la technologie, une ESN, anciennement appelée SSII (Société de Services en Ingénierie Informatique), est une entreprise qui propose des services liés à l’informatique, tels que le développement de logiciels, la gestion de projets, la maintenance de systèmes informatiques, etc.</text:p></text:note-body></text:note></text:span><text:span text:style-name="T1">. Ce sont ces sociétés qui vont fournir la main d’œuvre qualifiée et formée pour mettre en place toutes les nouvelles technologies entrant dans la nouvelle couche du mille-feuille de la Transformation.</text:span></text:p>
      <text:p text:style-name="P6">Et, quand on part sur la mise en place d’une nouvelle couche technologique, ça demande vraiment beaucoup de monde. Ça peut représenter plusieurs centaines de personnes pour mettre en place les nouvelles couches technologiques du Big Data et de l’Intelligence Artificielle, par exemple. Et il faut que tous soient des spécialistes, ou du moins suffisamment expérimentés pour mettre en place ces nouvelles technologies et tout l’accompagnement qui va avec : nouvelles méthodes de travail, nouvelle organisation, transfert de compétences…</text:p>
      <text:p text:style-name="P126"><text:span text:style-name="T1">Et, dans un contexte de pénurie, fournir des contingents entiers de spécialistes formés et opérationnels relève de l’utopie. Ou du mensonge du maquignon</text:span><text:span text:style-name="T1"><text:note text:id="ftn25" text:note-class="footnote"><text:note-citation>25</text:note-citation><text:note-body><text:p text:style-name="P10">Un maquignon est un individu qui achète, vend, ou négocie du bétail, souvent pour la boucherie ou pour le commerce de viande.</text:p></text:note-body></text:note></text:span><text:span text:style-name="T1">. Sur les marchés aux bestiaux, le maquignon était censé vendre des b</text:span><text:span text:style-name="T102">êtes saines et fortes, bonnes pour le labeur ou pour la consommation humaine. Et c’était loin d’être toujours le cas. Un maquignon était aussi fiable et avait la même réputation qu’aujourd’hui un vendeur de voitures d’occasion…</text:span></text:p>
      <text:p text:style-name="P114"><text:soft-page-break/>Une ESN ne vend pas du bétail. Elle le loue. Le plus cher possible et le plus grand nombre de têtes possibles. C’est sa raison d’être économique. L’idée est de noyer la qualité dans le nombre : on dispose de quelques leaders compétents et on les épaule avec plein de padawans qui vont apprendre sur le tas. C’est un modèle gagnant-gagnant qui marche bien sur le papier.</text:p>
      <text:p text:style-name="P126"><text:span text:style-name="T102">Mais on ne vit toujours pas en Théorie : en pratique, former les juniors demande beaucoup de temps et le profil senior ne peut pas mener de front la formation des juniors et le delivery</text:span><text:span text:style-name="T102"><text:note text:id="ftn26" text:note-class="footnote"><text:note-citation>26</text:note-citation><text:note-body><text:p text:style-name="Footnote">En informatique, “delivery” (ou “livraison” en français) se réfère généralement au processus de déploiement ou de mise en production d’un logiciel ou d’un système informatique, de la phase de développement à la phase de mise en exploitation. Cela peut inclure la création, les tests, la configuration, l’installation, la mise en service et la maintenance du logiciel ou du système afin qu’il soit prêt à être utilisé par les utilisateurs finaux. Le processus de “delivery” est souvent crucial pour garantir que les solutions informatiques sont déployées avec succès et fonctionnent de manière fiable et sécurisée dans un environnement de production.</text:p></text:note-body></text:note></text:span><text:span text:style-name="T102"> pour le client. D’où des rendements très faibles du delivery et des niveaux de qualité assez bas, lorsque le travail est confié aux juniors qui doivent malgré tout produire, même s’ils ne sont pas suffisamment aguerris.</text:span></text:p>
      <text:p text:style-name="P114">En général, au bout de quelques semaines à ce régime, le client va se plaindre et l’ESN va répondre en fournissant plus de consultants destinés à améliorer le delivery. Mais, vu que ces consultants sont juniors et ont besoin d’être formés, on n’améliore pas sensiblement le delivery. Par contre, l’ESN y gagne : elle peut former des juniors « sur le tas » et en plus elle est payée pour le faire !</text:p>
      <text:p text:style-name="P114"><text:soft-page-break/>Quelques mois plus tard, les juniors sont suffisamment autonomes pour poursuivre le projet et les plus expérimentés sont retirés du projet pour lancer un autre grand chantier chez un concurrent. Et tout ça a fortement décalé le planning initial trop optimiste, bien entendu…</text:p>
      <text:p text:style-name="P126"><text:span text:style-name="T102">Mais ça met aussi en avant un autre danger inhérent au recours à la prestation externe : l’obligation de composer avec les s</text:span><text:span text:style-name="T1">pywares</text:span><text:span text:style-name="T1"><text:note text:id="ftn27" text:note-class="footnote"><text:note-citation>27</text:note-citation><text:note-body><text:p text:style-name="Footnote">Les spywares, ou logiciels espions, sont des programmes informatiques malveillants conçus pour collecter secrètement des informations sur les activités d’un utilisateur sur un ordinateur ou un dispositif connecté à Internet, généralement à des fins d’espionnage, de vol d’informations personnelles ou de publicité ciblée.</text:p></text:note-body></text:note></text:span><text:span text:style-name="T1">. Je dois cette dénomination à un collègue à moi et je reprends le terme parce qu’il est terriblement pertinent. Un spyware est un logiciel parasite qui va récupérer des informations confidentielles de façon illicite. Un consultant, surtout un consultant qui va travailler dans les sphères les plus proches du pouvoir (comme un bon slider par exemple) va rapidement </text:span><text:span text:style-name="T102">être mis au courant d’informations très confidentielles sur les orientations stratégiques de la société ou sur leur trajectoire de mise en place. Malgré toutes les clauses de confidentialité signées, on n’empêchera jamais les consultants d’avoir une mémoire et de reproduire à l’identique dans une autre société une solution qu’ils ont déjà mis en place et qui a fonctionné ailleurs. C’est aussi pour ça qu’on a besoin d’eux : faire des trucs qui fonctionnent.</text:span></text:p>
      <text:p text:style-name="P114">Au final, non seulement les sociétés vont faire la même chose au même moment, mais en plus de la même manière ! Ça relativise beaucoup le soi-disant <text:soft-page-break/>avantage concurrentiel disruptif que cette Transformation était censée leur apporter…</text:p>
      <text:h text:style-name="Heading_20_3" text:outline-level="3"><text:bookmark-end text:name="__RefHeading___Toc4335_2769870995"/>Pourquoi je n’ai plus confiance dans l’IT ?</text:h>
      <text:p text:style-name="P6">C’est objectivement un des freins majeurs au changement : les grandes Transformations sont souvent initiées par des volontés d’améliorer la productivité en amenant une approche industrielle.</text:p>
      <text:p text:style-name="P6">Mais d’un autre côté, les populations métiers cultivent généralement une défiance importante vis-à-vis de la capacité de l’IT à répondre à leurs besoins. Tout simplement parce que, pendant des années, l’IT s’est évertué à ne pas y répondre !</text:p>
      <text:p text:style-name="P126"><text:span text:style-name="T1">En effet, il faut comprendre que, dans la plupart des cas, l’IT des Grands Groupes est géré comme une société à part entière au sein du consortium, à la seule différence qu’elle est fournisseur exclusif et que les clients sont captifs. Et cette situation monopolistique a créé quelques travers avec le temps. En fait, plus l’IT a mis en place des processus rigoureux et une répartition stricte des t</text:span><text:span text:style-name="T102">âches et des fonctions, afin de maîtriser et contrôler au mieux ses coûts, plus elle a créé de la distance entre le service qu’elle était censée propos</text:span><text:span text:style-name="T109">er</text:span><text:span text:style-name="T102"> et les utilisateurs auxquels était destiné ce service.</text:span></text:p>
      <text:p text:style-name="P114">Donc, en plus du mille-feuille technologique, s’est mis en place peu à peu un mille-feuille organisationnel, avec :</text:p>
      <text:list text:style-name="WWNum13">
        <text:list-item>
          <text:p text:style-name="P252">Des directions métiers qui ont des obligations opérationnelles et des besoins,</text:p>
        </text:list-item>
        <text:list-item>
          <text:p text:style-name="P252"><text:soft-page-break/>Des services d’Assistance à la Maîtrise d’Ouvrage, qui vont collecter ces besoins fonctionnels et ces obligations,</text:p>
        </text:list-item>
        <text:list-item>
          <text:p text:style-name="P252">Des services de Maîtrise d’Ouvrage qui vont les transformer en exigences et en spécifications fonctionnelles,</text:p>
        </text:list-item>
        <text:list-item>
          <text:p text:style-name="P252">Des services de Maîtrise d’Œuvre qui vont décliner ces spécifications fonctionnelles en spécifications techniques,</text:p>
        </text:list-item>
        <text:list-item>
          <text:p text:style-name="P252">Des équipes de développement, qui vont coder des fonctionnalités correspondant à ce qui est dans le dossier de spécifications techniques,</text:p>
        </text:list-item>
        <text:list-item>
          <text:p text:style-name="P252">Des équipes de test et recette, qui vont vérifier que les développements fonctionnels définis par les équipes de Maîtrise d’Ouvrage,</text:p>
        </text:list-item>
        <text:list-item>
          <text:p text:style-name="P252">Des équipes d’intégration qui vont permettre au nouveau logiciel de fonctionner dans l’écosystème existant,</text:p>
        </text:list-item>
        <text:list-item>
          <text:p text:style-name="P253"><text:span text:style-name="T177">D</text:span>es équipes de production qui vont assurer le fonctionnement au quotidien du logiciel pendant toute sa durée de vie…</text:p>
        </text:list-item>
      </text:list>
      <text:p text:style-name="P126"><text:span text:style-name="T1">Une des conséquences directes de ce découpage des t</text:span><text:span text:style-name="T102">âches est que la plupart des équipes IT ne se sont plus trouvés en contact avec les équipes métiers à qui étaient destinées tous ces travaux. Et le sens en a été peu à peu perdu : beaucoup d’équipes IT se sont mises à faire de « l’IT for IT », en ne se préoccupant plus que de répondre à des impératifs de gestion administrative et de management interne, mais sans rapport avec la valeur délivrée au métier. De plus, tous les processus mis en place pour sécuriser l’IT ont comme principal défaut de se traduire par des délais structurels et incompressibles absolument incompatibles avec les besoins du métier : ainsi, lors de la mise en place de la réglementation Solvency II dans les assurances, la </text:span><text:soft-page-break/><text:span text:style-name="T102">plupart des IT des Grands Groupes demandaient des délais de plusieurs années pour mettre en place les briques fonctionnelles demandées, alors que le délai octroyé par le régulateur se comptait en mois…</text:span></text:p>
      <text:p text:style-name="P114">Et c’est ainsi que chaque équipe IT est devenue peu à peu un petit État dans l’État, décidant de ses propres objectifs et allant même jusqu’à arbitrer des fonctionnalités demandées par les métiers, pour des raisons budgétaires ou opérationnelles propres à l’IT ! Et le cercle vicieux s’est emballé : les métiers ont perdu confiance en l’IT et se sont mis à accélérer le développement de leur Shadow IT. L’IT s’est enfermé dans un mode fonctionnement autarcique de plus en plus éloigné des métiers où la taille de l’équipe est devenue plus importante que les missions remplies.</text:p>
      <text:p text:style-name="P114">Dans un mode de management très refermé sur lui-même et de plus en plus détaché de ses clients internes, l’importance relative des équipes était plus souvent jaugée par le nombre de collaborateurs dans l’équipe plutôt que par ce qui y était fait. Et c’était en grande partie de cette façon que le manager était évalué : au nombre de collaborateurs encadrés !</text:p>
      <text:p text:style-name="P126"><text:span text:style-name="T102">J’ai déjà évoqué le sujet du modèle de coût de ces structures IT internes : à la différence des GAFAM qui sont tout de suite partis sur un modèle de coût facturé au service et à la consommation, complètement transparent pour le client, les IT des Grands Groupes sont généralement incapables de produire un modèle clair et lisible de leurs coûts. En </text:span><text:soft-page-break/><text:span text:style-name="T102">plus, la vieille tradition du « 1</text:span><text:span text:style-name="T111">st</text:span><text:span text:style-name="T102"> pay for all </text:span><text:span text:style-name="T102"><text:note text:id="ftn28" text:note-class="footnote"><text:note-citation>28</text:note-citation><text:note-body><text:p text:style-name="Footnote">Dans le développement de logiciels, « first pay for all » signifie qu’une fonctionnalité ou un ensemble de fonctionnalités doit être payé en totalité avant d’être livré au client ou à l’utilisateur.</text:p></text:note-body></text:note></text:span><text:span text:style-name="T102">», où c’est le premier projet qui demande et utilise une nouvelle technologie qui paie toute l’addition, ne favorise ni la clarté ni l’expérimentation : à la charge du premier utilisateur tous les coûts d’acquisition des matériels et des logiciels, des coûts projet d’implémentation et d’intégration et toute la mise au point… les suivants bénéficiant d’un système déjà disponible et de coûts dérisoires pour utiliser la même technologie.</text:span></text:p>
      <text:p text:style-name="P114">Il devient donc impossible de s’équiper d’une nouvelle technologie s’il n’y a pas un projet disposant d’un budget suffisant pour encaisser toute la mise en œuvre initiale ; ce qui oblige <text:span text:style-name="T156">pratiquement</text:span> à réserver ce genre d’initiatives à d’énormes projets, en multipliant les risques d’échecs : réussir un gros projet est déjà compliqué, si en plus le projet est dépendant de la réussite de la mise en place d’une nouvelle technologie, le risque est double et la réussite incertaine.</text:p>
      <text:h text:style-name="P214" text:outline-level="3"><text:bookmark-start text:name="__RefHeading___Toc7875_137521599"/>Le Shadow IT : artisanat ou bricolage ?<text:bookmark-end text:name="__RefHeading___Toc7875_137521599"/></text:h>
      <text:p text:style-name="P215"><text:span text:style-name="T1">Revenons sur le Shadow IT, cette réponse métier à certaines des insuffisantes de l’IT des années précédentes. En répondant à l’urgence par l’utilisation d’une nouvelle génération de logiciels plus versatiles et conviviaux, les métiers ont pris aussi une nouvelle responsabilité : ils sont devenus des acteurs clés pour assurer la Production sur des activités très critiques, tout en devant eux-m</text:span><text:span text:style-name="T102">êmes assurer la maintenance et le maintien en conditions opérationnelles des outillages qu’ils ont créé</text:span><text:span text:style-name="T108">s</text:span><text:span text:style-name="T102">.</text:span></text:p>
      <text:p text:style-name="P122"><text:soft-page-break/>Et, s’il est relativement simple de développer en mode prototype un logiciel permettant de répondre à des besoins urgents, il est nettement plus compliqué de s’organiser pour transformer cet outil en un composant pérenne et facile à maintenir. En effet, il faut à la fois revoir la façon dont est codé le logiciel pour le rendre plus robuste et plus modulaire, mais il faut aussi réorganiser l’équipe métier pour disposer de personnel toujours disponible pour réparer l’outil ou le dépanner pendant les périodes critiques de production.</text:p>
      <text:p text:style-name="P122">Si l’IT a mis en place des processus très longs, très cloisonnés et qui ont entraîné une bonne partie des dérives que les métiers ont dénoncées, c’est aussi pour mettre en place un véritable système industriel fiable et robuste permettant de s’assurer que, quoi qu’il arrive, les applications critiques vont fonctionner ou, dans le pire des cas, seront remises en fonction en quelques heures. Arriver à atteindre le même niveau de service dans des services métier est quasiment impossible avec les équipes en place : la pression résultante fait qu’au bout de quelques années les métiers demandent d’eux-mêmes que l’IT reprenne le fonctionnement des applications en Production et le métier se recentre sur la conception et les évolutions.</text:p>
      <text:p text:style-name="P122">Mais la reprise en main par l’IT d’un outil développé par des équipes métiers reste souvent un cauchemar, sauf en de très rares exceptions : être développeur en informatique, ça ne s’improvise pas ! Il faut plusieurs années pour apprendre toutes les procédures, les normes de codage et les outils permettant de réaliser des applications robustes, et surtout facilement maintenables.</text:p>
      <text:p text:style-name="P122"><text:soft-page-break/>Dans la plupart des cas, les métiers qui ont développé leur application Shadow IT, sont des mathématiciens ou des statisticiens de très bon niveau, parfaitement capables de créer les algorithmes complexes que nécessite leur activité. Mais développer un algorithme, ça ne correspond qu’à une infime partie du code à générer pour créer une application. En plus, il faut produire ce code de façon à ce que d’autres personnes puissent le reprendre plus tard, alors qu’ils n’auront jamais entendu parler du contexte avant. En bref, il faut à la fois industrialiser le code et produire une documentation adaptée. C’est la part la plus compliquée et celle qui demande justement tant d’années d’apprentissage aux développeurs…</text:p>
      <text:p text:style-name="P122">Donc, pour que l’IT puisse reprendre les applications Shadow IT et simplement les gérer comme le reste de leur patrimoine applicatif, il faut généralement passer par une phase de réécriture complète de l’outil, suivant les normes et standards de l’IT, accompagnée d’une grosse période de rétro-documentation pour expliquer à quoi sert l’outil et comment il fonctionne.</text:p>
      <text:p text:style-name="P122">Tout ça coûte cher. Très cher, même. Parce que reprendre un outil coûte toujours plus cher qu’en créer un nouveau, on l’a déjà dit. Qui paie ? Et comment justifier de repayer pour quelque chose qui fonctionne déjà ? Parce que le Shadow IT représente également de la dette pour l’IT, mais de la dette cachée qu’il est à peu près impossible de quantifier actuellement…</text:p>
      <text:h text:style-name="Heading_20_3" text:outline-level="3"><text:bookmark-start text:name="__RefHeading___Toc4029_653162392"/><text:soft-page-break/>L’agilité ou le retour en force de l’IT<text:bookmark-end text:name="__RefHeading___Toc4029_653162392"/></text:h>
      <text:p text:style-name="P126"><text:span text:style-name="T1">Ce phénomène de déconnexion de l’IT et des métiers a été constaté dans la plupart des Grands Groupes et les conséquences rapidement </text:span><text:span text:style-name="T17">comprises</text:span><text:span text:style-name="T1">: les équipes métiers sont régulièrement déçues des produits livrés par l’IT à cause de « l’effet tunnel </text:span><text:span text:style-name="T1"><text:note text:id="ftn29" text:note-class="footnote"><text:note-citation>29</text:note-citation><text:note-body><text:p text:style-name="Footnote">« L’effet tunnel » dans le contexte du modèle de développement en cascade en informatique se réfère à la tendance à ignorer ou à minimiser les retours d’information et les ajustements nécessaires tout au long du processus de développement. Dans ce modèle, chaque phase du développement (telle que l’analyse des besoins, la conception, la programmation, les tests, etc.) est réalisée de manière séquentielle, avec peu de possibilités de revenir en arrière pour apporter des modifications aux étapes précédentes une fois qu’elles sont terminées. Cela peut entraîner un « effet tunnel », où les problèmes ou les changements nécessaires sont ignorés ou négligés jusqu’à ce qu’ils deviennent plus coûteux et difficiles à résoudre à mesure que le projet progresse.</text:p></text:note-body></text:note></text:span><text:span text:style-name="T1">» inhérent à la lourdeur des processus IT </text:span><text:span text:style-name="T13">et</text:span><text:span text:style-name="T1"> à cause de l’évolution du marché et/ou de la réglementation entre le moment de la commande et celui de la livraison, </text:span><text:span text:style-name="T13">dix-huit</text:span><text:span text:style-name="T1"> ou </text:span><text:span text:style-name="T13">vingt-quatre</text:span><text:span text:style-name="T1"> mois plus tard. Et elles ont également le sentiment de payer très cher (à cause du mode de facturation opaque) des services IT qui sont incapables de répondre à leur</text:span><text:span text:style-name="T13">s</text:span><text:span text:style-name="T1"> besoins, en particulier en matière d’adaptabilité.</text:span></text:p>
      <text:p text:style-name="P126"><text:span text:style-name="T1">Cette nécessité de rapprocher les utilisateurs et les fabricants d’outils a conduit à instaurer à l’échelle de l’entreprise entière un mode de fonctionnement plus intégré, décliné du « Manifesto </text:span><text:soft-page-break/><text:span text:style-name="T1">Agile </text:span><text:span text:style-name="T1"><text:note text:id="ftn30" text:note-class="footnote"><text:note-citation>30</text:note-citation><text:note-body><text:p text:style-name="Footnote">Le Manifesto Agile est une déclaration de valeurs et de principes pour le développement de logiciels et la gestion de projets axés sur l’agilité :</text:p><text:list text:style-name="WWNum14"><text:list-item><text:p text:style-name="P223">Les individus et les interactions sont plus importants que les processus et les outils.</text:p></text:list-item><text:list-item><text:p text:style-name="P223">Le fonctionnement du logiciel est plus important que la documentation exhaustive.</text:p></text:list-item><text:list-item><text:p text:style-name="P223">La collaboration avec les clients et les parties prenantes prime sur la négociation contractuelle.</text:p></text:list-item><text:list-item><text:p text:style-name="P223">Être capable de répondre aux changements plutôt que de suivre un plan rigide.</text:p></text:list-item></text:list></text:note-body></text:note></text:span><text:span text:style-name="T1">» initialement inventé pour créer des logiciels offrant une plus grande valeur métier à l’utilisateur.</text:span></text:p>
      <text:p text:style-name="P126">L’idée de base est simple : plut<text:span text:style-name="T102">ôt que de fonctionner en mode client-fournisseur où le client fait une commande à une date t et reçoit sa livraison plusieurs dizaines de mois plus tard, alors que le business lui-même a changé entre-temps, les équipes métiers et IT vont travailler main dans la main tous les jours et le produit va se construire progressivement, en mode itératif et avec la possibilité de réorienter et de reprioriser à tout moment.</text:span></text:p>
      <text:p text:style-name="P114">Et, dans ce cas, ça fonctionne : parce qu’on est justement plus en Théorie. C’est un mode de fonctionnement pragmatique et empirique. Mais pas parfait, malheureusement. Le mode Agile demande une disponibilité constante des experts métiers déjà fortement sollicités par ailleurs pour les tâches opérationnelles et de Production : le juste équilibre est très délicat à trouver.</text:p>
      <text:p text:style-name="P114">Toutefois, quand ça fonctionne (c’est à dire quand on trouve les bonnes personnes dans les équipes IT et métiers pour le faire fonctionner), c’est un gage de réussite et de satisfaction de tous.</text:p>
      <text:p text:style-name="P126"><text:soft-page-break/><text:span text:style-name="T102">Par contre, il ne faut pas croire que le mode Agile permet de livrer un produit fini plus vite ou moins cher qu’avec les anciennes méthodes : ça reste une légende urbaine tenace. En fait, le mode Agile permet de livrer plus rapidement les fonctionnalités les plus importantes pour le Métier et de disposer rapidement d’une application permettant de répondre rapidement aux exigences du business. C’est la fameuse accélération du « Time to Market </text:span><text:span text:style-name="T102"><text:note text:id="ftn31" text:note-class="footnote"><text:note-citation>31</text:note-citation><text:note-body><text:p text:style-name="Footnote">« Time to Market » (TTM) est un concept utilisé en informatique pour décrire la durée nécessaire pour qu’un produit ou un service soit développé, testé et mis à disposition sur le marché. Il s’agit du laps de temps qui s’écoule depuis le début du processus de développement jusqu’à ce que le produit ou le service soit prêt à être commercialisé et accessible aux clients. Un TTM rapide est généralement considéré comme un avantage concurrentiel, car il permet aux entreprises d’introduire leurs produits ou services sur le marché plus rapidement que leurs concurrents, ce qui peut se traduire par une plus grande part de marché et une meilleure satisfaction des clients.</text:p></text:note-body></text:note></text:span><text:span text:style-name="T102">».</text:span></text:p>
      <text:p text:style-name="P114">Mais cette accélération peut aussi être un piège : comme nous l’avons vu, si cette accélération se traduit par un passage par la bande d’arrêt d’urgence, il est malheureusement trop fréquent que le produit livré rapidement ne soit finalement qu’un prototype qui n’atteindra jamais le stade de produit fini, par non prise en compte de la dette technique créée à cette occasion. Le coût du produit fini et sécurisé reste le même quelle que soit la méthode utilisée.</text:p>
      <text:p text:style-name="P42"/>
      <text:p text:style-name="P43"><draw:custom-shape text:anchor-type="as-char" draw:z-index="4" draw:name="Forme 2" draw:style-name="gr1" draw:text-style-name="P267" svg:width="1.19cm" svg:height="1.147cm"><text:p text:style-name="P219"><text:span text:style-name="T115">7</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4" text:outline-level="2"><text:bookmark-start text:name="__RefHeading___Toc1780_11151780541"/>C’est pas Sherwood, ici !<text:bookmark-end text:name="__RefHeading___Toc1780_11151780541"/></text:h>
      <text:h text:style-name="P28" text:outline-level="3"><text:bookmark-start text:name="__RefHeading___Toc2310_27698709951"/>L<text:span text:style-name="T203">a mort de Robin des Bois</text:span><text:bookmark-end text:name="__RefHeading___Toc2310_27698709951"/></text:h>
      <text:p text:style-name="P29">Dans mes précédents chapitres, j’ai surtout <text:span text:style-name="T93">présenté des mauvaises habitudes qu’on rencontre dans des Grands Groupes qui manipulent des quantités énormes de données et qui ont besoin d’importantes ressources IT pour le faire.</text:span></text:p>
      <text:p text:style-name="P29"><text:span text:style-name="T93">Mais le monde de la Finance ne se cantonne pas aux grosses entreprises qui manipulent tous les jours des téraoctets de données avec des armées d’informaticiens. On pourrait dire, pour faire une analogie, que c’est plutôt du service qui s’adresse au grand public, voire de la grande distribution. En gros, c’est plutôt pour le client lambda des banques et des assurances, pour vous et moi, en quelque sorte. Pour certaines </text:span><text:span text:style-name="T94">catégories de client</text:span><text:span text:style-name="T95">s</text:span><text:span text:style-name="T94">, on va proposer d’autres produits spécifiques, plus personnalisés et taillés sur mesure.</text:span></text:p>
      <text:p text:style-name="P89">On peut complètement comparer cette approche entre les produits standards proposés en prêt à porter et les produits de luxe réalisés à la main par des artisans experts et hors de prix. Mais comment fait-on du luxe en Finance ? À quoi cela correspond-il ?</text:p>
      <text:p text:style-name="P30"><text:soft-page-break/><text:span text:style-name="T94">E</text:span><text:span text:style-name="T93">n général, la règle est simple à retenir : plus on est riche, plus on a des rendements financiers importants et moins on paie. </text:span><text:span text:style-name="T95">Quand je dis qu’on paie moins, ça veut dire qu’on paie moins d’impôts, moins de frais de gestion, moins de pénalités, moins de tout en fait. C</text:span><text:span text:style-name="T93">’est pour cela </text:span><text:span text:style-name="T95">que ces clients </text:span><text:span text:style-name="T96">entrant dans la catégorie des riches (ou des hyper-riches) ne vont pas bénéficier des mêmes services que le commun des mortels de leurs banquiers : en fait, ce sont même ces banquiers qui vont leur proposer des services particulièrement adaptés pour justement payer de moins en moins.</text:span></text:p>
      <text:p text:style-name="P31"><text:span text:style-name="T93">Ainsi, il y a un truc que la majorité des riches n’aiment pas payer, </text:span><text:span text:style-name="T97">mais alors pas du tout</text:span><text:span text:style-name="T93"> : ce sont les impôts. Ils préfèrent largement que ce soient les classes moyennes qui les paient, plutôt qu’eux</text:span><text:span text:style-name="T93"><text:note text:id="ftn32" text:note-class="footnote"><text:note-citation>32</text:note-citation><text:note-body><text:p text:style-name="Footnote">P<text:span text:style-name="T215">our plus d’informations sur le taux réel d’imposition des plus riches, c’est </text:span><text:a xlink:type="simple" xlink:href="https://www.francetvinfo.fr/replay-radio/l-interview-eco/le-taux-d-imposition-reel-des-ultrariches-en-france-est-seulement-de-2-denonce-le-professeur-d-economie-gabriel-zucman_5583279.html" text:style-name="Internet_20_link" text:visited-style-name="Visited_20_Internet_20_Link"><text:span text:style-name="T215">ici</text:span></text:a></text:p></text:note-body></text:note></text:span><text:span text:style-name="T93">. </text:span><text:span text:style-name="T99">Fini la grande époque héroïque ou certains redresseurs de torts volaient aux riches pour donner aux pauvres ! A-t-elle réellement existé d’ailleurs ? Actuellement, le mot d’ordre, c’est plutôt de ne rien faire payer aux riches et de surtaxer les autres… </text:span><text:span text:style-name="T98">Et il y a une activité bancaire spécifiquement destinée aux clients de ce genre d’établissement de Banque Privée ou de Gestion de Fortune qui représente le principal attrait pour eux : l’optimisation fiscale.</text:span></text:p>
      <text:p text:style-name="P32"><text:span text:style-name="T98">E</text:span><text:span text:style-name="T93">nfin, la notion d’optimisation fiscale est d’abord un souci de vocabulaire : pour les pauvres citoyens lambda comme vous et moi, ne pas payer ses impôts, c’est de la fraude fiscale, et c’est puni par la loi. Comme les impôts nous retrouvent toujours, on paie toujours à la fin. Pour les riches, c’est plus subtil. D’abord, ils ne font pas de fraude fiscale : c’est trop </text:span><text:soft-page-break/><text:span text:style-name="T93">vulgaire. Les riches, en fonction de la façon dont ils opèrent, font de l’évasion fiscale ou de l’optimisation fiscale. C’est quoi la différence entre les deux, me di</text:span><text:span text:style-name="T100">r</text:span><text:span text:style-name="T93">ez-vous ? C’est essentiellement une question de respect de la lettre ou de l’esprit des lois fiscales.</text:span></text:p>
      <text:p text:style-name="P87">Ainsi, l’évasion fiscale s’entend comme l’ensemble des comportements du contribuable, particulier ou entreprise, visant à réduire le montant des impositions dont il doit légalement s’acquitter. Fondée sur le transfert du patrimoine vers un autre pays au régime fiscal plus avantageux, l’évasion fiscale apparaît comme une notion ambiguë, à la frontière entre la fraude et l’optimisation fiscale.</text:p>
      <text:p text:style-name="P32"><text:span text:style-name="T93">Si la fraude cherche à abaisser le montant de l’impôt, elle repose cependant sur des moyens illégaux. L’évasion fiscale se rapproche davantage de l’optimisation fiscale, qui vise à réduire la charge fiscale par une utilisation pertinente de la réglementation. Selon un rapport de l’Assemblée nationale consacré à l’évasion fiscale internationale des entreprises, « l’</text:span><text:span text:style-name="T101">évasion, non définie en droit français, a en commun avec la fraude la volonté de ses auteurs de contourner la norme fiscale en vigueur dans le but d’éluder l’impôt, mais repose sur des mécanismes réguliers ou en apparence réguliers</text:span><text:span text:style-name="T93"> ».</text:span></text:p>
      <text:p text:style-name="P32"><text:span text:style-name="T93">Et c’est en surfant sur ces notions un peu floues et sur la complexité des réglementations fiscales entre états que les banquiers privés vont permettre à leurs clients fortunés de payer proportionnellement autant d’impôts sur leurs revenus que les récipiendaires du RSA. Sans s’attarder sur le côté moral ou non de ces pratiques </text:span><text:soft-page-break/><text:span text:style-name="T93">et leur effet désastreux sur les finances publiques</text:span><text:span text:style-name="T93"><text:note text:id="ftn33" text:note-class="footnote"><text:note-citation>33</text:note-citation><text:note-body><text:list text:style-name="L4"><text:list-item><text:p text:style-name="P266"><text:a xlink:type="simple" xlink:href="http://www.europarl.europa.eu/sides/getDoc.do?pubRef=-//EP//TEXT+REPORT+A7-2013-0162+0+DOC+XML+V0//FR" office:target-frame-name="_blank" xlink:show="new" text:style-name="Internet_20_link" text:visited-style-name="Visited_20_Internet_20_Link"><text:span text:style-name="T204">dans un rapport publié en mai 2013</text:span></text:a>, la Commission européenne estime pour sa part que les États membres de l’Union européenne (UE) seraient privés de près de 1.000 milliards d’euros <text:span text:style-name="T205">chaque année</text:span>.</text:p></text:list-item></text:list></text:note-body></text:note></text:span><text:span text:style-name="T93"> – étonnamment pas compensées par le fameux « effet de ruissellement » largement vanté par ailleurs et toujours invisible – comment les organismes de Banque Privée et de Gestion de Fortune vont-ils proposer ce genre de services « sur-mesure »à leurs clients ?</text:span></text:p>
      <text:p text:style-name="P87">Déjà, il ne faut pas croire que ce genre de service <text:span text:style-name="T203">taillé main soit facile à mettre en œuvre dans des systèmes informatiques classiques : en effet, l’informatique, et plus particulièrement l’informatique de gestion, a historiquement été conçue pour traiter d’énormes volumes de données suivant des règles bien définies, afin de produire des résultats analysables avec des outils statistiques et analytiques puissants. Pour ces clientèles extrêmement privilégiées, il faut justement jouer dans les marges, dans les flous et les incohérences des réglementations fiscales des différents pays et l’équipement IT industriel n’est absolument pas adapté : pas assez souple, trop procédural, trop long à s’adapter, trop cher.</text:span></text:p>
      <text:h text:style-name="P187" text:outline-level="3"><text:bookmark-start text:name="__RefHeading___Toc7053_137521599"/>Le retour de l’Artisanat<text:bookmark-end text:name="__RefHeading___Toc7053_137521599"/></text:h>
      <text:p text:style-name="P186"><text:span text:style-name="T65">D</text:span><text:span text:style-name="T19">onc, quand on ne peut pas utiliser les outils industriels par manque d’adaptabilité de ces mastodontes, il y a plusieurs approches possibles, </text:span><text:soft-page-break/><text:span text:style-name="T19">suivant le degré de maturité et d’appétence technologique des populations impliquées :</text:span></text:p>
      <text:list text:style-name="L5">
        <text:list-item>
          <text:p text:style-name="P254">Monter des équipes hybrides, avec des compétences IT et Métiers, et des outillages modernes et adaptés, pour créer des outils adaptables, pérennes et à coût maîtrisé permettant à la fois de répondre aux besoins actuels des clients et d’anticiper les évolutions dans le futur,</text:p>
        </text:list-item>
        <text:list-item>
          <text:p text:style-name="P254">Faire de la merde avec les équipes déjà en place.</text:p>
        </text:list-item>
      </text:list>
      <text:p text:style-name="P88">Bizarrement, dans plus de 95 % des cas, c’est toujours la deuxième solution qui est retenue et appliquée. C’est tellement flagrant qu’on pourrait soupçonner une volonté de mal faire, mais c’est juste une expression de <text:span text:style-name="T243">ce </text:span>que, dans d’autres domaines, on appelle la fracture numérique. Il ne faut pas croire que les retraités isolés au fin fond de la campagne dans la diagonale du vide française soient si différents des dirigeants des services financiers les plus prestigieux : ni les uns, ni les autres, n’y comprennent rien aux subtilités de l’informatique !</text:p>
      <text:p text:style-name="P90">Et quand je parle de subtilités, je ne parle pas des merveilles un peu magiques qui peuvent sortir des laboratoires de Palo Alto ou de Mountain View, je parle juste des outils informatiques du quotidien pour n’importe qui travaille dans l’informatique depuis des années. Ainsi, la principale activité de la Finance, c’est de contrôler ce que font les banquiers, les investisseurs, les brokers, les traders… C’est très bien de savoir que ces activités rapportent de l’argent, mais c’est encore mieux de comprendre combien et pourquoi.</text:p>
      <text:p text:style-name="P90"><text:soft-page-break/>Et pour comprendre tout ça, on doit passer sur des analyses statistiques, des rapports et des indicateurs qui doivent remonter au top management pour qu’il puisse ajuster ses décisions en fonction des résultats présentés. En théorie, tout au moins.</text:p>
      <text:p text:style-name="P90">En pratique, comme toujours, c’est plus compliqué : dans les grandes entreprises financières qui traitent des millions de clients, des milliards de transactions tous les jours, la nécessité de produire ces analyses et ces rapports de façon automatisée et fiabilisée s’est naturellement imposée et on a même créé des activités spécifiques pour s’assurer de la qualité de ces productions : ça s’appelle la Data Governance, le Data Management, le Data Quality Management…</text:p>
      <text:p text:style-name="P90">Par contre, dans les entreprises « artisanales », le manque de culture numérique incite les décideurs à miser davantage sur les hommes que sur les technologies. Comme dans l’artisanat traditionnel, on privilégie la culture du « fait main » à celle du « fait machine ». <text:span text:style-name="T206">Et tout cela à cause d’un outil fourni par Microsoft à tous les employés travaillant quotidiennement sur leur ordinateur pour accomplir des tâches bureautiques : Excel.</text:span></text:p>
      <text:p text:style-name="P91">On ne s’en <text:span text:style-name="T243">rend </text:span>pas forcément compte, mais ça fait près de quarante ans que Excel, Word et Powerpoint sont présents sur tous les ordinateurs bureautiques. J’ai déjà évoqué largement les dégâts causés par un outil aussi bénin que Powerpoint. Concernant Excel, c’est très largement pire, tout simplement parce que l’outil est largement plus puissant et employé à des tâches nettement plus critiques.</text:p>
      <text:p text:style-name="P91"><text:soft-page-break/>À l’origine, Excel a été conçu dans les années 80 pour concurrencer Lotus-1-2-3 en remplaçant le dépassé Microsoft Multiplan. Qui se souvient encore de Lotus ou de Multiplan ? Et qui, travaillant dans un bureau, n’a jamais utilisé Excel ?</text:p>
      <text:p text:style-name="P91">Parce qu’Excel fait tout. Ou plutôt, on y a rajouté tellement de trucs au cours du temps qu’Excel peut faire énormément de choses, qui dépassent de loin les capacités d’un tableur, c’est-à-dire d’un outil censé faire des opérations dans un tableau.</text:p>
      <text:p text:style-name="P91">Ainsi, sans être exhaustif, Excel permet de :</text:p>
      <text:list text:style-name="L6">
        <text:list-item>
          <text:p text:style-name="P255">Faire des calculs complexes et dynamiques, avec des fonctions très avancées en ingénierie financière ou autre,</text:p>
        </text:list-item>
        <text:list-item>
          <text:p text:style-name="P255">Réaliser des analyses statistiques poussées, des tableaux croisés dynamiques ou des graphiques de types variés,</text:p>
        </text:list-item>
        <text:list-item>
          <text:p text:style-name="P255">Faire de la programmation en langage VBA, avec des fonctions très avancées et le recours à des bibliothèques externes, pour automatiser les calculs et les tâches récurrentes,</text:p>
        </text:list-item>
        <text:list-item>
          <text:p text:style-name="P255">Se connecter à des bases de données externes (y compris sur le Cloud) ou servir de base de données pour d’autres applications,</text:p>
        </text:list-item>
        <text:list-item>
          <text:p text:style-name="P255">Faire du publipostage sur des informations stockées dans les feuilles excel ou dans d’autres bases de données,</text:p>
        </text:list-item>
        <text:list-item>
          <text:p text:style-name="P255">Travailler en mode collaboratif avec d’autres utilisateurs en temps réel…</text:p>
        </text:list-item>
      </text:list>
      <text:p text:style-name="P91"><text:soft-page-break/>Bref, avec peu de moyens et beaucoup de jus de cerveau de personnes astucieuses et motivées, Excel peut <text:span text:style-name="T207">assurer toutes les tâches calculatoires d’un service. Puis d’une Direction, puis d’un Département… et voilà comment apparaît le Shadow IT ! Tadam !</text:span></text:p>
      <text:p text:style-name="P190"><text:span text:style-name="T66">P</text:span><text:span text:style-name="T67">our une entreprise dont les employés remplissent à longueur de journée des tableaux Excel, il est tout à fait naturel de leur demander de produire tous ces reportings et analyses avec ce même outil polyvalent et pas cher. Enfin, pas cher, c’est à voir. Parce qu’Excel, avec beaucoup d’efforts, peut être automatisable. Mais ça ne veut pas dire qu’il est automatisé : il n’a tout simplement </text:span><text:span text:style-name="T89">pas </text:span><text:span text:style-name="T67">été conçu pour ça. Lorsqu’ils utilisent Excel, les utilisateurs ont généralement de nombreuses et complexes manipulations à effectuer pour produire leurs résultats. Donc, ça prend du temps. And Time is Money… </text:span><text:span text:style-name="T216">En plus, malgré tous les efforts engagés par les équipes qui réalisent ces travaux, et malgré tous les contrôles, vérifications et revérifications, ces feuilles Excel sont bourrées d’erreurs :</text:span> selon une étude de 2008, <text:span text:style-name="T139">« 88 % des classeurs Excel comportent une erreur de données, de formule, de code ou de liaison</text:span><text:span text:style-name="T139"><text:note text:id="ftn34" text:note-class="footnote"><text:note-citation>34</text:note-citation><text:note-body><text:p text:style-name="P10">2008 Harvard Studies</text:p></text:note-body></text:note></text:span><text:span text:style-name="T139"> ».</text:span></text:p>
      <text:p text:style-name="P191">Quand on met bout à bout tous ces éléments, on arrive à un terreau fertile pour affecter ses employés à des travaux à la con de première catégorie : dans mon nouvel emploi, je vois des services entiers englués dans une routine assez alarmante. Leur fonction première étant de produire des reportings de pilotage sur leur activité bancaire (risques de crédit, suivi de fortune, encours…), ils <text:soft-page-break/>vont effectuer chaque mois le même rituel immuable :</text:p>
      <text:list text:style-name="L7">
        <text:list-item>
          <text:p text:style-name="P264">Extraire en début de mois un fichier plat hyper-volumineux directement depuis les SI de gestion de l’entreprise, sans s’encombrer forcément de beaucoup de principes concernant le respect des réglementations sur l’utilisation des données personnelles, RGPD en tête (forcément, s’ils accomplissent cette corvée depuis vingt ans ou plus, ce n’est pas l’arrivée d’une nouvelle réglementation en 2018 qui a changé leurs habitudes, malheureusement…),</text:p>
        </text:list-item>
        <text:list-item>
          <text:p text:style-name="P264">Exploiter et travailler ces données pendant plusieurs semaines avec Excel pour aboutir peu ou prou au résultat attendu (modulo les erreurs dans les feuilles Excel, qui peuvent également dater de plusieurs années, vu que <text:span text:style-name="T217">les opérationnels ont tendance à réutiliser et faire évoluer le même fichier d’un exercice à l’autre…),</text:span></text:p>
        </text:list-item>
        <text:list-item>
          <text:p text:style-name="P265">Affiner et faire valider les résultats pendant les quelques jours avant l’échéance avec le responsable du service (et là, il est possible de modifier « au doigt mouillé » des données qui paraissent incongrues…),</text:p>
        </text:list-item>
        <text:list-item>
          <text:p text:style-name="P265">Profiter des quelques jours restant<text:span text:style-name="T218">s</text:span> avant la mise à disposition des données du mois suivant pour souffler et s’occuper de l’administratif,</text:p>
        </text:list-item>
        <text:list-item>
          <text:p text:style-name="P265">Relancer le process au point 1.</text:p>
        </text:list-item>
      </text:list>
      <text:p text:style-name="P196"><text:soft-page-break/><text:span text:style-name="T68">Au final, ça fait beaucoup d’énergie dépensée pour produire si lentement et avec tellement d’erreurs ! On pourrait se dire : quelle belle opportunité de regarder ce que peut faire la technologie pour nous ! </text:span><text:span text:style-name="T19">Et c’est là que, </text:span><text:span text:style-name="T69">une de fois de plus, ça devient compliqué : nous n’avons toujours pas déménagé en Théorie.</text:span></text:p>
      <text:h text:style-name="P110" text:outline-level="3"><text:bookmark-start text:name="__RefHeading___Toc8284_132914344"/>Le coût de la donnée<text:bookmark-end text:name="__RefHeading___Toc8284_132914344"/></text:h>
      <text:p text:style-name="P192"><text:span text:style-name="T19">Parce que ce n’est pas un simple problème mathématique : combien ça coûte et combien je peux économiser en automatisant ? Tout d’abord, personne ne sait combien ça coûte. En Finance, il est toujours très compliqué d’évaluer un coût, d’autant plus quand les </text:span><text:span text:style-name="T70">actions</text:span><text:span text:style-name="T19"> sont accomplies par des </text:span><text:span text:style-name="T70">individus :</text:span><text:span text:style-name="T19"> </text:span><text:span text:style-name="T70">vu que les tâches opérationnelles et les tâches du quotidien sont gérées par les mêmes personnes, elles ne savent pas forcément identifier quelles sont les tâches de « Production » des autres, telles que celles qui correspondent aux contrôles ou à l’amélioration de la qualité des données. Tout </text:span><text:span text:style-name="T71">est amalgamé et mélangé dans les coûts de fonctionnement du </text:span><text:span text:style-name="T72">service et le coût de la Data (pour mettre dans un grand sac tous les coûts liés à la production des reportings et des analyses) devient indissociable des coûts généraux.</text:span></text:p>
      <text:p text:style-name="P193"><text:span text:style-name="T72">L</text:span><text:span text:style-name="T73">a conséquence </text:span><text:span text:style-name="T74">directe</text:span><text:span text:style-name="T73"> ? Dans l’esprit du responsable du service et des différents décideurs, c’est devenu un coût de structure obligatoire et incompressible. </text:span><text:span text:style-name="T74">Mais on peut aussi constater d’autres conséquences plus subtiles et plus perverses, qui ont des impacts directs sur la capacité à simplement proposer des solutions innovantes pour améliorer les conditions de travail des opérationnels. Comme </text:span><text:soft-page-break/><text:span text:style-name="T74">personne ne sait calculer les coûts cachés liés </text:span><text:span text:style-name="T75">à l’exploitation de la donnée, </text:span><text:span text:style-name="T76">il devient pratiquement impossible de définir les gains potentiels permis par une meilleure utilisation de la donnée !</text:span></text:p>
      <text:p text:style-name="P193"><text:span text:style-name="T77">D’où la difficulté à répondre à la question habituelle d’un financier quand on lui propose de nouvelles solutions technologiques : que vais-je y gagner ? Quel va être mon ROI</text:span><text:span text:style-name="T77"><text:note text:id="ftn35" text:note-class="footnote"><text:note-citation>35</text:note-citation><text:note-body><text:p text:style-name="Footnote">Le retour sur investissement (ROI) permet de comparer des investissements en prenant en compte l’argent investi et l’argent gagné.</text:p></text:note-body></text:note></text:span><text:span text:style-name="T77">? Et c’est là que ça coince : il est quasiment impossible de définir le ROI de la Data, vu qu’il manque un paramètre de mesure quand on se sait pas combien coûte la Data initialement. L’université de Stanford, actuellement la plus avancée sur les sujets liés à la Data, a même déclaré qu’il était généralement impossible d’identifier des retours sur investissement sur les travaux liés à la Data</text:span><text:span text:style-name="T77"><text:note text:id="ftn36" text:note-class="footnote"><text:note-citation>36</text:note-citation><text:note-body><text:p text:style-name="P194"><text:a xlink:type="simple" xlink:href="https://www.lightsondata.com/data-governance-maturity-models-stanford/" text:style-name="Internet_20_link" text:visited-style-name="Visited_20_Internet_20_Link">Pour plus de précisions</text:a></text:p></text:note-body></text:note></text:span><text:span text:style-name="T77">.</text:span></text:p>
      <text:p text:style-name="P125"><text:span text:style-name="T126">A</text:span><text:span text:style-name="T124">insi, comment justifier les investissements technologiques de la Data ? </text:span><text:span text:style-name="T127">Dans un service où les coûts de la Data sont cachés, la Data ne coûte rien pour le manager : c’est du budget de fonctionnement. Dans ces conditions, il devient plutôt malaisé de venir voir ce même manager, ou ses responsables hiérarchiques, en leur demandant quelques millions d’euros pour mettre en place un nouveau système qui va faire les choses à la place de ses équipes… Pourquoi dépenser ces millions alors que ça fonctionne très bien actuellement ? Enfin, ça fonctionne très bien dans la vision du responsable : les livrables sont produits en temps et en heure, non ? Et puis, si une machine fait le travail de mes </text:span><text:soft-page-break/><text:span text:style-name="T127">employés, qu’est-ce que je vais faire de mes équipes ?</text:span></text:p>
      <text:p text:style-name="P195"><text:span text:style-name="T19">P</text:span><text:span text:style-name="T88">arce que l</text:span><text:span text:style-name="T19">e fait de miser sur les gens, plutôt que sur les </text:span><text:span text:style-name="T77">machines, n’a pas que des impacts financiers ; ça a également des impacts humains très importants : </text:span><text:span text:style-name="T79">pour travailler « à la main », </text:span><text:span text:style-name="T78">il faut des équipes </text:span><text:span text:style-name="T79">de personnes compétentes et des managers pour les encadrer. </text:span><text:span text:style-name="T80">Ça veut aussi dire des effectifs importants et, dans les modes de management « à l’ancienne », un pouvoir proportionnel à la taille de ses équipes. </text:span><text:span text:style-name="T81">Et ce pouvoir visible et quantifiable est nettement plus important que le manque de fiabilité des analyses ou des reportings : tant que l’erreur reste dans une limite « acceptable » (et dont la tolérance est grandement évaluée par le manager lui-même), pas d’inquiétude et pas de souci. À noter que vu les outils utilisés, la plupart des temps les managers et les équipes ne sont même pas conscients du fait que les livrables produits sont truffés d’erreurs…</text:span></text:p>
      <text:p text:style-name="P201"><text:span text:style-name="T19">Ensuite, il y a également des impacts indirects, plus pervers et aux conséquences plus lourdes : que faire des personnes qui accomplissent si consciencieusement ces tâches abrutissantes, quand ça fait plus de vingt ans </text:span><text:span text:style-name="T82">que c’est leur activité principale ? Ben, pas grand-chose, justement. </text:span><text:span text:style-name="T83">Ce n’est pas que ces personnes soient stupides ou incompétentes, c’est juste que, quand on passe des années à faire toujours la même chose, on ne sait plus faire que ça ! Et le passage aux nouvelles technologies ne peut pas se faire d’un coup de baguette magique : ces personnes, engluées dans Excel depuis des années, ne sont pas des candidats naturels pour devenir des data analysts ou des data </text:span><text:soft-page-break/><text:span text:style-name="T83">scientists, travaillant sous python avec les dernières librairies à la mode…</text:span></text:p>
      <text:h text:style-name="Heading_20_3" text:outline-level="3"><text:bookmark-start text:name="__RefHeading___Toc8286_132914344"/>Ramener du sang nouveau<text:bookmark-end text:name="__RefHeading___Toc8286_132914344"/></text:h>
      <text:p text:style-name="P201"><text:span text:style-name="T83">J’ai déjà parlé de la pénurie des talents pour pouvoir faire de nouvelles choses innovantes dans le cadre d’une Transformation, mais cette problématique s’applique aussi </text:span><text:span text:style-name="T84">pour ce genre de profils opérationnels. Certes, ça limite les capacités d’évolution et d’adoption des nouvelles pratiques, mais ça entraîne surtout un cercle vicieux qui force à rester dans les pratiques moyenâgeuses : c’est un repoussoir à jeunes ! En effet, dans la plupart des sociétés, il y a un turn-over naturel lié aux évènements de la vie (</text:span><text:span text:style-name="T86">départs à la retraite, </text:span><text:span text:style-name="T84">déménagements, aménagements du temps de travail pour des nouveaux enfants ou pour maladie…), à la volonté de changement professionnel ou à l’appât du gain (en allant chercher si l’herbe est plus verte dans le champ d’à-côté).</text:span></text:p>
      <text:p text:style-name="P202"><text:span text:style-name="T19">Les nouveaux recrutés pour remplacer les partants vont apporter avec eux de nouvelles compétences, de nouvelles façons de faire, de nouvelles habitudes… et vont faire peu à peu évoluer la culture d’entreprise. </text:span><text:span text:style-name="T85">Ainsi, on peut assister à des effets positifs très inattendus liés à ce renouvellement : dans le Grand Groupe auquel j’appartiens, nous nous sommes rapidement rendu compte que, pour recruter </text:span><text:span text:style-name="T86">des jeunes diplômés sur les secteurs en tension dont j’ai déjà parlé (data scientists, data engineers, data analysts…), il fallait leur proposer, au-delà d’un plan de carrière, des sujets et des projets qui les intéressent. Sinon, ils préfèrent largement postuler pour la start-up qui va leur proposer des vrais sujets intéressants et </text:span><text:soft-page-break/><text:span text:style-name="T86">motivants, sur de vrais sujets sociétaux et environnementaux. Ça nous a forcé à lancer des projets ESG</text:span><text:span text:style-name="T86"><text:note text:id="ftn37" text:note-class="footnote"><text:note-citation>37</text:note-citation><text:note-body><text:p text:style-name="P205">Ce sigle désigne les critères Environnementaux, Sociaux et de bonne Gouvernance qui sont utilisés pour analyser et évaluer la prise en compte du développement durable et des enjeux de long terme dans la stratégie des entreprises.</text:p><text:p text:style-name="P204">Le critère <text:span text:style-name="T219">E</text:span>nvironnemental prend en compte : les émissions de CO2 et de gaz à effet de serre, le recyclage des déchets, la consommation d’électricité ou encore la prévention des risques environnementaux.</text:p><text:p text:style-name="P204">Le critère <text:span text:style-name="T219">S</text:span>ocial tient compte de la qualité du dialogue social au sein des entreprises, l’emploi des personnes handicapées ou encore la formation des salariés.</text:p><text:p text:style-name="P204">Le critère de <text:span text:style-name="T219">G</text:span>ouvernance s’assure de la transparence de la rémunération des dirigeants d’entreprise, de la lutte contre la corruption ou encore de la féminisation des conseils d’administration.</text:p><text:p text:style-name="P205"/></text:note-body></text:note></text:span><text:span text:style-name="T86"> de plus en plus ambitieux pour les attirer.</text:span></text:p>
      <text:p text:style-name="P95">Une fois lancés, ces projets ont également permis de développer et de proposer de nouveaux produits plus verts, plus durables et plus vertueux à, attirant de nouveaux clients et en fidélisant des anciens : le bénéfice est double, voire triple !</text:p>
      <text:p text:style-name="P203"><text:span text:style-name="T19">Mais dans les entreprises « artisanales » qui peinent à mener leur Transformation, la peine est double, voir triple ! Non seulement les employés </text:span><text:soft-page-break/><text:span text:style-name="T19">historiques et leurs managers ne sont pas moteurs pour amener de nouvelles pratiques plus vertueuses et les technologiques qui vont avec, mais les conditions de travail déplorables engendrées par le retard technologique et les outils obsolètes font que les jeunes recrutés ne restent pas. </text:span><text:span text:style-name="T87">Et c’est une tragédie en soi : un processus de recrutement, même pour un jeune diplômé, c’est au moins deux mois d’efforts. Quatre à cinq, si c’est un junior qui travaille déjà dans une autre entreprise et qu’il faut débaucher, en prenant en compte le préavis de trois mois obligatoire. Et ces jeunes, lorsqu’ils découvrent les conditions de travail et les pratiques du management, se sauvent sans délai !</text:span></text:p>
      <text:p text:style-name="P203"><text:span text:style-name="T87">Dans la société où je travaille actuellement, la plupart des jeunes qui rejoignent les équipes les plus artisanales restent moins d’une semaine ; il y en a même qui sont partis au bout d’une journée ! Et, sauf exception rarissime, aucun ne va au bout de sa période d’essai ! Ça serait risible si ce n’était pas tragique : dans les cinq prochaines années, beaucoup des opérationnels de ces services vont partir à la retraite et personne ne sait comment ils seront remplacés. Leur connaissance, et donc le savoir-faire de la société va s’envoler, et personne ne semble pouvoir faire évoluer les choses dans le bon sens : comme je l’ai déjà dit, on ne fait pas boire un âne qui n’a pas soif, même si sa vie en dépend… À noter que ce que je constate dans ma société est une tendance générale</text:span><text:span text:style-name="T87"><text:note text:id="ftn38" text:note-class="footnote"><text:note-citation>38</text:note-citation><text:note-body><text:p text:style-name="P200">Concernant la maturité numérique des entreprises et les causes de départ des employés, je vous conseille de lire <text:a xlink:type="simple" xlink:href="https://www.nexthink.com/wp-content/uploads/2022/01/Vanson-Bourne-Employee-Centric-Report_FR.pdf" text:style-name="Internet_20_link" text:visited-style-name="Visited_20_Internet_20_Link">ceci</text:a>.</text:p></text:note-body></text:note></text:span><text:span text:style-name="T87">.</text:span></text:p>
      <text:p text:style-name="P92">Au final, tous ces services sont devenus des incongruités, des anachronismes en fin de vie, <text:soft-page-break/>symboliques d’une façon de travailler et d’un management dépassés : ils n’ont pas compris l’évolution nécessaire et obligée dans un univers de plus en plus numérique. Des investissements inadaptés, liés à une incompréhension totale des enjeux et des technologies, les ont fait miser sur des équipes surdimensionnées équipées d’outils dérisoires, alors que le bon sens aurait dû les inciter à recruter ou former des petits noyaux d’experts autour de solutions innovantes et disruptives.</text:p>
      <text:p text:style-name="P92">Et, au contraire des investissements technologiques qui demandent une mise de fonds importante au départ, mais qui s’amortissent facilement s’ils sont bien utilisés, l’investissement sur les personnes est un panier percé : <text:span text:style-name="T220">une équipe mise en place devient immédiatement indispensable et doit être entretenue </text:span><text:span text:style-name="T141">ad vitam æternam</text:span><text:span text:style-name="T220">, vu que personne ne peut la remplacer, ne sachant pas exactement ce qu’elle fait, ni comment. Et c’est là qu’on peut assister à une autre dérive très perverse et malheureusement trop fréquente…</text:span></text:p>
      <text:h text:style-name="P111" text:outline-level="3"><text:bookmark-start text:name="__RefHeading___Toc6829_3564872834"/>La dérive esclavagiste<text:bookmark-end text:name="__RefHeading___Toc6829_3564872834"/></text:h>
      <text:p text:style-name="P93">Forcément, je grossis un peu le trait, mais les éléments que je décris ici sont malheureusement vrais et entraînent trop souvent de vraies souffrances au travail pour les employés qui y sont soumis.</text:p>
      <text:p text:style-name="P93">Tout d’abord, rappelons quelques évidences :</text:p>
      <text:list text:style-name="L8">
        <text:list-item>
          <text:p text:style-name="P256">une machine ne se trompe jamais,</text:p>
        </text:list-item>
        <text:list-item>
          <text:p text:style-name="P256">une machine ne tombe jamais malade,</text:p>
        </text:list-item>
        <text:list-item>
          <text:p text:style-name="P256">une machine ne prend jamais de vacances,</text:p>
        </text:list-item>
        <text:list-item>
          <text:p text:style-name="P256"><text:soft-page-break/>une machine <text:span text:style-name="T223">ne </text:span>prend pas de congés maternité (attention : ceci n’est pas une remarque sexiste),</text:p>
        </text:list-item>
        <text:list-item>
          <text:p text:style-name="P256">une machine n’est pas sensible au stress ou à la pression de la hiérarchie,</text:p>
        </text:list-item>
        <text:list-item>
          <text:p text:style-name="P256">une machine n’a pas de problèmes à la maison,</text:p>
        </text:list-item>
        <text:list-item>
          <text:p text:style-name="P256">une machine ne peut pas faire de burn-out, de dépression ou de bore-out,</text:p>
        </text:list-item>
        <text:list-item>
          <text:p text:style-name="P256">une machine ne peut pas démissionner,</text:p>
        </text:list-item>
        <text:list-item>
          <text:p text:style-name="P256">une machine ne part pas à la retraite…</text:p>
        </text:list-item>
      </text:list>
      <text:p text:style-name="P93">Un être humain peut faire tout ça, et beaucoup d’autres choses encore. Comme produire des analyses et des rapports avec du matériel inadapté, suivant des échéances délirantes, avec une pression maximale de la part de ses supérieurs…</text:p>
      <text:p text:style-name="P94">Il est difficile d’imaginer les conditions de stress chroniques dans lesquelles travaillent les opérationnels dans ces services artisanaux : tout est à faire pour la veille et, comme l’erreur est omniprésente, le risque de reproche est maximal. On dit souvent qu’il n’y a que ceux qui ne font rien qui ne se trompent pas. Pour ces services, ils ont le malheur de faire beaucoup de choses, et donc <text:span text:style-name="T221">de maximiser</text:span> le risque de se tromper. <text:span text:style-name="T222">En plus, il est rare que ce qu’ils font soit documenté : ce n’est pas une habitude de ce genre de service. Mais, sans documentation, on crée des indispensables, car elles sont seules à détenir le Savoir. Et ces personnes indispensables, </text:span><text:span text:style-name="T224">au lieu d’en tirer bénéfice, en deviennent les victimes !</text:span></text:p>
      <text:p text:style-name="P94"><text:soft-page-break/>O<text:span text:style-name="T224">n ne peut plus se passer d’elles, ça veut surtout dire qu’elles perdent la plupart des libertés associées au statut de salarié : elles deviennent taillables et corvéables à merci, puisque leur travail est critique pour la société ! Leurs vacances peuvent être écourtées ou annulées, pour impératifs de service, elles ne doivent pas tomber malade au moment de produire leurs travaux et elles ne doivent pas se trouver dans un état mental qui puisse favoriser les erreurs ou les oublis.</text:span></text:p>
      <text:p text:style-name="P104">Dans ces conditions, on comprend le stress permanent, d’autant plus que les analyses sont critiques et que le risque d’erreur est important, à cause de l’utilisation d’outils manuels et dépourvus de contrôles. Le risque opérationnel est maximal, la pression est intense et les récompenses en général réservées aux managers. C’est juste un miracle que ce genre de service puisse continuer à fonctionner…</text:p>
      <text:p text:style-name="P121">Bon, on vient de se taper une belle liste de raisons de foirer sa Transformation. Mais est-ce qu’on en a oublié ?</text:p>
      <text:h text:style-name="P119" text:outline-level="3"/>
      <text:p text:style-name="P240"/>
      <text:p text:style-name="P44"><draw:custom-shape text:anchor-type="as-char" draw:z-index="5" draw:name="Forme 3" draw:style-name="gr1" draw:text-style-name="P267" svg:width="1.19cm" svg:height="1.147cm"><text:p text:style-name="P212"><text:span text:style-name="T113">8</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08" text:outline-level="2"><text:bookmark-start text:name="_Toc131774407 Copie 3"/><text:bookmark-start text:name="__RefHeading___Toc1606_1115178054 Copie 3"/>U<text:bookmark-end text:name="_Toc131774407 Copie 3"/>n chef, c’est fait pour cheffer<text:note text:id="ftn39" text:note-class="footnote"><text:note-citation>39</text:note-citation><text:note-body><text:p text:style-name="P207"><text:span text:style-name="T225">J</text:span>acques Chirac, encore une source inépuisable de citations…</text:p></text:note-body></text:note> !<text:bookmark-end text:name="__RefHeading___Toc1606_1115178054 Copie 3"/></text:h>
      <text:h text:style-name="P33" text:outline-level="3"><text:bookmark-start text:name="__RefHeading___Toc1608_1115178054 Copie 1"/>Il ne suffit pas de suivre la recette<text:bookmark-end text:name="__RefHeading___Toc1608_1115178054 Copie 1"/></text:h>
      <text:p text:style-name="P35">N<text:span text:style-name="T225">ous venons de voir tous les grains de sable et les gros pépins qui peuvent se mettre dans les rouages pour gripper ou détruire complètement les belles machineries des Transformations. On pourrait se dire : si je suis super prudent, que je suis bien le manuel et que je coche toutes les cases, je devrais y arriver sans trop de casse. J’ai monté tous les meubles IKEA chez moi et je suis arrivé à faire un super bœuf bourguignon en suivant la recette sur Marmiton, après tout !</text:span></text:p>
      <text:p text:style-name="P34">Forcément, ce n’est pas aussi facile : tout d’abord, il n’y a pas de formule magique qui fonctionne à tous les coups : les entreprises sont constituées d’humains et ils sont tous différents. Donc, leurs interactions sont uniques à chaque fois. Et, surtout, <text:span text:style-name="T226">la principale loi physique qui gère le comportement d’une entreprise est l’inertie : tout dans l’entreprise (personnel, processus et outillage) est destiné, calibré et adapté à la production du </text:span><text:soft-page-break/><text:span text:style-name="T226">moment. Rien n’est conçu pour en sortir et pour faire des variations ou des fioritures. Au contraire, même : plus un processus est « industrialisé » et robuste, plus il est verrouillé et protégé des velléités de sortir du chemin balisé. En général, ce chemin balisé correspond à la façon la plus pragmatique d’utiliser les différents moyens et process disponibles, en fonction de leurs limitations et de leurs contraintes. Chacun des éléments (personnes, process et outils) peut présenter des limitations ou n’être pas utilisé individuellement de la façon la plus optimale, mais au final on arrive généralement à la « moins mauvaise façon » d’utiliser ce qu’on a sous la main.</text:span></text:p>
      <text:p text:style-name="P36">Par obligation opérationnelle, ce genre d’équilibre est toujours fragile et, une fois que ça marche, on ne va pas s’amuser à le casser. On fera au mieux quelques petits ajustements marginaux au fur et à mesure qu’on découvre des petits trucs et astuces, mais la règle de base est : « Touche pas à ça, p’tit con<text:note text:id="ftn40" text:note-class="footnote"><text:note-citation>40</text:note-citation><text:note-body><text:p text:style-name="P209">Pithivier, Mais où est passée la 7e compagnie : je cultive mes citations classiques</text:p></text:note-body></text:note> ».</text:p>
      <text:p text:style-name="P36">Forcément, quand la locomotive de la Transformation arrive, avec ses nouvelles exigences et ses nouvelles demandes, ça va casser toutes ces petites habitudes. Et ces nouvelles demandes ne rentrent jamais dans les cases qui sont prévues pour un mode de fonctionnement précis et immuable. Aussi bien dans le privé que dans les administrations, les employés détestent tout ce qui ne rentre pas dans les cases : c’est la marque de la sortie de la routine, du travail non maîtrisé, de l’inconnu sur la carte…</text:p>
      <text:p text:style-name="P36"><text:soft-page-break/>À ce moment-là, l’employé dérangé dans son train-train peut dégainer plusieurs stratégies de défense :</text:p>
      <text:list text:style-name="L9">
        <text:list-item>
          <text:p text:style-name="P241"><text:span text:style-name="T142">N</text:span><text:span text:style-name="T139">e pas comprendre la demande </text:span>: <text:span text:style-name="T228">en fait, ce n’est pas forcément de la défense, mais il est toujours difficile de savoir si quelqu’un ne comprend pas ou s’il ne cherche pas à comprendre…</text:span></text:p>
        </text:list-item>
        <text:list-item>
          <text:p text:style-name="P241"><text:span text:style-name="T142">D</text:span><text:span text:style-name="T139">éprioriser et gérer la pile </text:span>: <text:span text:style-name="T228">faire une tâche qui ne rentre pas dans les cases, ça demande toujours de mobiliser du temps, sans jamais savoir à l’avance en quelle quantité. Un opérationnel consciencieux va d’abord traiter les sujets qu’il comprend et qu’il maîtrise, parce qu’il faut bien que le service assure ses missions. Les sujets qui « sortent du chapeau » seront traités ensuite, si le planning le permet. Mais comme en général ces équipes sont surchargées et ont déjà le plus grand mal à gérer l’urgence du quotidien, ça rentre très vite dans le domaine du vœu pieu…</text:span></text:p>
        </text:list-item>
        <text:list-item>
          <text:p text:style-name="P241"><text:span text:style-name="T142">O</text:span><text:span text:style-name="T139">ublier </text:span>: <text:span text:style-name="T228">il ne s’agit pas non plus obligatoirement d’un oubli volontaire, mais quand la hiérarchie répète en permanence que tout est prioritaire, on se concentre rapidement sur le prioritaire qu’on sait faire et on oublie simplement les autres. Un clou chasse l’autre…</text:span></text:p>
        </text:list-item>
        <text:list-item>
          <text:p text:style-name="P241"><text:span text:style-name="T142">S</text:span><text:span text:style-name="T139">e mettre en quatre </text:span><text:span text:style-name="T142">pour répondre aux demandes </text:span><text:span text:style-name="T228">: </text:span><text:span text:style-name="T229">on rencontre toujours, au gré des pérégrinations, un service qui arrive à tout traiter, le récurrent comme l’exceptionnel. C’est toujours une rareté, une exception qui confirme la règle. En général, c’est lié à une ou </text:span><text:soft-page-break/><text:span text:style-name="T229">deux personnes dans le service passionnées par ce qu’elles font. C’est aussi rare que fragile et éphémère : il suffit que les personnes en question changent ou deviennent indisponibles pour qu’on retrouve le comportement normal des autres services.</text:span></text:p>
        </text:list-item>
      </text:list>
      <text:p text:style-name="P96">Donc, en général, ce n’est pas avec un enthousiasme délirant <text:span text:style-name="T230">ni avec</text:span> une volonté sans faille de faire table rase du passé que les <text:span text:style-name="T230">différents services d’une entreprise vont </text:span><text:span text:style-name="T231">sauter à pieds joints dans les embrouilles que je décris depuis le début de cet ouvrage. Il faut que s’exprime le Fait du Prince</text:span><text:span text:style-name="T231"><text:note text:id="ftn41" text:note-class="footnote"><text:note-citation>41</text:note-citation><text:note-body><text:p text:style-name="P206">Le fait du prince est un concept qui désigne un acte <text:a xlink:type="simple" xlink:href="https://fr.wikipedia.org/wiki/Arbitraire" text:style-name="Internet_20_link" text:visited-style-name="Visited_20_Internet_20_Link"><text:span text:style-name="T232">arbitraire</text:span></text:a> d’un gouvernement ou chef d’État. Le terme est utilisé en <text:a xlink:type="simple" xlink:href="https://fr.wikipedia.org/wiki/Droit_administratif_français" text:style-name="Internet_20_link" text:visited-style-name="Visited_20_Internet_20_Link"><text:span text:style-name="T232">droit administratif français</text:span></text:a> pour désigner une mesure prise par l’administration qui a un impact sur un contrat auquel elle est partie.</text:p></text:note-body></text:note></text:span><text:span text:style-name="T231">.</text:span></text:p>
      <text:h text:style-name="Heading_20_3" text:outline-level="3"><text:bookmark-start text:name="__RefHeading___Toc8669_3199894321"/>Démolir <text:span text:style-name="T233">ses propres</text:span> murs<text:bookmark-end text:name="__RefHeading___Toc8669_3199894321"/></text:h>
      <text:p text:style-name="P97">Il faut bien comprendre que, dans tout<text:span text:style-name="T243">e</text:span> entreprise ou administration, la plupart des barrières au changement sont internes. Malgré tout ce que les dirigeants d’entreprise peuvent clamer sur « l’intolérable pression réglementaire » (sic) ou « les contraintes incompatibles avec les demandes du marché », ce ne sont en général que des excuses un peu bateau pour s’éviter d’avoir à reformer une nouvelle fois leur entreprise en se confrontant aux résistances et aux blocages internes.</text:p>
      <text:p text:style-name="P97">Il n’y a pas de pire ennemi que soi-même<text:note text:id="ftn42" text:note-class="footnote"><text:note-citation>42</text:note-citation><text:note-body><text:p text:style-name="Footnote"><text:span text:style-name="T233">Charles de Leusse : l</text:span>e pire ennemi, c’est soi-même. Mais je ne le tue pas, car je l’aime.</text:p></text:note-body></text:note>. C’est un lieu commun, <text:span text:style-name="T234">mais c’est terriblement vrai dans les entreprises. Et c’est d’autant plus vrai que </text:span><text:soft-page-break/><text:span text:style-name="T234">l’entreprise est importante. C’est une malédiction dans les Grands Groupes qui emploient des dizaines de milliers de personnes. Et c’est un terrible calvaire pour les entreprises très hiérarchisées et pyramidales…</text:span></text:p>
      <text:p text:style-name="P98">C’est le combat éternel du glaive et du bouclier, mais au niveau d’une guerre civile : comment tout casser pour que les nouvelles façons de faire s’imposent, mais sans détruire l’entreprise qui doit continuer à assurer ses missions ? On a déjà vu plus haut que c’était du domaine des injonctions contradictoires, mais c’est pourtant la condition <text:span text:style-name="T139">sine qua non</text:span> pour réussir la Transformation. Comment faire quand on se rend compte qu’on est son meilleur ennemi ?</text:p>
      <text:p text:style-name="P98">C’est là que le Chef doit émerger et s’imposer : toute Transformation, même minime, doit être incarnée. Elle doit avoir son Champion, sa Jeanne D’Arc. À défaut de bouter les anglois hors de France, ce héros (héraut ?) doit <text:span text:style-name="T235">personnifier</text:span> <text:span text:style-name="T235">l’alpha et l’oméga</text:span> des nouvelles <text:span text:style-name="T235">exigences</text:span> et des évolutions et doit permettre de justifier <text:span text:style-name="T235">l’urgence de toute demande, en tant que demande expresse du représentant unique de Dieu sur Terre.</text:span></text:p>
      <text:p text:style-name="P99">C’est un rôle autant messianique que politique : <text:span text:style-name="T236">il faut porter une vision et avoir le courage de l’assumer, tout en étant capable de caresser dans le sens du poil tous les opposants mineurs et de détruire sans état d’âme les bastions de résistance néfastes. Autant dire que c’est un rôle très difficile à assumer dans une entreprise. On se fait bien plus d’ennemis que d’amis en l’endossant. Et, dans le milieu sans pitié des Comités Exécutifs, nombreux sont ceux qui misent sur l’échec de ce genre </text:span><text:soft-page-break/><text:span text:style-name="T236">d’initiative pour booster leur propre carrière, quitte à savonner copieusement la planche de l’adversaire…</text:span></text:p>
      <text:p text:style-name="P100">Il faut s’avouer que ce genre de courage est très très rare dans les cercles dirigeants des entreprises financières : c’est un monde ouaté où les coups de vaches se font plutôt en traître et où il est insolite de voir un vrai leader charismatique et fédérateur mettre ses <text:span text:style-name="T139">cojones</text:span> sur la table quand il engage la viabilité de son entreprise dans l’aventure. On est clairement loin des patrons visionnaires de la Tech <text:span text:style-name="T243">actuelle </text:span>ou de l’industrie du siècle passé… Mais c’est pourtant de personnes de cette trempe dont il faudrait disposer pour effectuer ces <text:span text:style-name="T238">T</text:span>ransformations. Sauf que ce genre de personnes ne fait généralement pas carrière dans la Finance, justement par manque d’intérêt <text:span text:style-name="T238">à ce</text:span> fonctionnement en mode « panier de crabes ». Et quand ces profils rares sont <text:span text:style-name="T237">finalement</text:span> recrutés, après des expériences réussies ailleurs, pour amener leur savoir-faire dans ce prestigieux domaine de la Finance, <text:span text:style-name="T237">ils sont généralement attendus au tournant, mais pas forcément aidés. La plupart du temps, ça se traduit par un échec, pas lié aux compétences de la personne recrutée, mais la conséquence directe des travaux de sape et de sabotage des autres politiciens d’entreprise qui préfèrent jouer leur carte personnelle, plutôt que la carte du bien commun.</text:span></text:p>
      <text:p text:style-name="P101"><text:span text:style-name="T238">F</text:span>aute de grives, on mange des merles. Ça veut juste dire que les patrons de la Transformation qui sont nommés sont généralement issus du sérail, que ce sont des politiciens d’entreprise comme les autres et qu’ils ont le même courage que leurs pairs. Par contre, une fois nommés, ils deviennent de fait l’incarnation du changement et de la Transformation <text:soft-page-break/>et ils sont mandatés pour prendre toutes les décisions permettant de faire avancer la sacro-sainte Transformation !</text:p>
      <text:p text:style-name="P102">Enfin, ça marche quand ils ont le bon niveau de responsabilité. Parce qu’une des différences essentielles entre une société financière et une entreprise de la Tech, c’est son organisation hiérarchique : <text:span text:style-name="T238">quand une entreprise de la Tech a une structure hiérarchique en général très « plate », avec peu de niveaux et de strates entre le Grand Patron et les employés de base, une entreprise financière est au contraire organisée de façon très pyramidale, avec des chefs, des chefs de chefs, des chefs de chefs de chefs… jusqu’au Grand Patron himself. Ce qui, au demeurant, n’améliore pas le syndrome du plancher de verre dont on a déjà parlé. Et chaque « Chef de » est particulièrement fier de son statut et jaloux de ses prérogatives. Donc, peu enclin à accepter des ordres de quiconque.</text:span></text:p>
      <text:p text:style-name="P105">Pour faire une analogie militaire, ça veut donc dire que la personne qui sera légitime pour donner ces ordres doit disposer, sur ses épaulettes, du nombre de barrettes suffisant pour être écouté et suivi. En pratique, ça veut dire un membre du COMEX ou un Directeur Général ou Directeur Général Adjoint. Si le responsable de la Transformation reporte à un niveau inférieur, il sera au mieux poliment écouté, mais rien de ce qu’il dira ne sera considéré comme un ordre exécutif.</text:p>
      <text:p text:style-name="P103">Et c’est là qu’on se trouve confronté au vrai problème de ces Transformations : comment fait-on <text:span text:style-name="T241">si</text:span> le Chef n’a pas le bon niveau de responsabilité ou n’a pas la personnalité adéquate pour assumer son rôle ?</text:p>
      <text:h text:style-name="Heading_20_3" text:outline-level="3"><text:bookmark-start text:name="__RefHeading___Toc8671_3199894321"/><text:soft-page-break/>Sans sponsor, ça donne quoi ?<text:bookmark-end text:name="__RefHeading___Toc8671_3199894321"/></text:h>
      <text:p text:style-name="P106">En jargon d’entreprise politiquement correct, on appelle le Grand Chef à plumes (et à barrettes) un « sponsor ». Toute Transformation, et en particulier toute Transformation Data, réalisée sans sponsor (ou sans personne qui incarne ce rôle) est vouée à s’embourber et à la stagnation : à la différence du médecin qui peut considérer qu’un état stationnaire de son malade est plutôt encourageant, <text:span text:style-name="T239">parce qu’il ne se dégrade pas, le sponsor d’une Transformation dans une grande entreprise financière doit transpirer à grosses gouttes quand il constate que sa Transformation fait du surplace. Normalement, c’est sa tête qui est sur le billot et un échec de la Transformation signifie un départ anticipé avec un chèque plus ou moins important, suivant l’importance affichée de l’échec.</text:span></text:p>
      <text:p text:style-name="P107">Enfin, dans un monde idéal, c’est comme ça que ça devrait se passer. Mais on ne vit toujours pas en Théorie. En pratique, il est assez rare qu’un sponsor paie ses échecs, d’autant plus si c’est quelqu’un du sérail. Seules les pièces rapportées de l’extérieur peuvent se faire lyncher ; les sponsors désignés par défaut <text:span text:style-name="T240">le sont parce qu’il faut bien nommer quelqu’un et négocient en général une certaine immunité en échange de la prise de poste !</text:span></text:p>
      <text:p text:style-name="P108">Par contre, ça veut aussi dire que dans la grande majorité des cas, la personne nommée n’a absolument pas les compétences pour assurer sa mission. Pire, il arrive souvent que ce genre de nomination « politique » aboutisse à la nomination d’une personne qui ne comprenne absolument rien au sujet traité ! J’ai déjà expliqué les difficultés rencontrées autour des sujets techniques, mais ça <text:soft-page-break/>devient encore plus criant sur les Transformations Data : quand on sait que les sujets Data sont déjà difficiles à appréhender pour les équipes techniques, je ne vais même pas chercher à décrire ce que ça peut être pour quelqu’un qui n’a aucun bagage ni aucune appétence pour le sujet…</text:p>
      <text:p text:style-name="P108">Pourtant, ce n’est pas parce que le sponsor est incompétent que la Transformation s’arrête. Elle doit continuer et avancer. Sauf qu’elle n’y arrive pas. Et qu’elle n’y arrivera jamais, à cause des blocages, des murs et des contraintes existantes dont j’ai déjà parlé. Et le pire de tout ça, c’est que la personne qu’on va nommer, c’est souvent quelqu’un qui connaît très bien le fonctionnement de l’entreprise, qui est là depuis longtemps et qui en connaît tous les rouages. Une personne comme un directeur de l’IT (CIO) ou comme un directeur des opérations (COO). Sauf que ces personnes sont souvent celles qui ont justement mis en place les processus et les méthodes qui entraînent ces fameux blocages…</text:p>
      <text:p text:style-name="P108">Et il faudrait demander à la même personne qui a monté des murs de les démolir ? Plutôt compliqué, non ? Et de grands moments de solitude à prévoir pour tenter de faire comprendre la nécessité absolue de tout casser à quelqu’un qui peut justifier de façon tout à fait rationnelle et raisonnable la raison d’être de tous les blocages actuels… Comme exemple, et pour comprendre le type de dialogue <text:span text:style-name="T241">que ça peut générer</text:span>, je vous conseille l’écoute de la chanson « C’est normal<text:note text:id="ftn43" text:note-class="footnote"><text:note-citation>43</text:note-citation><text:note-body><text:p text:style-name="P213"><text:a xlink:type="simple" xlink:href="https://www.youtube.com/watch?v=r-YWuJ05Qew" text:style-name="Internet_20_link" text:visited-style-name="Visited_20_Internet_20_Link">C’est normal </text:a>: Brigitte Fontaine et Areski Belkacem, 1973</text:p></text:note-body></text:note> ».</text:p>
      <text:p text:style-name="P108">Donc, c’est une impasse, un échec annoncé et inévitable. Et cet échec ne peut pas être imputé au sponsor, vu que c’est lui qui a mis en place les <text:soft-page-break/>merveilleux mécanismes qui fonctionnent si bien actuellement ! La faute incombe forcément aux acteurs de la Transformation qui n’ont pas su faire, alors qu’on leur a donné tous les moyens pour faire, y compris le responsable qui comprenait le mieux le domaine !</text:p>
      <text:p text:style-name="P108">Sauf que, comme en philosophie non aristotélicienne la carte n’est pas le territoire, en Transformation le domaine n’est pas le sujet : le sujet, c’est la Transformation et le domaine, c’est le contexte. Si le responsable ne comprend ni le sujet, ni la Data, comment s’étonner qu’il ne prenne pas les bonnes décisions ? Mais comme on l’a vu déjà, à partir d’un certain niveau hiérarchique, on n’avoue pas ses lacunes et on fait comme si on savait. Tout serait plus simple si un peu d’humilité autorisait les gens à désapprendre avant de réapprendre… Mais je radote, je crois.</text:p>
      <text:h text:style-name="P210" text:outline-level="3"><text:bookmark-start text:name="__RefHeading___Toc7088_1610056299"/><text:span text:style-name="T227">Et</text:span> si on arrêtait d’être sérieux ?<text:bookmark-end text:name="__RefHeading___Toc7088_1610056299"/></text:h>
      <text:p text:style-name="P211"><text:span text:style-name="T1">Pour revenir sur la mise en place de la démarche Agile que j’évoquais plus haut : c’est naturellement un autre enjeu important de toute Transformation d’amener ces nouvelles façons de travailler à la fois plus contr</text:span><text:span text:style-name="T102">ôlées, mais aussi plus proches des métiers. Toutefois l’agilisation d’une société est un projet qui peut prendre à lui seul plusieurs années et qui doit s’inscrire à la fois dans un besoin et dans une volonté : on ne fait pas boire un âne qui n’a pas soif et on ne peut apporter l’agilité qu’aux directions, services et personnes qui veulent en profiter.</text:span></text:p>
      <text:p text:style-name="P120"><text:soft-page-break/>Certains n’en veulent pas : ça les bouscule dans leurs zones de confort, ça perturbe le fonctionnement dans leur service, ça stresse les collaborateurs. Et, au final, la résistance au changement peut très souvent s’expliquer par des critères complètement objectifs et raisonnables, par des personnes qui n’ont qu’une ambition dans la vie : faire bien et consciencieusement leur job.</text:p>
      <text:p text:style-name="P120"><text:span text:style-name="T164">Comment essaient-ils de</text:span> s’opposer à ces Transformations ?</text:p>
      <text:p text:style-name="P240"/>
      <text:p text:style-name="P40"><draw:custom-shape text:anchor-type="as-char" draw:z-index="0" draw:name="Forme9" draw:style-name="gr1" draw:text-style-name="P267" svg:width="1.19cm" svg:height="1.147cm"><text:p text:style-name="P212"><text:span text:style-name="T113">9</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131774407"/><text:bookmark-start text:name="__RefHeading___Toc1606_1115178054"/>Pourquoi vouloir résister au changement ?<text:bookmark-end text:name="_Toc131774407"/><text:bookmark-end text:name="__RefHeading___Toc1606_1115178054"/></text:h>
      <text:h text:style-name="P14" text:outline-level="3"><text:bookmark-start text:name="_Toc131774408"/><text:bookmark-start text:name="__RefHeading___Toc1608_1115178054"/>Est-ce une volonté ou un besoin <text:bookmark-end text:name="_Toc131774408"/>?<text:bookmark-end text:name="__RefHeading___Toc1608_1115178054"/></text:h>
      <text:p text:style-name="P7">On jette facilement l’opprobre sur les services qui refusent de s’inscrire dans les grandes Transformations du moment. On les dénigre, on les raille et on les met sur la touche. On essaie de les embarquer dans le train du changement. On les accompagne, on essaie de les convaincre. On déploie vraiment beaucoup d’efforts pour les faire changer d’avis.</text:p>
      <text:p text:style-name="P6">Par contre, on leur demande rarement pourquoi ils ne veulent pas se transformer et quelles sont les raisons qui les poussent à cette volonté de ne pas changer.</text:p>
      <text:h text:style-name="P14" text:outline-level="3"><text:bookmark-start text:name="_Toc131774409"/><text:bookmark-start text:name="__RefHeading___Toc1610_1115178054"/>Un peu d’histoire<text:bookmark-end text:name="_Toc131774409"/><text:bookmark-end text:name="__RefHeading___Toc1610_1115178054"/></text:h>
      <text:p text:style-name="P127"><text:span text:style-name="T1">Je vais surtout me concentrer sur les Grands Groupes de la Finance, car ce sont ceux que je connais le mieux, et sur les grands mouvements qui impliquent l’IT. Mais je pense que l’état des lieux est à peu près le même dans tous les Grands Groupes, </text:span><text:soft-page-break/><text:span text:style-name="T1">car la plupart ont été dirigés surtout par des financiers ces dernières décennies.</text:span></text:p>
      <text:h text:style-name="P21" text:outline-level="3"><text:bookmark-start text:name="__RefHeading___Toc1604_1115178054"/><text:span text:style-name="T163">À </text:span><text:bookmark-start text:name="_Toc131774406"/>quoi sert toute cette préparation ?<text:bookmark-end text:name="__RefHeading___Toc1604_1115178054"/><text:bookmark-end text:name="_Toc131774406"/></text:h>
      <text:p text:style-name="P22">Dans tous les manuels de préparation à la fonction de manager, dans tous les séminaires et tous les symposiums, il est répété à cor et à cri que la principale qualité du manager, c’est la préparation.</text:p>
      <text:p text:style-name="P178"><text:span text:style-name="T1">Sauf qu’en général, personne ne précise à quoi se préparer, vu que personne ne sait de quoi l’avenir sera fait, n’en déplaise à tous les experts des plateaux de télé avec leurs opinions tranchées. J’en profite pour citer l’étude d’un chercheur américain, Philip Tetlock, qui a démontré que les experts se trompent plus que les généralistes, et plus encore que… des chimpanzés lançant des fléchettes au hasard !</text:span><text:span text:style-name="T1"><text:note text:id="ftn44" text:note-class="footnote"><text:note-citation>44</text:note-citation><text:note-body><text:p text:style-name="P10">P.E. Tetlock, Expert political judgment : How good is it ? How can we know?, Princeton University Press, 20 août 2006</text:p></text:note-body></text:note></text:span></text:p>
      <text:p text:style-name="P23">Donc, comme il est impossible de se préparer au changement, il est plus logique de mettre en place tout le nécessaire pour ne pas changer, justement : toutes les astuces d’organisation présentées ci-dessus ne constituent que le terreau favorable pour que le manager puisse délibérément mettre en œuvre toutes les stratégies de résistance nécessaires pour s’opposer, ralentir ou atténuer le changement dans son propre service, à son bénéfice propre et, autant que possible, à celui de ses collaborateurs.</text:p>
      <text:h text:style-name="Heading_20_3" text:outline-level="3"><text:bookmark-start text:name="__RefHeading___Toc7090_1610056299"/><text:soft-page-break/>C’était mieux avant !<text:bookmark-end text:name="__RefHeading___Toc7090_1610056299"/></text:h>
      <text:p text:style-name="P6">C’est une phrase que tout le monde entend un peu partout et tout le temps, mais dans certains cas, c’est vrai !</text:p>
      <text:p text:style-name="P6">Et effectivement, pour la plupart des services des Grands Groupes, les conditions de travail étaient beaucoup plus confortables avant : la pression réglementaire, le stress apporté par les grandes crises, les volontés d’économies structurelles du top management ont fortement précarisé ces services (par rapport à ce qu’ils connaissaient avant) et le stress quotidien atteint des niveaux inconnus jusqu’alors.</text:p>
      <text:p text:style-name="P6">La pression du chiffre, du délai et du résultat a augmenté de façon astronomique. En même temps, on ne peut pas dire que les moyens se sont améliorés. Face à des problématiques de gestion d’énormes quantités de données avec une précision de plus en plus importante, la réponse apportée a souvent été de renforcer les équipes, plutôt que d’outiller et d’automatiser.</text:p>
      <text:p text:style-name="P126"><text:span text:style-name="T1">Et, en conséquence, c’est un nouveau stress qui s’est développé : celui de l’erreur opérationnelle. Avec la majorité des résultats stratégiques qui sont produits dans des feuilles Excel</text:span><text:span text:style-name="T1"><text:note text:id="ftn45" text:note-class="footnote"><text:note-citation>45</text:note-citation><text:note-body><text:p text:style-name="P10">« 100 % des décisions stratégiques des 300 plus grandes multinationales sont prises à partir de feuilles Excel » 2010 Wall Street Journal</text:p></text:note-body></text:note></text:span><text:span text:style-name="T1">, la peur de l’erreur est devenue un élément du quotidien pour les opérationnels. Et des erreurs, il y en a, </text:span><text:span text:style-name="T16">comme je l’ai déjà évoqué plus haut.</text:span></text:p>
      <text:h text:style-name="Heading_20_3" text:outline-level="3"><text:bookmark-start text:name="__RefHeading___Toc7092_1610056299"/><text:soft-page-break/>Pourquoi je galère autant maintenant ?<text:bookmark-end text:name="__RefHeading___Toc7092_1610056299"/></text:h>
      <text:p text:style-name="P6">C’est la question légitime suivante : est-ce que les personnes qui produisent actuellement des tableaux de chiffres en continu, sur des outillages bureautiques à l’agonie, ont réellement été formées à accomplir ces tâches et pourquoi sont-elles obligées de faire ce genre de travaux actuellement ?</text:p>
      <text:p text:style-name="P6">Comme tout est toujours historique et l’héritage des décisions du passé, revenons aux causes racines : les crises financières, ou plus précisément les mesures réglementaires qui ont été mises en place pour les réguler a posteriori.</text:p>
      <text:p text:style-name="P6">Le régulateur est en général aussi créatif à créer des parades que les financiers le sont à créer les conditions de nouvelles crises. Et toute nouvelle régulation se traduit par de nouvelles mesures : ces derniers temps, Bruxelles et les différentes instances nationales ont basé leur politique sur l’augmentation des contrôles et sur la volonté de ne pas faire confiance.</text:p>
      <text:p text:style-name="P126"><text:span text:style-name="T1">La déclaration de bonne intention ne suffit plus : il faut maintenant « ouvrir le capot » et produire des résultats standardisés, certifiés et comparables entre toutes les sociétés financières. La liste des réglementations est vaste</text:span><text:span text:style-name="T1"><text:note text:id="ftn46" text:note-class="footnote"><text:note-citation>46</text:note-citation><text:note-body><text:p text:style-name="P10">Bâle II &amp; III, Solvency II, BCBS239, IFRS9 &amp; 17, entre autres…</text:p></text:note-body></text:note></text:span><text:span text:style-name="T1">, mais les principes sont toujours les mêmes : partir des vraies données de gestion de la société et appliquer une recette de cuisine complexe qui se traduit par énormément de calculs et de vérifications à mettre en œuvre.</text:span></text:p>
      <text:h text:style-name="Heading_20_3" text:outline-level="3"><text:bookmark-start text:name="__RefHeading___Toc7094_1610056299"/><text:soft-page-break/>Quel est mon cœur de métier ?<text:bookmark-end text:name="__RefHeading___Toc7094_1610056299"/></text:h>
      <text:p text:style-name="P6">C’est là que le bât blesse : par exemple, depuis environ 2015, en recrutant des armées d’actuaires pour répondre aux exigences de Solvency II, les compagnies d’assurance n’ont pas envisagé les conséquences néfastes que cela allait induire à long terme :</text:p>
      <text:list text:style-name="WWNum3">
        <text:list-item>
          <text:p text:style-name="P226">Difficultés de recrutement des actuaires avec création d’une véritable pénurie sur ce genre de profil et envol des salaires,</text:p>
        </text:list-item>
        <text:list-item>
          <text:p text:style-name="P226">Problèmes opérationnels récurrents lors de la production des résultats et nécessité de renforcer encore les équipes pour corriger les problèmes engendrés : obligation de contrôler les contrôleurs,</text:p>
        </text:list-item>
        <text:list-item>
          <text:p text:style-name="P228"><text:span text:style-name="T1">Multiplication de tentatives pour automatiser au maximum les tâches à réaliser, par le biais de production de code dans les outillages disponibles, à savoir essentiellement SAS et Excel : c’est la genèse de nombreux pôles de Shadow IT qui se sont développés de façon incontrôlée et qui sont devenus ingérables par les équipes qui en sont à l’origine. La dérive fréquente en « code spaghetti </text:span><text:span text:style-name="T1"><text:note text:id="ftn47" text:note-class="footnote"><text:note-citation>47</text:note-citation><text:note-body><text:p text:style-name="P10">Le terme « code spaghetti » fait référence à un code informatique mal structuré et difficile à comprendre en raison de sa complexité et de sa confusion. Le code spaghetti peut contenir des boucles imbriquées, des fonctions redondantes, des noms de variables ambigus et d’autres problèmes similaires qui le rendent difficile à lire et à maintenir. Le terme “spaghetti” fait référence à la façon dont les lignes de code entrelacées ressemblent à des spaghettis qui se croisent et s’emmêlent. En résumé, le code spaghetti est un code désorganisé et chaotique qui rend difficile sa compréhension, sa modification et sa maintenance.</text:p></text:note-body></text:note></text:span><text:span text:style-name="T1">» fait souvent que les </text:span><text:soft-page-break/><text:span text:style-name="T1">équipes IT sont incapables de les reprendre, du fait de la charge de travail colossale que représenterait leur mise en conformité avec les normes de travail de l’IT,</text:span></text:p>
        </text:list-item>
        <text:list-item>
          <text:p text:style-name="P226">Charge et stress ont les conséquences habituelles : multiplication des burn-out et augmentation du turn-over.</text:p>
        </text:list-item>
      </text:list>
      <text:p text:style-name="P6">Or, si le travail des actuaires a toujours été l’analyse du risque, il n’est pas de produire des tableaux de chiffres du matin au soir ou de maintenir du code destiné à des productions industrielles.</text:p>
      <text:p text:style-name="P6">Et, ne pas oublier que si un actuaire (en particulier un junior) est cantonné à ces tâches à faible valeur ajoutée pendant quelques années, on ne peut plus considérer que c’est encore un actuaire : il aura oublié son cœur de métier !</text:p>
      <text:h text:style-name="Heading_20_3" text:outline-level="3"><text:bookmark-start text:name="__RefHeading___Toc7096_1610056299"/>Pourquoi je devrais faire confiance à l’IT maintenant<text:span text:style-name="T120"> </text:span>?<text:bookmark-end text:name="__RefHeading___Toc7096_1610056299"/></text:h>
      <text:p text:style-name="P126"><text:span text:style-name="T1">Quand l’IT n’a pas été à la hauteur des attentes et des besoins des métiers pendant des années, pourquoi accorder une confiance aveugle à des déclarations d’intention ? Toutes les nouvelles méthodologies, toutes les nouvelles approches révolutionnaires, toutes les Transformations, quelle que soit la manière dont elles sont mises en œuvre, présentent au final le m</text:span><text:span text:style-name="T102">ême défaut fondamental : les </text:span><text:soft-page-break/><text:span text:style-name="T102">gens qui vont en assurer le fonctionnement sont eux qui sont déjà en place.</text:span></text:p>
      <text:p text:style-name="P126"><text:span text:style-name="T102">Et une des définitions de la folie, c’est de faire toujours la même chose et de s’attendre à un résultat différent</text:span><text:span text:style-name="T102"><text:note text:id="ftn48" text:note-class="footnote"><text:note-citation>48</text:note-citation><text:note-body><text:p text:style-name="Footnote">« La folie, c’est de faire toujours la même chose et de s’attendre à un résultat différent ! » Albert Einstein</text:p></text:note-body></text:note></text:span><text:span text:style-name="T102">. Et on aura beau accompagner au mieux les personnels en place pour qu’ils adoptent les nouveaux principes, l’humain reste l’humain : en période de stress – ce qui ne manque pas dans une Transformation – ces collaborateurs de l’IT vont revenir dans leur zone de confort, autour de concepts et de façon de travailler qu’ils comprennent et maîtrisent, loin de l’inconnu et de l’incertain. Autrement dit, ils vont refaire ce qu’ils faisaient avant, en jetant aux orties tous les beaux principes et les méthodes miracles : dans la tempête, on a tous tendance à reproduire ce qui a permis de survivre à la tempête précédente, plutôt que de tenter un truc qui est écrit dans les bouquins, mais qu’aucune des personnes présentes n’a tenté en vrai !</text:span></text:p>
      <text:p text:style-name="P114">Et pourquoi laisser le bénéfice du doute ? En général, les métiers ont déjà un lourd passif relationnel avec justement les mêmes personnes qui sont censés créer la route de briques jaunes. Objectivement, il est plus prudent de s’accrocher à du connu et du concret…</text:p>
      <text:h text:style-name="Heading_20_3" text:outline-level="3"><text:bookmark-start text:name="__RefHeading___Toc7098_1610056299"/>Et mes collaborateurs, j’en fais quoi ?<text:bookmark-end text:name="__RefHeading___Toc7098_1610056299"/></text:h>
      <text:p text:style-name="P114">Encore une question qui fâche et qui préoccupe tout manager : dans le grand train de la Transformation, qui vais-je laisser sur le quai ? Parce que la Transformation est toujours accompagnée <text:soft-page-break/>d’une réorganisation qui va définir les nouveaux métiers, les nouveaux rôles et les nouvelles responsabilités. Avec comme objectif de répondre aux fameux grands enjeux de demain, comme les ont présentés les grands Nostradamus des cabinets de conseil stratégique.</text:p>
      <text:p text:style-name="P114">Dans une équipe qui fonctionne, chacun connaît les atouts et les faiblesses de chacun et, bon gré mal gré, a su s’adapter pour en créer un tout fonctionnel qui répond aux besoins du quotidien. Avec la Transformation, et les changements qu’elle apporte, on part sur un autre terrain inconnu : est-ce que les collaborateurs vont pouvoir s’adapter aux nouvelles méthodes, aux nouveaux process et aux nouveaux outils et est-ce que l’équipe sera aussi efficace au final ? Quels sont les collaborateurs qui n’y arriveront pas et comment faire sans eux ? Et même, comment faire avec eux, s’ils ne sont pas aptes à s’insérer dans le nouveau mode de fonctionnement ? Dois-je les garder dans l’équipe, alors qu’ils ne produiront plus ?</text:p>
      <text:p text:style-name="P114">En plus, l’accélération technologique et l’accroissement du niveau d’exigence font que de nombreux collaborateurs, même accompagnés dans les meilleures conditions, ne pourront ou ne voudront simplement pas changer : qu’auront-ils à y gagner personnellement ?</text:p>
      <text:p text:style-name="P114">Quand s’ajoutent tous les dysfonctionnements et les incertitudes liées à la période de transition, la seule certitude qui s’affirme dans tout ça, c’est qu’il va être encore plus compliqué de faire fonctionner l’équipe et de faire le boulot demandé.</text:p>
      <text:h text:style-name="Heading_20_3" text:outline-level="3"><text:bookmark-start text:name="__RefHeading___Toc7100_1610056299"/><text:soft-page-break/>Et pourquoi c’est encore à moi de faire les efforts ?<text:bookmark-end text:name="__RefHeading___Toc7100_1610056299"/></text:h>
      <text:p text:style-name="P137">Comme on l’a vu, rien n’est simple dans une Transformation. <text:span text:style-name="T158">L</text:span>’effort pour effectuer cette Transformation est énorme. Et ça retombe toujours sur les mêmes.</text:p>
      <text:p text:style-name="P137">En fait, une Transformation, même si elle implique des milliers de personnes, ne sera réalisée véritablement que par les quelques dizaines qui sont sur le chemin critique et qui seront sollicitées sans discontinuer sur les projets les plus <text:span text:style-name="T158">importants</text:span>, alors que le reste de l’entreprise va rester dans sa routine tranquille <text:span text:style-name="T158">et pépère. P</text:span>ersonne <text:span text:style-name="T158">n’ira leur en</text:span> demander plus. À cause de cette volonté de s’adresser aux services les plus <text:span text:style-name="T158">sollicités</text:span> et les plus en tension, on obtient facilement un paradoxe insoluble : c’est <text:span text:style-name="T158">dans les services</text:span> où le stress est déjà maximal qu’il est demandé de <text:span text:style-name="T158">fournir</text:span> des acteurs majeurs de la Transformation, en rajoutant du stress au stress.</text:p>
      <text:p text:style-name="P137">Pendant ce temps-là, des milliers de salariés ne seront ni inquiétés ni perturbés et aucun effort ne leur sera demandé. Pour les équipes sollicitées, c’est profondément injuste et injustifié. Ce qui est présenté comme une grande évolution positive pour l’entreprise se traduit trop souvent comme une nouvelle façon de surcharger ces équipes déjà au bord de la rupture.</text:p>
      <text:p text:style-name="P137">Et pour quel bénéfice ? Il est très rare de recevoir des récompenses quand un projet réussit, mais très facile de se faire sanctionner en cas d’échec, même si ce n’est pas de la responsabilité de l’équipe : les dommages collatéraux sont fréquents. <text:soft-page-break/>Et l’effort demandé pour éviter l’échec est souvent trop lourd pour l’équipe et sa stabilité.</text:p>
      <text:p text:style-name="P137">Donc, ya basta ! Essayons plutôt de trouver une combine pour échapper à la corvée !</text:p>
      <text:h text:style-name="Heading_20_3" text:outline-level="3"><text:bookmark-start text:name="__RefHeading___Toc7102_1610056299"/>Et qu’est-ce qu’on risque à ne pas faire ?<text:bookmark-end text:name="__RefHeading___Toc7102_1610056299"/></text:h>
      <text:p text:style-name="P114">Revenons sur un constat simple : quand je travaille dans un service clé d’une entreprise riche (et qui devrait le rester au moins jusqu’à ma retraite), avec une équipe fiable constituée de collaborateurs avec lesquels j’ai trouvé un vrai confort de vie et de travail et que je dispose de tous les outils et compétences nécessaires pour effectuer mon travail, qu’ai-je à gagner à devenir un acteur de la Transformation ?</text:p>
      <text:p text:style-name="P114">Honnêtement, à part un lot d’emmerdes absolument impossible à quantifier, pas grand-chose ! Tant que le job est fait, et bien fait, et que personne ne peut le faire à la place de l’équipe en place, l’équipe et le manager sont indéboulonnables et inattaquables.</text:p>
      <text:p text:style-name="P114"><text:span text:style-name="T158">De</text:span> nombreux managers en sont parfaitement conscients et en jouent. Et la créativité qu’ils ne vont pas employer à conduire la Transformation, ils vont pouvoir l’exprimer à tout loisir dans les manœuvres qu’ils vont mettre en œuvre pour ne pas faire et ne pas se faire prendre à ne pas faire !</text:p>
      <text:p text:style-name="P114">Malgré deux décennies à travailler sur ces grands sujets, je reste toujours surpris par la capacité d’invention et d’innovation des managers de ces équipes et j’ai recueilli précieusement au cours des <text:soft-page-break/>années les fruits de leurs efforts que je vais vous présenter maintenant.</text:p>
      <text:p text:style-name="P242"/>
      <text:p text:style-name="P40"><draw:custom-shape text:anchor-type="as-char" draw:z-index="8" draw:name="Forme10" draw:style-name="gr1" draw:text-style-name="P267" svg:width="1.19cm" svg:height="1.147cm"><text:p text:style-name="P212"><text:span text:style-name="T113">1</text:span><text:span text:style-name="T117">0</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3" text:outline-level="2"><text:bookmark-start text:name="_Toc131774410"/><text:bookmark-start text:name="__RefHeading___Toc1612_1115178054"/>Quelles sont les stratégies disponibles ?<text:bookmark-end text:name="_Toc131774410"/><text:bookmark-end text:name="__RefHeading___Toc1612_1115178054"/></text:h>
      <text:h text:style-name="P14" text:outline-level="3"><text:bookmark-start text:name="_Toc131774411"/><text:bookmark-start text:name="__RefHeading___Toc1614_1115178054"/>Et d’abord pourquoi une approche stratégique ?<text:bookmark-end text:name="_Toc131774411"/><text:bookmark-end text:name="__RefHeading___Toc1614_1115178054"/></text:h>
      <text:p text:style-name="P6">Revenons à nos grands auteurs, souvent cités dans le cadre de l’entreprise, pour nous faire croire que nous vivons dans un contexte de guerre permanente et que nous sommes tous de bons soldats n’ayant d’autre choix que de tuer ou d’être tués, pour la gloire et l’honneur de nos chers employeurs !</text:p>
      <text:p text:style-name="P126"><text:span text:style-name="T1">Et, pour asseoir cette rhétorique martiale, on cite souvent Clausewitz (</text:span><text:span text:style-name="T4">De la guerre</text:span><text:span text:style-name="T1">) ou Sun Tzu (</text:span><text:span text:style-name="T4">L’Art de la guerre</text:span><text:span text:style-name="T1">). Je vais faire pareil et je vais m’inspirer de Sun Tzu : « </text:span><text:span text:style-name="T4">Tout l’art de la guerre est basé sur la duperie.</text:span><text:span text:style-name="T1"> »</text:span></text:p>
      <text:p text:style-name="P6">Donc, nous allons étudier comment on peut duper. Et comment j’ai été dupé.</text:p>
      <text:h text:style-name="P176" text:outline-level="3"><text:soft-page-break/></text:h>
      <text:h text:style-name="P14" text:outline-level="3"><text:bookmark-start text:name="_Toc131774412"/><text:bookmark-start text:name="__RefHeading___Toc4614_2514178521"/>Panel représentatif des stratégies utilisables<text:bookmark-end text:name="_Toc131774412"/><text:bookmark-end text:name="__RefHeading___Toc4614_2514178521"/></text:h>
      <text:p text:style-name="P6">Tous les exemples présentés ici ont été mis en œuvre et m’ont été opposés avec succès dans le cadre des différentes missions que j’ai exécutées au cours de ma carrière.</text:p>
      <text:p text:style-name="P6">Pour faciliter la compréhension, j’ai décidé de vous les présenter en les regroupant par typologie d’inaction.</text:p>
      <text:h text:style-name="Heading_20_4" text:outline-level="4">Pour tous, tout le temps</text:h>
      <text:p text:style-name="P126">On va commencer par deux grands classiques, rencontrés partout et tout le temps, mais dont la mise en pratique ne demande pas le m<text:span text:style-name="T102">ême niveau de maîtrise : autant la première méthode est simple à appliquer et ne demande pas de compétence particulière, autant la deuxième est réservée à de rares virtuoses de l’escamotage et de la manipulation mentale…</text:span></text:p>
      <text:h text:style-name="P18" text:outline-level="5">La surdité sélective</text:h>
      <text:p text:style-name="P6">Il s’agit essentiellement de ne pas prendre en compte les remarques, critiques ou points d’attention oraux relatifs à un sujet précis, émis par les différents antagonistes ou personnes qui se considèrent comme « impliquées » dans le sujet.</text:p>
      <text:p text:style-name="P6">Au cas où l’interlocuteur se montrerait insistant, un borborygme d’acquiescement non engageant ou un hochement de tête discret peut permettre de calmer temporairement l’interlocuteur.</text:p>
      <text:p text:style-name="P6"><text:soft-page-break/>Aucun engagement verbal ne doit jamais être pris, en aucun cas, et quel que soit le sujet abordé.</text:p>
      <text:h text:style-name="Heading_20_5" text:outline-level="5">Le prestidigitateur</text:h>
      <text:p text:style-name="P6">Le prestidigitateur est un artiste de music-hall capable d’escamoter n’importe quel sujet ou n’importe quel problème, au vu et au su de tout le monde, sans que personne ne comprenne comment il a fait.</text:p>
      <text:p text:style-name="P6">Un bon prestidigitateur a la capacité, lors d’une réunion où on le confronte aux failles ou insuffisances de sa propre équipe, de gentiment accepter les critiques et les remarques, et de s’en sortir de façon à ce que ce soit une autre équipe et un autre manager qui récupère le travail à réaliser !</text:p>
      <text:p text:style-name="P126">Tout ça sans que personne ne comprenne vraiment comment il l’a fait ou comment le reproduire. Ce genre de manager, qui progresse en général très vite dans les hiérarchies des entreprises – vu qu’il ne tra<text:span text:style-name="T102">îne aucune casserole derrière lui, les ayant soigneusement abandonnées en cours de chemin – possède une résistance et une résilience aux crises quasiment magiques : comme certains insectes de très mauvaise réputation, on pense toujours qu’il sera le seul survivant après un holocauste nucléaire d’entreprise…</text:span></text:p>
      <text:h text:style-name="P17" text:outline-level="4">Pour les pros d’Outlook</text:h>
      <text:p text:style-name="P6">Les méthodes suivantes sont réservées aux virtuoses des agendas Outlook, capables de se faire inviter à <text:span text:style-name="T159">trois</text:span> ou <text:span text:style-name="T159">quatre</text:span> réunions en parallèle sur les créneaux de travail habituels.</text:p>
      <text:p text:style-name="P6"><text:soft-page-break/>Il n’est d’ailleurs pas interdit de créer en plus des réunions avec soi-même ou avec son équipe, afin de s’assurer d’un taux de remplissage suffisant de son agenda.</text:p>
      <text:h text:style-name="P18" text:outline-level="5"><text:bookmark-start text:name="_Toc72657898"/><text:bookmark-start text:name="_Ref72612275"/>L’ajournement dilatoire infini<text:bookmark-end text:name="_Toc72657898"/><text:bookmark-end text:name="_Ref72612275"/></text:h>
      <text:p text:style-name="P6">Bien entendu, toute demande de réunion sur le sujet abordé doit être acceptée sur le principe, mais sans donner de date et en insistant sur la difficulté de trouver un créneau, vu la charge de travail actuelle.</text:p>
      <text:p text:style-name="P6">Toute proposition de réunion doit être refusée, avec proposition d’un nouveau créneau dans un délai minimal de <text:span text:style-name="T159">deux</text:span> mois. Et il faut bien entendu refuser la réunion au maximum <text:span text:style-name="T159">deux</text:span> heures avant la réunion recalée, en insistant sur une « urgence de prod incontournable ».</text:p>
      <text:p text:style-name="P6">Il est évident que, vu l’encombrement de votre agenda, aucun nouveau créneau ne sera disponible avant <text:span text:style-name="T159">deux</text:span> mois. Et on n’est jamais à l’abri d’un nouvel incident de prod au dernier moment…</text:p>
      <text:p text:style-name="P6">A noter que cette approche permet de s’approcher au plus près de l’idéal physique du mouvement perpétuel.</text:p>
      <text:h text:style-name="P18" text:outline-level="5"><text:bookmark-start text:name="_Ref72612257"/><text:bookmark-start text:name="_Toc72657899"/>Le lapin furtif<text:bookmark-end text:name="_Ref72612257"/><text:bookmark-end text:name="_Toc72657899"/></text:h>
      <text:p text:style-name="P6">Cette méthode est une variante de la méthode précédente, dans le sens où elle demande une gestion particulièrement rigoureuse de son agenda.</text:p>
      <text:p text:style-name="P6">Dans ce cas, à la différence de la méthode précédente, aucune acceptation, même en mode provisoire, ne doit jamais être envoyée à l’organisateur de la réunion.</text:p>
      <text:p text:style-name="P6"><text:soft-page-break/>L’évènement déclencheur de cette méthode passe toujours par l’absence à la première réunion organisée, si possible lorsque de nombreux interlocuteurs annexes sont invités. Selon l’importance de la réunion, on peut envisager un coup de fil rapide, en mode « pas le temps », pour expliquer qu’un nouvel incident de prod critique est tombé et que ce n’est « vraiment pas le moment », sans forcément préciser de quel moment il s’agit.</text:p>
      <text:p text:style-name="P6">La suite de la méthode reprend les bases des deux méthodes, en permettant l’alternance de l’une à l’autre. Pour un bon acteur, elle peut être crédible si l’abondance de dysfonctionnement du service est déjà notoire.</text:p>
      <text:h text:style-name="P17" text:outline-level="4"><text:bookmark-start text:name="_Toc72657900"/>Dans les cas où vous avez un vrai pouvoir décisionnaire<text:bookmark-end text:name="_Toc72657900"/></text:h>
      <text:p text:style-name="P6">Ces méthodes ne sont valables que si les importuns vous sont rattachées hiérarchiquement ou, éventuellement, s’ils dépendent du même supérieur direct que vous (même râteau).</text:p>
      <text:p text:style-name="P6">Elles sont plus difficiles à mettre en œuvre, car elles demandent un échange direct avec les interlocuteurs et supposent d’écourter rapidement les échanges, afin d’éviter les contre-arguments pernicieux et chronophages.</text:p>
      <text:h text:style-name="P18" text:outline-level="5"><text:bookmark-start text:name="_Toc72657901"/>La justice aveugle<text:bookmark-end text:name="_Toc72657901"/></text:h>
      <text:p text:style-name="P6">C’est la méthode N°1 à favoriser, dans le cas où votre pouvoir hiérarchique est indiscutable sur les interlocuteurs qui viennent vous déranger.</text:p>
      <text:p text:style-name="P6"><text:soft-page-break/>Elle suppose à la fois une compréhension partielle des éléments proposés (ne pas hésiter à couper les interlocuteurs avant qu’ils aient fini de présenter tous leurs éléments) et une habitude déjà reconnue à l’ultimatum et à l’autoritarisme.</text:p>
      <text:p text:style-name="P6">Elle se traduit par une décision tranchée, partielle et partiale (si possible sur un sujet connexe au problème principal) en évitant absolument d’aborder le sujet principal ou, mieux, en déclarant ne pas vouloir en entendre parler.</text:p>
      <text:p text:style-name="P6">L’effet peut être encore appuyé si le décideur intervient en mode « coup de vent hurlant », en arrivant en retard et en repartant dès la sentence exprimée.</text:p>
      <text:p text:style-name="P6">En général, après ce genre de traitement, il faut quelques semaines avant que les importuns n’osent ré-aborder le sujet.</text:p>
      <text:h text:style-name="P18" text:outline-level="5"><text:bookmark-start text:name="_Toc72657902"/>La mauvaise fenêtre<text:bookmark-end text:name="_Toc72657902"/></text:h>
      <text:p text:style-name="P6">Appelée également le déni parfait, cette méthode demande une rigueur inattaquable dans la mauvaise foi : elle consiste à ne pas prendre en compte les éléments présentés en ne s’intéressant qu’aux éléments qui valorisent le travail effectué.</text:p>
      <text:p text:style-name="P6">La subtilité de cette méthode consiste à pouvoir alterner entre demi-vérités et mensonges pour justifier sa position, sans que les interlocuteurs puissent disposer d’arguments à opposer.</text:p>
      <text:p text:style-name="P6">Une astuce imparable consiste à affirmer que des travaux sont justement en cours pour combler les dysfonctionnements présentés. Si le fonctionnement <text:soft-page-break/>de votre service est suffisamment opaque, personne ne sera en mesure de vérifier.</text:p>
      <text:h text:style-name="P18" text:outline-level="5">Le débordement structurel</text:h>
      <text:p text:style-name="P6">Cette méthode demande un travail de préparation en amont assez considérable, mais à l’avantage de résoudre la plupart des problèmes dans une seule et même approche : il convient dans ce cas d’organiser son service pour qu’il ne soit pas en capacité à répondre (en délai, en qualité et en production) aux travaux qui lui sont confiés.</text:p>
      <text:p text:style-name="P6">Il devient donc absolument impossible de lui confier des travaux supplémentaires quels qu’ils soient : priorité au fonctionnement !</text:p>
      <text:p text:style-name="P6">Le danger de cette méthode est lorsque les collaborateurs du service proposent des pistes d’amélioration ; ce qui pourrait amener à douter des compétences du manager…</text:p>
      <text:p text:style-name="P6">Dans ce cas, la méthode la plus élégante pour s’assurer de ne pas bouger est de promouvoir le collaborateur ambitieux et de lui proposer de poursuivre sa belle carrière prometteuse dans un autre service ou une autre entité…</text:p>
      <text:h text:style-name="P18" text:outline-level="5"><text:bookmark-start text:name="_Toc72657904"/>La dune du Pilat<text:bookmark-end text:name="_Toc72657904"/></text:h>
      <text:p text:style-name="P6">Il s’agit d’une variante de la méthode précédente, mais plus subtile et demandant plus d’organisation : elle consiste à entretenir une backlog<text:note text:id="ftn49" text:note-class="footnote"><text:note-citation>49</text:note-citation><text:note-body><text:p text:style-name="Footnote">Une backlog est une liste de tâches à réaliser dans un projet ou un processus de développement, souvent utilisée dans la gestion de projet agile, qui est continuellement mise à jour et priorisée par l’équipe de développement.</text:p></text:note-body></text:note> à jour, dans lesquels les sujets polémiques <text:soft-page-break/>sont effectivement recensés et reconnus, mais positionnés dans des lots de réalisation ultérieurs.</text:p>
      <text:p text:style-name="P6">La subtilité de l’exercice est de maintenir dans son équipe un taux de réalisation suffisamment bas pour ne pouvoir prendre en compte que les tâches vitales pour la pérennité du service et les fameuses tâches polémiques doivent alors être constamment repoussées dans un lot futur et perpétuellement inaccessible.</text:p>
      <text:p text:style-name="P6">On pousse alors un « tas de sable » amené à s’étoffer constamment jusqu’à obtenir la hauteur de la dune charentaise mondialement connue.</text:p>
      <text:h text:style-name="P18" text:outline-level="5"><text:bookmark-start text:name="_Toc72657905"/><text:bookmark-start text:name="_Ref72610837"/>La patate chaude<text:bookmark-end text:name="_Toc72657905"/><text:bookmark-end text:name="_Ref72610837"/></text:h>
      <text:p text:style-name="P6">Cette méthode demande des compétences politiques particulières, dans la capacité à jouer l’anguille insaisissable : elle consiste à faire affecter les tâches qui incombent à votre service à un autre service, pour toute raison de connexion entre les sujets qui seraient imaginables.</text:p>
      <text:p text:style-name="P6">Sachant qu’il faut compléter l’habileté politique à une imagination débordante (pour trouver des raisons de refiler le bébé à un autre service) et à une mauvaise foi sans faille, cette méthode est de loin la plus difficile à mettre en œuvre et n’est réservée qu’à une poignée de managers vraiment expérimentés.</text:p>
      <text:p text:style-name="P6">Par contre, bien menée, elle est celle qui sécurise le mieux un service : si vous ne faites rien, personne ne peut vous accuser de le faire mal.</text:p>
      <text:p text:style-name="P126"><text:soft-page-break/>C’est dans ce genre de méthode qu’excelle le prestidigitateur dont on a déjà parlé.</text:p>
      <text:h text:style-name="P18" text:outline-level="5"><text:bookmark-start text:name="_Toc72657906"/>La pièce cachée<text:bookmark-end text:name="_Toc72657906"/></text:h>
      <text:p text:style-name="P6">Au niveau des plus hauts arcanes du pouvoir, il devient possible d’invoquer une magie secrète et mystérieuse qui permet de rendre invisible des pans entiers de l’entreprise.</text:p>
      <text:p text:style-name="P6">L’aveuglement obtenu est généralisé et permet de cacher à la vision des plus perspicaces les évidences les plus criantes. A noter que le sort permet également d’ignorer toute évocation du sujet, par oral ou par écrit, quels que soient les éléments de preuve présentés.</text:p>
      <text:p text:style-name="P6">Seuls les sorciers de plus haut niveau ont accès à ce genre de sortilège qui peut entraîner la destruction subite de tout novice qui tenterait d’en copier les effets.</text:p>
      <text:h text:style-name="P17" text:outline-level="4"><text:bookmark-start text:name="_Toc72657907"/>Dans les cas où vous avez une expertise reconnue<text:bookmark-end text:name="_Toc72657907"/></text:h>
      <text:p text:style-name="P6">Ce chapitre est destiné aux services et aux personnes qui travaillent sur un domaine de spécialité sur lequel ils sont très peu challengés et pour lesquels leur expertise est reconnue.</text:p>
      <text:p text:style-name="P6">Plus le service « spécialiste » a de l’ancienneté et de l’activité sur les sujets polémiques, plus il est aisé de déployer les méthodes suivantes :</text:p>
      <text:h text:style-name="P18" text:outline-level="5"><text:bookmark-start text:name="_Toc72657908"/><text:bookmark-start text:name="_Ref72612855"/><text:soft-page-break/>L’écran de fumée<text:bookmark-end text:name="_Toc72657908"/><text:bookmark-end text:name="_Ref72612855"/></text:h>
      <text:p text:style-name="P6">Il s’agit simplement de profiter de la méconnaissance des interlocuteurs pour exagérer de façon déraisonnable le degré de complexité réel du problème à traiter.</text:p>
      <text:p text:style-name="P6">Ne pas hésiter à insister sur le manque de disponibilité des équipes pour traiter ces sujets éminemment complexes, mais ne jamais s’attarder sur les détails pour éviter que les interlocuteurs ne découvrent la supercherie.</text:p>
      <text:p text:style-name="P6">A noter que pour assurer le recours incontournable au service « expert », il convient de limiter au maximum le recours à l’automatisation, ce qui a 2 effets directs intéressants :</text:p>
      <text:list text:style-name="WWNum2">
        <text:list-item>
          <text:p text:style-name="P227">Un recours indispensable aux collaborateurs du service expert pour toutes les tâches à accomplir, même les plus simples,</text:p>
        </text:list-item>
        <text:list-item>
          <text:p text:style-name="P227">La certitude de conserver un certain pourcentage d’erreurs opérationnelles qui obligent également à recourir au service pour les corriger ultérieurement, en s’assurant un fond de roulement d’anomalies suffisant pour conserver une équipe surdimensionnée sans qu’on puisse le reprocher</text:p>
        </text:list-item>
      </text:list>
      <text:h text:style-name="P18" text:outline-level="5"><text:bookmark-start text:name="_Toc72657909"/>Le gloubi-boulga<text:bookmark-end text:name="_Toc72657909"/></text:h>
      <text:p text:style-name="P6">Il s’agit d’une variante de la méthode précédente, qu’on peut utiliser dans le cadre de sujets demandant différents niveaux d’expertise sur de multiples sujets : l’idée est ici d’utiliser une <text:soft-page-break/>méthodologie strictement opposée à celle du rasoir d’Occam.</text:p>
      <text:p text:style-name="P6">Au lieu de découper le problème complexe en un nombre fini de problèmes simples, on amalgame au contraire des sujets n’ayant rien à voir les uns avec les autres pour obtenir une nébuleuse incompréhensible à tous comme à chacun.</text:p>
      <text:p text:style-name="P6">La partie la plus difficile de l’exercice consiste à traiter sur un même plan des sujets en dépendance circulaire les uns des autres.</text:p>
      <text:p text:style-name="P6">Bien menée, cette méthode interdit complètement de trouver une solution au problème. Mieux, elle entraîne en plus un découragement complet des équipes qui vont se succéder sur le sujet et se termine systématiquement par un abandon pur et simple de l’instruction.</text:p>
      <text:h text:style-name="P18" text:outline-level="5"><text:bookmark-start text:name="_Toc72657910"/>L’obstruction déconstructrice<text:bookmark-end text:name="_Toc72657910"/></text:h>
      <text:p text:style-name="P6">Dans ce cas, l’expert mandaté doit à la fois posséder la connaissance exclusive sur le sujet, mais également être doté d’une mauvaise volonté en béton et d’un caractère exécrable.</text:p>
      <text:p text:style-name="P6">Toute la difficulté de l’exercice repose sur la constance, même si l’action de base est simplissime : il suffit de dire NON à toute proposition, en certifiant que ça ne fonctionnera jamais.</text:p>
      <text:p text:style-name="P6">Bien entendu, pour arriver à son terme, cette méthode impose qu’aucune justification ne soit apportée aux assertions de non-fonctionnement : la personnalité de l’expert doit agir comme caution morale (ou au pire comme repoussoir).</text:p>
      <text:p text:style-name="P6"><text:soft-page-break/>De même, aucune proposition ne doit jamais provenir de l’expert : il ne doit pas s’abaisser à proposer des améliorations à un système qui est parfait par essence.</text:p>
      <text:p text:style-name="P6">Enfin, dans le cas où l’insistance des interlocuteurs atteint des sommets intolérables, un rappel budgétaire peut être nécessaire : un expert renommé ne s’obtient pas pour rien et sa disponibilité est très faible, du fait même de ses sollicitations innombrables.</text:p>
      <text:h text:style-name="P17" text:outline-level="4"><text:bookmark-start text:name="_Toc72657911"/>Dans les cas où vous voulez afficher une bonne volonté de façade<text:bookmark-end text:name="_Toc72657911"/></text:h>
      <text:p text:style-name="P6">Quelquefois, l’insistance hiérarchique pour la résolution des problèmes impose, pour des raisons diplomatiques et de survie professionnelle, de ne pas s’opposer ouvertement aux interlocuteurs mandatés par les plus hautes instances.</text:p>
      <text:p text:style-name="P6">Dans ce cas, une approche plus subtile peut se développer autour des méthodes qui ont souvent fait leur preuve :</text:p>
      <text:h text:style-name="P18" text:outline-level="5"><text:bookmark-start text:name="_Toc72657912"/>Le déphasage spatio-temporel<text:bookmark-end text:name="_Toc72657912"/></text:h>
      <text:p text:style-name="P6">C’est LA méthode reine qui permet tout simplement de ne pas avoir à traiter le problème, en le laissant à d’autres : il suffit tout simplement de travailler suivant un rythme de livraison complètement incompatible avec les exigences de la hiérarchie.</text:p>
      <text:p text:style-name="P6">Malheureusement, les process internes du service et les contraintes diverses s’appliquant ne permettant pas de pouvoir accélérer le cycle de <text:soft-page-break/>livraison, il n’est pas possible au service de satisfaire la demande expresse : la complexité de l’exercice tient dans la manière d’amener les interlocuteurs à abandonner d’eux-mêmes la décision de travailler avec le service, malgré une bonne volonté affichée.</text:p>
      <text:p text:style-name="P126"><text:span text:style-name="T10">ATTENTION</text:span><text:span text:style-name="T1"> : pour réussir, cette méthode ne doit pas être confondue avec la méthode dite « du canard » qui consiste à ne rien montrer au-dessus tout en rétro-pédalant comme un fou en dessous.</text:span></text:p>
      <text:p text:style-name="P6">Pour être crédible et réellement dédouané de toute faute, le service doit réellement être incapable d’accélérer son rythme de livraison.</text:p>
      <text:h text:style-name="P18" text:outline-level="5"><text:bookmark-start text:name="_Toc72657913"/>L’instruction permanente<text:bookmark-end text:name="_Toc72657913"/></text:h>
      <text:p text:style-name="P6">Bien que cette méthode soit plus facilement applicable dans le cas d’une équipe d’experts, sa généralisation facile nous a permis de la classer dans cette catégorie.</text:p>
      <text:p text:style-name="P6">Le principe de cette méthode est décliné de la célèbre citation de Clémenceau : « Quand je veux enterrer une affaire, je crée une commission… »</text:p>
      <text:p text:style-name="P6">Le principe est exactement le même : montrer sa motivation et son sérieux en annonçant qu’on va mettre sa meilleure équipe sur le sujet et lancer effectivement une étude, en soignant la phase de cadrage et de planification.</text:p>
      <text:p text:style-name="P6">Il suffit ensuite d’annoncer des problèmes de capacité à faire, des urgences de production, des problèmes de turn-over dans les équipes… pour laisser mourir tranquillement le sujet.</text:p>
      <text:p text:style-name="P6"><text:soft-page-break/>Pour accompagner l’agonie finale, il est recommandé de créer des tableaux de bord offrant le moins d’information possible sur le niveau d’avancement réel, en les basant sur des indicateurs les plus subjectifs possibles : ne pas hésiter à caler la valeur de tous les indicateurs de suivi à 80 % très tôt dans le process et de les geler ensuite indéfiniment à cette valeur.</text:p>
      <text:p text:style-name="P6">En général, au bout de quelques mois, le sujet descend doucement dans les listings de suivi pour arriver finalement à disparaître des fichiers de suivi au bout d’une dizaine de mois : c’est une méthode idéale et sûre pour un enterrement de première classe.</text:p>
      <text:h text:style-name="P18" text:outline-level="5"><text:bookmark-start text:name="_Toc72657914"/>Le traitement par abandon<text:bookmark-end text:name="_Toc72657914"/></text:h>
      <text:p text:style-name="P6">C’est une variante pragmatique de la méthode précédente, en ce sens qu’il n’est même pas nécessaire d’effectuer le suivi présenté ci-dessus : au bout d’environ <text:span text:style-name="T164">deux</text:span> mois, il suffit de faire seulement comme si le sujet n’avait jamais existé.</text:p>
      <text:p text:style-name="P6">Généralement, accaparés par les nouveaux sujets d’actualité, les interlocuteurs oublient rapidement que le sujet a été ouvert à un moment quelconque de l’histoire.</text:p>
      <text:p text:style-name="P6">Le principal risque lié à cette méthode réside dans la présence éventuelle d’un pilotage transverse des projets et des sujets qui pourrait se rendre compte du subterfuge, mais le risque est faible au sein de la plupart des Grands Groupes.</text:p>
      <text:h text:style-name="P18" text:outline-level="5"><text:bookmark-start text:name="_Toc72657915"/><text:soft-page-break/>Le ping-pong<text:bookmark-end text:name="_Toc72657915"/></text:h>
      <text:p text:style-name="P6">C’est une méthode qui requiert une connaissance parfaite de l’organisation et des individus historiques des différentes équipes de la société dans laquelle on évolue : dans ce cas, comme pour la méthode de la patate chaude présentée plus haut, il faut imaginer une relation quelconque entre le sujet abordé et une autre équipe normalement complètement externe au sujet et l’orienter volontairement sur une fausse piste, impliquant si possible une ou plusieurs équipes connexes.</text:p>
      <text:p text:style-name="P6">Si la fausse piste est bien tracée, avec des interlocuteurs bien choisis et une rédaction suffisamment fumeuse pour que chaque destinataire y lise ce qu’il veut comprendre, au bout de quelques échanges de mails, le sujet a complètement viré vers une autre direction que celle du sujet initial et est tombé dans l’escarcelle d’une autre équipe.</text:p>
      <text:p text:style-name="P6">En ne faisant pas de vague, personne ne se rappellera le sujet de la polémique et le problème sera étouffé dans l’œuf.</text:p>
      <text:h text:style-name="P17" text:outline-level="4"><text:bookmark-start text:name="_Toc72657916"/>Dans les cas où vous préférez favoriser l’approche conflictuelle<text:bookmark-end text:name="_Toc72657916"/></text:h>
      <text:p text:style-name="P6">Si les relations avec les interlocuteurs sont historiquement tendues, ou si aucun risque de pression hiérarchique délétère n’est à craindre (injonctions provenant d’une autre direction, par exemple), il est tout à fait envisageable de recourir aux méthodes suivantes :</text:p>
      <text:h text:style-name="P18" text:outline-level="5"><text:bookmark-start text:name="_Toc72657917"/><text:soft-page-break/>La chaise vide<text:bookmark-end text:name="_Toc72657917"/></text:h>
      <text:p text:style-name="P6">Cette méthode correspond à l’application extrême des méthodes dite de l’ajournement dilatoire infini ou du lapin furtif (voir plus haut).</text:p>
      <text:p text:style-name="P6">Dans ce cas, il suffit de ne répondre à aucune sollicitation, quelle que soit la pression exercée.</text:p>
      <text:p text:style-name="P6">Il est également possible de rabrouer durement la personne à l’origine des sollicitations, si aucune sanction n’est à craindre.</text:p>
      <text:p text:style-name="P6">Simple à mettre en œuvre et à appliquer sur le long terme, elle nécessite toutefois un soutien sans faille du manager direct et une habitude affirmée de réponses bourrues ou désagréables.</text:p>
      <text:p text:style-name="P6">Bien que, de façon générale, les traces écrites sont à proscrire, un habitué de cette méthode épaulé par un management solide peut sans trop de risques répondre de façon très désagréable ou à la limite de l’insulte.</text:p>
      <text:h text:style-name="P18" text:outline-level="5"><text:bookmark-start text:name="_Toc72657918"/>La vierge effarouchée<text:bookmark-end text:name="_Toc72657918"/></text:h>
      <text:p text:style-name="P6">Il s’agit d’une méthode dilatoire un peu semblable à celle de l’écran de fumée présentée précédemment, mais directement axée sur la personnalité de la personne sollicitée par la résolution de problème. Il doit s’appuyer sur une sollicitation écrite, demandant des éléments concrets liés à la problématique abordée.</text:p>
      <text:p text:style-name="P6">Tout l’art de la réponse consiste à détourner le fond du message de la forme et à agir comme si le message envoyé comprenait une insulte grave à la probité ou à la compétence du destinataire.</text:p>
      <text:p text:style-name="P6"><text:soft-page-break/>Il est conseillé de simuler l’hystérie et de remonter à sa propre hiérarchie en mode berserk pour obliger le manager et la RH à entrer en mode calinothérapie et accompagnement personnalisé pour désamorcer le problème.</text:p>
      <text:p text:style-name="P6">En en rajoutant un peu et en se focalisant sur le côté émotionnel, le sujet déclencheur peut être oublié en quelques jours. De plus, suite au buzz déclenché, le solliciteur hésitera longtemps avant de risquer d’aborder le sujet qui fâche.</text:p>
      <text:h text:style-name="P18" text:outline-level="5"><text:bookmark-start text:name="_Toc72657919"/>La dépression spontanée<text:bookmark-end text:name="_Toc72657919"/></text:h>
      <text:p text:style-name="P6">Il s’agit simplement de l’aboutissement de la méthode précédente, en misant sur le fait que les RH préfèrent protéger les salariés qu’être accusés de harcèlement ou de torture morale.</text:p>
      <text:p text:style-name="P6">Pendant que le collaborateur se refait une santé, il ne peut pas être sollicité sur le sujet en souffrance et une autre solution sera trouvée avant son retour.</text:p>
      <text:p text:style-name="P6">A noter qu’il n’existe pas de problème qui ne puisse être résolu en l’absence de la personne qui l’a provoqué : il faut donc souvent faire preuve d’humilité et laisser les lauriers de la réussite aux autres et rester dans l’ombre. D’autant plus que d’ici son retour, tout le monde aura oublié qui était responsable du problème à l’origine…</text:p>
      <text:h text:style-name="P18" text:outline-level="5"><text:bookmark-start text:name="_Toc72657920"/>L’attaque personnelle<text:bookmark-end text:name="_Toc72657920"/></text:h>
      <text:p text:style-name="P6">C’est une méthode à utiliser avec parcimonie, et essentiellement avant d’activer la méthode décrite <text:soft-page-break/>précédemment. Elle n’a que peu d’intérêt et permet rarement d’enterrer un sujet.</text:p>
      <text:p text:style-name="P6">Elle peut toutefois permettre d’initier la mise en œuvre d’une des deux méthodes précédentes, surtout dans le cas de l’arrivée d’un nouveau manager dans une équipe historiquement épargnée par les méfaits du management.</text:p>
      <text:p text:style-name="P6">J’ai ainsi personnellement vécu une expérience assez stupéfiante où, avant même de m’être présenté ou d’avoir pu donner mon nom et mon parcours à mon arrivée dans un service, j’ai été mouché à froid par une future ex-collaboratrice qui m’a expliqué tout de go que, « de toute façon, elle ne voulait pas de petit cheffaillon de merde ».</text:p>
      <text:p text:style-name="P6">Ça m’a effectivement suffisamment déstabilisé pour que l’entretien s’arrête rapidement. Elle est ensuite partie en dépression spontanée et je ne l’ai jamais revue. Le tas de poussière sous le tapis était conséquent et bien camouflé : ça m’a pris quelques mois pour tout nettoyer avec le reste de l’équipe.</text:p>
      <text:h text:style-name="P17" text:outline-level="4"><text:bookmark-start text:name="_Toc72657921"/>Les inclassables<text:bookmark-end text:name="_Toc72657921"/></text:h>
      <text:p text:style-name="P6"><text:span text:style-name="T164">À </text:span>côté de ces méthodes reconnues, on peut également recenser quelques solutions annexes, originales et efficaces.</text:p>
      <text:h text:style-name="P18" text:outline-level="5"><text:bookmark-start text:name="_Toc72657922"/>Ich spreche kein Deutsch<text:bookmark-end text:name="_Toc72657922"/></text:h>
      <text:p text:style-name="P6">Dans ce cas, il faut que les connaissances et les compétences des collaborateurs du service ne permettent simplement pas de comprendre les demandes des solliciteurs.</text:p>
      <text:p text:style-name="P6"><text:soft-page-break/>C’est d’autant plus facile lorsque le domaine d’intervention demande une expertise particulière ou s’appuie sur un domaine d’intervention très spécifique, lié à un vocabulaire ou un jargon propre.</text:p>
      <text:p text:style-name="P6">A condition de s’assurer qu’aucun des collaborateurs n’ait suivi les formations permettant de comprendre la langue des interlocuteurs, on peut alors en toute confiance déléguer le sujet : de toute façon, personne ne comprendra la problématique, ni les mesures à mettre en œuvre et le sujet va rester sagement rangé sur son étagère, à prendre doucement la poussière.</text:p>
      <text:h text:style-name="P18" text:outline-level="5"><text:bookmark-start text:name="_Toc72657923"/>L’arbitrage orienté<text:bookmark-end text:name="_Toc72657923"/></text:h>
      <text:p text:style-name="P6">Cette méthode peut être complémentaire de la méthode précédente : il convient de profiter de périodes de tension budgétaire pour décider quels sujets doivent être sacrifiés.</text:p>
      <text:p text:style-name="P6">Et il est plus facile d’obtenir un consensus sur des sujets que personne n’a réellement compris, sans oser l’avouer au reste de l’assistance. Dans ce cas, « ON » va décider de l’arbitrage du sujet pour des raisons officiellement budgétaires (ou de Capacité A Faire) et le sujet sera au mieux repoussé aux calendes grecques.</text:p>
      <text:p text:style-name="P6">L’avantage de la méthode est que, comme la décision devient collective, il devient très compliqué de retrouver qui en est à l’origine…</text:p>
      <text:h text:style-name="P177" text:outline-level="4"><text:soft-page-break/><text:span text:style-name="T166">Au-delà de</text:span><text:span text:style-name="T165"> la résistance…</text:span></text:h>
      <text:p text:style-name="P24">En espérant que <text:span text:style-name="T165">vous avez pris autant de plaisir à lire ces témoignages que j’en ai eu à les recueillir, je voudrais maintenant présenter certains travers </text:span><text:span text:style-name="T166">dans lesquels se sont enfoncés certains managers, inconsciemment ou non, involontairement ou non, jusqu’à arriver à rendre leurs services absolument ineptes et inefficaces.</text:span></text:p>
      <text:h text:style-name="P139" text:outline-level="3"><text:bookmark-start text:name="__RefHeading___Toc1602_1115178054"/><text:bookmark-start text:name="_Toc131774405"/>Tout est dans l’organisation du service<text:bookmark-end text:name="__RefHeading___Toc1602_1115178054"/><text:bookmark-end text:name="_Toc131774405"/></text:h>
      <text:p text:style-name="P142"><text:span text:style-name="T166">Quand on se balade dans les services, au gré des pérégrinations de la Transformation, on est souvent atterré par la façon dont certains managers gèrent leur service et leurs collaborateurs. Entre incompétence, mentalité de petit chef et cynisme total, il est difficile de mettre toutes les causes de ces comportements dans le m</text:span><text:span text:style-name="T129">ême sac, mais on retrouve certains modes de fonctionnement symptomatiques. J’en ai recensé quelques-uns qui ne devraient pas exister, mais qu’on rencontre trop fréquemment.</text:span></text:p>
      <text:p text:style-name="P143"><text:span text:style-name="T130">En même temps</text:span><text:span text:style-name="T129">, il faut </text:span><text:span text:style-name="T130">prendre en compte que le management intermédiaire, dans les Grands Groupes, est essentiellement assuré par des personnes qui n’ont pas forcément choisi ce rôle, ou qui l’ont choisi à tort : historiquement, il a toujours paru naturel de promouvoir à un poste de management les collaborateurs les plus aptes et les plus méritants dans un service. Or l’aptitude et le mérite ne </text:span><text:span text:style-name="T131">constituent pas des qualités indispensables pour faire un bon manager. Ni même des qualités nécessaires ou attendues.</text:span></text:p>
      <text:p text:style-name="P143"><text:soft-page-break/><text:span text:style-name="T131">Rien ne prouve qu’un bon spécialiste ou un expert sur son domaine ait les qualités morales et managériales pour devenir un bon manager. C’est complètement disjoint. Et il est très rare que le manager fraîchement promu soit accompagné, coaché et assisté dans sa nouvelle prise de fonction. En général, il essaie de faire au mieux avec ses propres armes. Et quelquefois il se plante complètement. </text:span><text:span text:style-name="T129">En voici un petit florilège.</text:span></text:p>
      <text:h text:style-name="P140" text:outline-level="4"><text:bookmark-start text:name="_Toc72657890"/>Absence de délégation<text:bookmark-end text:name="_Toc72657890"/></text:h>
      <text:p text:style-name="P141"><text:span text:style-name="T167">C’est lorsque le</text:span> manager <text:span text:style-name="T167">concentre</text:span> toutes les informations sur le fonctionnement du service et <text:span text:style-name="T167">prend</text:span> toutes les décisions, depuis l’organisation de l’équipe jusqu’à l’affectation des stylos et des agrafeuses.</text:p>
      <text:p text:style-name="P141">Baignés dans ces conditions, les collaborateurs n’oseront jamais prendre l’initiative de chercher une amélioration quelconque dans le service et toute sollicitation extérieure sera automatiquement redirigée vers le manager, seul maître à bord après Dieu.</text:p>
      <text:h text:style-name="P140" text:outline-level="4"><text:bookmark-start text:name="_Toc72657891"/>Rétention d’information<text:bookmark-end text:name="_Toc72657891"/></text:h>
      <text:p text:style-name="P141">Bien entendu, plus le sujet est critique et plus le tas de poussière sous le tapis est important, <text:span text:style-name="T168">plus certains managers tendent à faire passer toutes les informations par eux : ainsi, l</text:span>es collaborateurs directs <text:span text:style-name="T168">ne disposent que d’une information partielle et faussée sur les problèmes structuraux du service</text:span>. <text:span text:style-name="T168">De cette manière</text:span>, ils seront techniquement forcés à <text:soft-page-break/>router toutes les sollicitations en liaison avec le sujet principal, par manque de connaissance intrinsèque.</text:p>
      <text:h text:style-name="P140" text:outline-level="4">Absence de documentation</text:h>
      <text:p text:style-name="P141"><text:span text:style-name="T169">Autre plaie des organisations et des services, la </text:span>rétention d’information <text:span text:style-name="T169">qui</text:span> va de pair avec une absence de documentation généralisée, en particulier dans les équipes constituées d’experts reconnus : <text:span text:style-name="T169">nombre de</text:span> manager<text:span text:style-name="T169">s</text:span> <text:span text:style-name="T169">disposent</text:span> <text:span text:style-name="T169">d’un</text:span> cheptel de « bibliothèques vivantes » qui détiennent et concentrent tout le savoir sur des pans entiers du fonctionnement de certaines activités de l’entreprise.</text:p>
      <text:p text:style-name="P141">Il est à noter que la plupart des Grands Groupes sont en fait des sociétés de culture orale, à l’instar de certaines sociétés traditionnelles dont on aime se gausser : un ancien qui meurt (ou qui part à la retraite), c’est à chaque fois une bibliothèque qui brûle…</text:p>
      <text:h text:style-name="P140" text:outline-level="4">Entretien des dysfonctionnements</text:h>
      <text:p text:style-name="P141"><text:span text:style-name="T169">On rentre maintenant dans des comportements beaucoup plus cyniques </text:span><text:span text:style-name="T170">et ambigus : </text:span>pour les services dont une des missions principales tient à l’amélioration continue, la résolution d’incidents ou la production faiblement automatisées de résultats critiques pour l’entreprise, <text:span text:style-name="T170">il devient difficile de se positionner et de définir le pourquoi de sa mission au sein de l’entreprise.</text:span></text:p>
      <text:p text:style-name="P141"><text:span text:style-name="T170">Ainsi, c</text:span>omme une des principales mesures du pouvoir dans l’entreprise est liée à la taille de l’équipe managée, <text:span text:style-name="T171">il est tentant d’organiser son équipe afin</text:span> que <text:span text:style-name="T171">ses</text:span> travaux soient générateurs d’un <text:soft-page-break/>nombre suffisant d’anomalies pour justifier des ressources supplémentaires destinées à corriger ces anomalies.</text:p>
      <text:p text:style-name="P141">Dans cette optique, le recours à l’automatisation des actions et des tests <text:span text:style-name="T171">est souvent réduit au minimum</text:span>.</text:p>
      <text:p text:style-name="P141">Pour les équipes affectées spécifiquement à la résolution des incidents, il est à noter qu’elles sont confrontées à un <text:span text:style-name="T157">dilemme</text:span> existentiel :</text:p>
      <text:list text:style-name="WWNum1">
        <text:list-item>
          <text:p text:style-name="P229">Soit elles remplissent leur mission, ce qui doit se traduire par la dissolution du service devenu inutile,</text:p>
        </text:list-item>
        <text:list-item>
          <text:p text:style-name="P229">Soit elles cherchent à développer l’activité et, dans ce cas, cela doit se traduire par un maintien d’un niveau d’anomalies suffisant pour entretenir l’existence du service.</text:p>
        </text:list-item>
      </text:list>
      <text:h text:style-name="P140" text:outline-level="4">Inaccessibilité organisée</text:h>
      <text:p text:style-name="P141"><text:span text:style-name="T171">Certains</text:span> manager<text:span text:style-name="T171">s gèrent leur agenda </text:span>pour se rendre le plus indisponible possible, afin que toute sollicitation qui sorte de la routine ordinaire soit très difficile à caler.</text:p>
      <text:p text:style-name="P141">La gestion fine de l’agenda reste un des facteurs clés de réussite de toutes les stratégies de fuite, comme on <text:span text:style-name="T171">l’a vu plus haut</text:span>. <text:span text:style-name="T172">Mais il arrive aussi que cette inaccessibilité ne soit qu’un symptôme d’un mal plus profond qui ronge toutes les grandes structures : la réunionite aiguë.</text:span></text:p>
      <text:p text:style-name="P144"><text:soft-page-break/>En plus de la taille de l’équipe, une autre mesure traditionnelle de l’importance d’un manager est le nombre de réunions auxquelles il est invité : <text:span text:style-name="T173">et son importance est directement proportionnelle à ce nombre !</text:span></text:p>
      <text:p text:style-name="P145">Quand ça se traduit en plus par une absence de délégation, le manager se trouve rapidement dans l’obligation de participer à des dizaines de points divers et variés par semaine, pour lesquels il n’a aucune valeur ajoutée, sinon celle de courroie de transmission. C’est ainsi que les agendas se remplissent inexorablement, avec une conséquence fatale incontournable : en réunion, on ne peut pas avancer sur les chantiers et projets.</text:p>
      <text:p text:style-name="P145">D’où l’obligation d’allonger les données de travail et les délais pour échanger avec les équipes : c’est un cercle vicieux institutionnalisé dans tous les Grands Groupes. Il y a m<text:span text:style-name="T128">ême des Groupes de Travail destinés à réfléchir comment lutter contre ce fléau. Et ces Groupes de Travail organisent eux-mêmes leur compte de réunions pour avancer sur le sujet…</text:span></text:p>
      <text:h text:style-name="P140" text:outline-level="4">Opacité structurelle</text:h>
      <text:p text:style-name="P145">Un dernier point qui mine le fonctionnement des organisations est la compréhension du r<text:span text:style-name="T128">ôle et des responsabilités de chacun des services au sein de l’entreprise et vis-à-vis des acteurs avec qui ce service interagit, ou devrait interagir.</text:span></text:p>
      <text:p text:style-name="P147"><text:span text:style-name="T173">Il est très fréquent </text:span>que l’organisation interne <text:span text:style-name="T173">de tel ou tel</text:span> service et les responsabilités de chacun des collaborateurs soient <text:span text:style-name="T173">absolument</text:span> <text:span text:style-name="T173">in</text:span>compréhensibles pour les personnes extérieures au service. <text:span text:style-name="T173">Pire, il est très fréquent qu’</text:span>au sein du service <text:soft-page-break/><text:span text:style-name="T173">s’applique un </text:span>principe du « main droite / main gauche » : la main droite ne <text:span text:style-name="T173">sait</text:span> pas ce que fait la gauche. <text:span text:style-name="T173">En d’autres termes, au sein d’un m</text:span><text:span text:style-name="T132">ême service, des collaborateurs ne savent pas ce que font leur voisin !</text:span></text:p>
      <text:p text:style-name="P145"><text:span text:style-name="T128">Ce qui aboutit souvent à </text:span><text:span text:style-name="T133">ce que de nombreux collaborateurs effectuent exactement les mêmes tâches manuelles sans aucune valeur ajoutée, alors qu’on pourrait très bien envisager une mutualisation et une automatisation d’une grande partie de ces tâches, au bénéfice de tous.</text:span></text:p>
      <text:p text:style-name="P147"><text:span text:style-name="T174">Mais, trop souvent, l</text:span>a connaissance de qui fait quoi dans le service <text:span text:style-name="T174">est</text:span> réservée exclusivement au manager. <text:span text:style-name="T174">Pour lutter contre ce biais, il faut réaliser un travail important de communication et de partage systématique qui doit </text:span><text:span text:style-name="T133">être fait au sein de chaque service, mais elle se heurte au mur de la réunionite et à la disponibilité des managers.</text:span></text:p>
      <text:h text:style-name="P179" text:outline-level="3"><text:bookmark-start text:name="__RefHeading___Toc1602_11151780541"/>Qu’est-ce qu’un manager, <text:span text:style-name="T175">au fond</text:span> ?<text:bookmark-end text:name="__RefHeading___Toc1602_11151780541"/></text:h>
      <text:p text:style-name="P146"><text:span text:style-name="T128">R</text:span><text:span text:style-name="T133">evenons sur le mode de désignation des managers évoqué plus haut : </text:span><text:span text:style-name="T134">il est considéré comme très valorisant pour un collaborateur d’être promu à un poste de manager au bout de plusieurs années de bons et loyaux services, tant par le collaborateur promu que par le management qui lui fait cette promotion. En général, on va choisir les personnes les plus aptes et les plus compétentes </text:span><text:span text:style-name="T135">dans leur activité, donc des spécialistes qui ont fait leurs preuves. Dans les services opérationnels et techniques, ce sont rarement des personnes qui ont fait des études de management.</text:span></text:p>
      <text:p text:style-name="P148"><text:soft-page-break/><text:span text:style-name="T128">Car le management, comme beaucoup de disciplines, ça s’apprend. </text:span><text:span text:style-name="T136">Et ça demande également quelques aptitudes naturelles (ou soft skills) de la part du manager en devenir : empathie, capacité d’écoute, sens de la conciliation… Ce ne sont pas forcément les qualités </text:span><text:span text:style-name="T137">qu’un spécialiste a développées durant les années passées à ses différents postes. </text:span><text:span text:style-name="T138">Et c’est ainsi que c’est souvent dans les postes managériaux que va s’exprimer le plus souvent le </text:span><text:span text:style-name="T134">principe de Peter</text:span><text:span text:style-name="T134"><text:note text:id="ftn50" text:note-class="footnote"><text:note-citation>50</text:note-citation><text:note-body><text:p text:style-name="Footnote">Selon ce principe, « dans une hiérarchie, tout employé a tendance à s’élever à son niveau d’incompétence », avec pour corollaire que « avec le temps, tout poste sera occupé par un employé incapable d’en assumer la responsabilité ».</text:p></text:note-body></text:note></text:span><text:span text:style-name="T134"> : </text:span><text:span text:style-name="T138">c’est aux postes à responsabilité qu’on rencontre le plus d’incompétents.</text:span></text:p>
      <text:p text:style-name="P149">Et ce n’est pas forcément de la faute du collaborateur promu : c’est juste qu’on ne lui a pas donné la bonne promotion. Un manager n’est pas forcément un expert et vice-versa : pour affecter un rôle de management à un spécialiste, il faut d’abord s’assurer qu’il a les aptitudes pour le poste et également se poser la question s’il ne serait pas plus judicieux de créer un poste d’expert pour ce collaborateur, mais avec des responsabilités managériales limitées et d’affecter au management quelqu’un dont c’est vraiment le métier.</text:p>
      <text:p text:style-name="P149">C’est encore une simple réflexion de bon sens, mais ça permettrait de résoudre simplement et fluidement la plupart des problèmes rencontrés dans les équipes, en disposant simplement des bonnes personnes aux bons postes.</text:p>
      <text:p text:style-name="P243"/>
      <text:p text:style-name="P40"><draw:custom-shape text:anchor-type="as-char" draw:z-index="6" draw:name="Forme11" draw:style-name="gr1" draw:text-style-name="P267" svg:width="1.19cm" svg:height="1.147cm"><text:p text:style-name="P212"><text:span text:style-name="T114">1</text:span><text:span text:style-name="T117">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3" text:outline-level="2"><text:bookmark-start text:name="_Toc131774413"/><text:bookmark-start text:name="__RefHeading___Toc1618_1115178054"/>Et maintenant, que fait-on ?<text:bookmark-end text:name="_Toc131774413"/><text:bookmark-end text:name="__RefHeading___Toc1618_1115178054"/></text:h>
      <text:h text:style-name="P154" text:outline-level="3"><text:bookmark-start text:name="__RefHeading___Toc5807_463363166"/>Redevenons sérieux pour un temps<text:bookmark-end text:name="__RefHeading___Toc5807_463363166"/></text:h>
      <text:p text:style-name="P126"><text:span text:style-name="T1">Voilà, après toutes ces pages passées à dénigrer les grandes Transformations et les Grands Groupes, leurs dirigeants et les décisions prises, après avoir rigolé ensemble sur les stratégies d’évasion déployées dans ces m</text:span><text:span text:style-name="T102">êmes Groupes pour échapper à la corvée, que peut-on en dire ?</text:span></text:p>
      <text:p text:style-name="P126"><text:span text:style-name="T102">Tout d’abord, pour paraphraser Clémenceau </text:span><text:span text:style-name="T107">(source inépuisable de citations)</text:span><text:span text:style-name="T102">, l’IT est une chose trop sérieuse pour la confier à des informaticiens</text:span><text:span text:style-name="T102"><text:note text:id="ftn51" text:note-class="footnote"><text:note-citation>51</text:note-citation><text:note-body><text:p text:style-name="Footnote">« La guerre ! C’est une chose trop grave pour la confier à des militaires. » Georges Clémenceau</text:p></text:note-body></text:note></text:span><text:span text:style-name="T102">: si on confie une chose aussi précieuse que l’IT à des purs techniciens, ils vont peu à peu oublier leur mission principale – être au service des métiers – pour se concentrer sur le fonctionnement de leur belle machinerie, qui va devenir une fin en soi.</text:span></text:p>
      <text:p text:style-name="P126"><text:span text:style-name="T102">D’autre part, il faut être aussi conscient que les financiers qui dirigent les Grands Groupes ne comprennent pas un traître mot aux problématiques </text:span><text:soft-page-break/><text:span text:style-name="T102">techniques et que leur attention est uniquement portée sur la rentabilité à court terme de leur entreprise : la notion d’investissement est déjà compliquée à faire passer, quant aux risques à long terme, c’est de la science-fiction pour eux !</text:span></text:p>
      <text:p text:style-name="P126"><text:span text:style-name="T102">On voit ça dans les grandes entreprises financières, mais c’est un phénomène qu’on rencontre partout où la dimension technologique est devenue tellement complexe qu’elle n’est plus accessible au commun des mortels. Je rappelle pour mémoire le rapport de la commission d’enquête parlementaire sur l’indépendance énergétique de la France</text:span><text:span text:style-name="T102"><text:note text:id="ftn52" text:note-class="footnote"><text:note-citation>52</text:note-citation><text:note-body><text:p text:style-name="P38"><text:a xlink:type="simple" xlink:href="https://www.assemblee-nationale.fr/dyn/16/organes/autres-commissions/commissions-enquete/ce-independance-energetique" text:style-name="Internet_20_link" text:visited-style-name="Visited_20_Internet_20_Link"><text:span text:style-name="Internet_20_link">https://www.assemblee-nationale.fr/dyn/16/organes/autres-commissions/commissions-enquete/ce-independance-energetique</text:span></text:a></text:p></text:note-body></text:note></text:span><text:span text:style-name="T102"> qui étrille les gouvernements successifs : les décisions ont été prises pour des raisons purement électoralistes, sans aucune compréhension des enjeux techniques ou environnementaux.</text:span></text:p>
      <text:p text:style-name="P114">Même nos rigoureux voisins allemands se sont fait piéger : la décision de sortir du nucléaire après la catastrophe de Fukushima est certainement la pire décision de la dernière décennie avec un recours massif aux énergies fossiles, en particulier le charbon, et un impact désastreux sur le climat…</text:p>
      <text:p text:style-name="P126"><text:span text:style-name="T102">Seule l’approche pluridisciplinaire permet de se sortir de ce genre d’impasse, à condition que tous aient voix au chapitre et qu’une certaine vision aristocratique des fonctions de l’entreprise, avec les fonctions financières au pinacle et les fonctions techniques dans la soute, ne soit définitivement bannie des processus de prise de décision : il est aussi aberrant qu’un financier puisse décider de la trajectoire technologique qu’un IT puisse arbitrer une </text:span><text:soft-page-break/><text:span text:style-name="T102">fonction essentielle pour le business. C’est pourtant ce qu’on rencontre tous les jours…</text:span></text:p>
      <text:h text:style-name="Heading_20_3" text:outline-level="3"><text:bookmark-start text:name="__RefHeading___Toc5809_463363166"/>Ne pas remettre en cause les objectifs, mais la méthode et les messages<text:bookmark-end text:name="__RefHeading___Toc5809_463363166"/></text:h>
      <text:p text:style-name="P114">Revenons à nos moutons, ou plutôt à nos Transformations. Comme je le disais précédemment, je ne tiens pas à juger de la pertinence ou non des Transformations : il va de soi qu’une entreprise et ses équipements doivent régulièrement se moderniser et s’améliorer, au niveau des personnels, des processus et des outils. C’est normal et c’est juste lié à l’évolution normale des populations et des technologies : les jeunes générations n’ont pas le même rapport au travail et la hiérarchie que leurs aînés, et les organisations doivent s’adapter pour le prendre en compte, par exemple.</text:p>
      <text:p text:style-name="P114">Donc, il est nécessaire de s’adapter et, quand on les regarde attentivement, les objectifs affichés par une Transformation ne sont pas déconnants : améliorer l’efficacité de l’entreprise, sécuriser les fonctions critiques, surfer sur la vague technologique, améliorer les compétences des collaborateurs, reprendre le contrôle des applications clés de l’entreprise…</text:p>
      <text:p text:style-name="P114">Il n’y a rien à reprocher et tous ces objectifs sont évidemment à atteindre. Le problème, c’est la façon de les atteindre. Pourquoi passer par des Transformations aussi douloureuses et mal acceptées ? Peut-être parce que tant d’immobilisme et de culture du résultat immédiat ont rendu le <text:soft-page-break/>problème si complexe que seuls une intervention quasi-divine et un Messie peuvent le résoudre ?</text:p>
      <text:p text:style-name="P114">Parce que c’est bien comme ça que se présentent la majorité des Transformations : le seul moyen de faire bouger les choses, par un choc de cultures et de pratiques. Et forcément une certaine violence dans ces pratiques. Bien entendu, je ne parle pas de violence physique, mais les effets délétères de ce genre de révolution de palais ont parfois eu des conséquences dramatiques : il suffit de se rappeler ce qui s’est passé chez Orange ou chez Renault quand les acteurs du changement ont voulu faire du zèle. On a compté les suicides et ça s’est terminé au tribunal.</text:p>
      <text:p text:style-name="P114">Tout ça parce que, dans le grand bal des élites qui président à ces grands changements, il y a la certitude partagée qu’eux seuls détiennent la vérité et comprennent profondément les problèmes. C’est une conception quasi-ésotérique et messianique de la Vérité. Et cette Vérité partagée entre dirigeants et cabinets de conseil à la vision stratosphérique, est-elle conforme à la réalité ?</text:p>
      <text:p text:style-name="P126"><text:span text:style-name="T102">Eh bien, c’est très peu probable : rares sont les dirigeants qui savent ce que font leurs équipes au quotidien, avec quels moyens et pour quels buts. Quant aux cabinets de conseil en stratégie, ce n’est tout simplement pas leur mission. Personne ne va donc faire un véritable diagnostic à hauteur d’homme des problèmes à résoudre. </text:span><text:span text:style-name="T104">Ils vont </text:span><text:span text:style-name="T25">être envisagés en vision « top-down</text:span><text:span text:style-name="T25"><text:note text:id="ftn53" text:note-class="footnote"><text:note-citation>53</text:note-citation><text:note-body><text:p text:style-name="Footnote">L’analyse top-down est une approche de résolution de problèmes ou de prise de décision qui part d’une vision globale ou d’une perspective d’ensemble pour ensuite se focaliser sur les détails et les éléments spécifiques.</text:p></text:note-body></text:note></text:span><text:span text:style-name="T25"> », mais sans descendre </text:span><text:soft-page-break/><text:span text:style-name="T25">réellement dans le particulier. Ces analyses sont réalisées généralement dans un délai très court, par des consultants qui coûtent plusieurs milliers d’euros par jour. En général, on s’arrête quand on commence à avoir les grandes tendances et on laisse la déclinaison opérationnelle et l’analyse fine à la Transformation.</text:span></text:p>
      <text:p text:style-name="P132"><text:span text:style-name="T58">O</text:span><text:span text:style-name="T19">n comprend alors mieux le désarroi des équipes : pourquoi ne sont-elles pas consultées dans cette phase, alors que ce sont les seules à savoir véritablement ce qu’elles font au quotidien et pourquoi ? On leur répond souvent que, comme elles sont attachées à des tâches très ponctuelles et très spécifiques, elles n’ont pas la vision de la « Big Picture</text:span><text:span text:style-name="T19"><text:note text:id="ftn54" text:note-class="footnote"><text:note-citation>54</text:note-citation><text:note-body><text:p text:style-name="Footnote">Le jargon « big picture » (ou « vue d’ensemble » en français) se réfère à une perspective globale, holistique ou d’ensemble d’un sujet, d’un projet, d’une situation ou d’un concept. Cela implique de prendre en compte les éléments clés, les interconnexions, les relations ou les implications globales plutôt que de se concentrer uniquement sur les détails ou les aspects isolés.</text:p></text:note-body></text:note></text:span><text:span text:style-name="T19"> » et ont tendance à ne pas voir plus loin que le bout de leur nez.</text:span></text:p>
      <text:p text:style-name="P133"><text:span text:style-name="T19">Sauf que le diable se cache toujours dans les détails. </text:span><text:span text:style-name="T26">Et sans appréhender un minimum ces problèmes du quotidien, on perd complètement la compréhension de pourquoi on doit réaliser la Transformation : </text:span><text:span text:style-name="T58">je rappelle qu’</text:span><text:span text:style-name="T26">on fait une Transformation pour </text:span><text:span text:style-name="T58">que </text:span><text:span text:style-name="T26">l’entreprise aille mieux. Donc, pour que les collaborateurs travaillent mieux et dans de meilleures conditions.</text:span></text:p>
      <text:p text:style-name="P133"><text:soft-page-break/><text:span text:style-name="T26">Ce qui est impossible à définir si on ne leur pose pas la question de leurs irritants de tous les jours. Et surtout, si toutes les Transformations successives conduites par à peu près toujours le même panel de cabinets ne se sont pas attachés à leur poser ces questions ! </text:span><text:span text:style-name="T58">Je rappelle une règle de base : si on ne pose pas les bonnes questions, on n’obtient pas les bonnes réponses.</text:span></text:p>
      <text:p text:style-name="P47">À noter que, pour s’affranchir de ce genre de critique récurrent<text:span text:style-name="T160">e</text:span>, certains cabinets ont inventé un joli concept poudre-aux-yeux : l’intelligence collective. <text:span text:style-name="T122">C’est un joli enfumage où on va demander à quelques populations sélectionnées de répondre à des questionnaires préformatés dans les phases très amont de l’analyse préliminaire : leurs réponses sont censé</text:span><text:span text:style-name="T160">es</text:span><text:span text:style-name="T122"> permettre d’</text:span><text:span text:style-name="T160">affiner</text:span><text:span text:style-name="T122"> la trajectoire, en prenant en compte leurs remarques et propositions. Ou pas. Parce que le processus de sélection des propositions est à la discrétion des dirigeants et des cabinets. Et de toute façon il n’est pas possible d’interroger tout le monde : le dépouillement serait trop long, même en s’aidant de jolis outils d’IA.</text:span></text:p>
      <text:p text:style-name="P49">Donc, d’un côté on affiche qu’on a demandé leur avis aux collaborateurs et de l’autre on présente un résultat d’analyse. Rien ne permet d’affirmer que les avis des collaborateurs ont été oubliés. Ou le contraire d’ailleurs. Mais c’est surtout de la com tout ça.</text:p>
      <text:h text:style-name="Heading_20_3" text:outline-level="3"><text:bookmark-start text:name="__RefHeading___Toc4449_410582302"/><text:span text:style-name="T122">Écouter</text:span> d’abord<text:bookmark-end text:name="__RefHeading___Toc4449_410582302"/></text:h>
      <text:p text:style-name="P48"><text:span text:style-name="T161">Donc,</text:span> comment recueillir ces irritants et ces problèmes et vraiment répondre aux attentes des <text:soft-page-break/>collaborateurs tout en s’inscrivant dans une démarche d’amélioration de l’entreprise ?</text:p>
      <text:p text:style-name="P48">J’avoue que l’exercice est compliqué et que la formule magique n’est pas encore disponible, mais je pense sincèrement qu’il faut compter sur la volonté de bien-faire des collaborateurs. C’est souvent la principale cause de résistance à la Transformation comme on l’a vu, mais ça peut aussi devenir un vrai levier pour trouver des solutions pragmatiques et constructives.</text:p>
      <text:p text:style-name="P54">Maintenant, comment écouter intelligemment ? Comme on l’a déjà dit, les collaborateurs sont déjà débordés par leurs tâches critiques quotidiennes et n’ont pas le temps matériel pour s’occuper d’autre chose, en plus de devoir « sortir la tête du guidon » pour essayer de se projeter dans un futur à construire. <text:span text:style-name="T144">C’est à ce niveau qu’il faut les accompagner, en voyant non seulement ce qu’ils produisent, mais comment ils le font : leurs processus, leurs outils, leurs contraintes, leurs irritants quotidiens…</text:span></text:p>
      <text:p text:style-name="P55">Ensuite, il faut chercher à trouver des solutions avec ces métiers <text:span text:style-name="T161">et</text:span> les construire avec eux, en prenant le temps de les concevoir, sans <text:span text:style-name="T139">a priori</text:span>. Un des grands défauts des cabinets et des équipes qui gèrent les Transformations est la certitude d’avoir raison. Or ce n’est pas leur rôle ni leur mission. Ils sont là pour améliorer l’entreprise, la faire fonctionner plus efficacement. On <text:span text:style-name="T161">doit</text:span> y inclure l’amélioration des conditions de travail et l’efficacité des collaborateurs. En aucun cas, cela sous-entend d’avoir raison. Et je dirais même que ça ne sert à rien <text:soft-page-break/>d’avoir raison. Avoir raison sur une solution dont personne ne veut, ou avoir raison trop tôt, c’est avoir tort.</text:p>
      <text:p text:style-name="P56">Avec les personnes, le bon sens a plus de valeur que la raison : plutôt que de forcer à changer un mode de fonctionnement, il est beaucoup plus <text:span text:style-name="T145">efficace de se demander pourquoi ils travaillent de cette manière : ça va éclairer beaucoup de choix et de zones d’ombre et ça permettra de poser les bases de ce qui est possible </text:span><text:span text:style-name="T161">ou</text:span><text:span text:style-name="T145"> inenvisageable avec chacune des équipes. Et, au-dessus de tout, il faut penser aux collaborateurs et à leurs conditions de travail, mais sans s’arrêter à leurs outils et processus, </text:span><text:span text:style-name="T161">tout </text:span><text:span text:style-name="T145">en prenant en compte leurs aspirations : qu’est-ce qui les fait lever le matin et rester le soir ? Est-ce que le mode de fonctionnement que je propose est en accord avec </text:span><text:span text:style-name="T161">leur</text:span><text:span text:style-name="T145"> rythme propre, en prenant en compte </text:span><text:span text:style-name="T161">leurs</text:span><text:span text:style-name="T145"> obligations familiales ou </text:span><text:span text:style-name="T161">leurs</text:span><text:span text:style-name="T145"> transports ? Et la liste est longue…</text:span></text:p>
      <text:p text:style-name="P57">Il ne faut pas croire que, si on prend en compte toutes ces contraintes, on va dégrader <text:span text:style-name="T146">l’efficacité des équipes et la performance des individus. C’est même tout le contraire, comme l’a démontré la pandémie récente. Il y a encore peu de temps, les dirigeants avaient une blague autour du télétravail : « le télétravail, c’est le travail devant la télé ! ».</text:span></text:p>
      <text:p text:style-name="P58">Une pandémie plus tard, ces mêmes dirigeants se sont rendu compte que le télétravail, c’était plutôt une aubaine, avec :</text:p>
      <text:list text:style-name="L10">
        <text:list-item>
          <text:p text:style-name="P257">des salariés qui font des journées de travail plus longues, démarrant plus tôt et finissant plus tard, sans contrainte de transport,</text:p>
        </text:list-item>
        <text:list-item>
          <text:p text:style-name="P257"><text:soft-page-break/>des salariés <text:span text:style-name="T161">plus </text:span>motivés et plus heureux car équilibrant mieux leur vie professionnelle et familiale,</text:p>
        </text:list-item>
        <text:list-item>
          <text:p text:style-name="P258">des coûts de fonctionnement qui se réduisent avec des besoins moins importants en locaux, chauffage, électricité…</text:p>
        </text:list-item>
        <text:list-item>
          <text:p text:style-name="P259">une facilité accrue pour assurer la continuité de service et la rotation des équipes…</text:p>
        </text:list-item>
      </text:list>
      <text:p text:style-name="P58">Tout le monde y a trouvé son compte. <text:span text:style-name="T161">C</text:span>’est une conception tellement rétrograde du travail de considérer que seuls les patrons ont envie de bosser et que les salariés sont des feignants ! C’est tellement méprisant et dévalorisant ! Et c’est complètement faux !</text:p>
      <text:p text:style-name="P58">Pendant la pandémie, si les Grands Groupes ont aussi bien tenu, c’est justement parce que les collaborateurs se sont défoncés pour faire tourner la baraque, même dans les conditions précaires du début, et ont fait le nécessaire pour faire le job quoi qu’il arrive. Et tout ça pour une reconnaissance très <text:span text:style-name="T147">relative, mais c’est une autre histoire…</text:span></text:p>
      <text:p text:style-name="P59">Il faut prendre en compte l’évolution des mentalités des salariés : la quête du sens des nouvelles générations percole peu à peu chez tous les collaborateurs et ils se donnent à fond dans leur travail, <text:span text:style-name="T161">dès qu’</text:span>on ne les considère pas uniquement comme des machines à produire. Malheureusement, les dirigeants <text:span text:style-name="T161">en place </text:span>ne sont pas de cette génération…</text:p>
      <text:h text:style-name="Heading_20_3" text:outline-level="3"><text:bookmark-start text:name="__RefHeading___Toc5813_463363166"/><text:soft-page-break/>Apporter de la valeur et regagner la confiance<text:bookmark-end text:name="__RefHeading___Toc5813_463363166"/></text:h>
      <text:p text:style-name="P59">Pour répondre <text:span text:style-name="T161">aux d</text:span>emandes <text:span text:style-name="T161">des collaborateurs</text:span>, il faut revoir la collaboration avec <text:span text:style-name="T161">eux</text:span>, en prenant en compte cette simple vérité : ils connaissent leur job et n’ont pas besoin d’une Transformation pour <text:span text:style-name="T161">l’effectuer correctement</text:span>. Il faut <text:span text:style-name="T161">donc</text:span> leur amener de la valeur, avec de nouvelles façons de travailler qui leur conviennent, dont ils ont besoin, et qu’ils sauront s’approprier.</text:p>
      <text:p text:style-name="P59">Une des <text:span text:style-name="T148">principales tendances des Transformations, c’est d’avoir des idées « en avance de phase sur les métiers », de les mettre en œuvre sous forme de solutions, alors qu’aucun besoin n’a été clairement exprimé, et ensuite de les imposer à des services qui n’en voient pas l’utilité pour leur quotidien. Ce n’est pas vraiment le meilleur moyen pour faciliter l’adhésion.</text:span></text:p>
      <text:p text:style-name="P72">Plutôt que de chercher à avoir raison, il faut revenir sur les bases du dialogue : convaincre sans asséner, expliquer sans contraindre. Encore une fois, le modèle français n’est pas le meilleur pour ça, que ce soit au niveau de la politique nationale <text:span text:style-name="T161">ou dans les</text:span> échanges intra-entreprise <text:span text:style-name="T161">avec les partenaires sociaux</text:span>.</text:p>
      <text:p text:style-name="P72">C’est d’ailleurs marrant de constater à quel point on peut être dans un double discours à ce niveau : toutes les formations de managers insistent sur la nécessité d’écoute et sur la « position basse » du manager, afin de fluidifier les échanges et minimiser les conflits. Bizarrement, ça ne concerne pas les dirigeants qui perpétuent le mode de management à l’ancienne où Dieu le Père décide et <text:soft-page-break/>où tout le monde doit se plier à des diktats. D’où un certain écartèlement sémantique et <text:span text:style-name="T149">positionnel pour le management intermédiaire…</text:span></text:p>
      <text:p text:style-name="P138"><text:span text:style-name="T125">A</text:span><text:span text:style-name="T124">u final, le secret de la réussite consiste très certainement à savoir se donner les moyens de réussir et ça veut d’abord dire prendre le temps de se poser et de réfléchir à comment régler les problèmes. Réforme après réforme, Transformation après Transformation, les changements se sont toujours faits dans l’urgence et les boulettes se sont accumulées. Il est grand temps de faire le ménage.</text:span></text:p>
      <text:h text:style-name="Heading_20_3" text:outline-level="3"><text:bookmark-start text:name="__RefHeading___Toc15754_4275570641"/>Épurer les dettes<text:bookmark-end text:name="__RefHeading___Toc15754_4275570641"/></text:h>
      <text:p text:style-name="P150"><text:span text:style-name="T27">V</text:span><text:span text:style-name="T19">oilà un sujet qui devrait pourtant parler à des dirigeants financiers, mais c’est justement le sujet qui est toujours abordé de la manière la plus maladroite : comment gérer les dettes techniques et financières et rénover convenablement les infrastructures ?</text:span></text:p>
      <text:p text:style-name="P151"><text:span text:style-name="T19">Côté dette financière, c’est plutôt un sujet sous contrôle, car on est vraiment dans le domaine de compétences des dirigeants. Côté dette technique, c’est nettement plus compliqué. D’abord, parce qu’il est très difficile de quantifier le montant de cette dette. </text:span><text:span text:style-name="T29">L’habitude de cacher systématiquement la poussière sous les tapis et la capacité incroyable des humains à oublier les mauvaises nouvelles qui n’ont pas été enregistrées quelque part font qu’il est à peu près impossible d’avoir une idée de l’effort et du coût nécessaires pour épurer les dettes techniques, au niveau de l’IT Legacy ou du Shadow IT.</text:span></text:p>
      <text:p text:style-name="P152"><text:soft-page-break/><text:span text:style-name="T19">Seuls des audits très pointus permettraient d’établir un premier tableau des dégâts. Mais alors rentre la dimension politique : comment justifier et conduire ces audits sans froisser des susceptibilités et désigner – indirectement ou directement – des coupables ? Lorsque les </text:span><text:span text:style-name="T28">habitudes de dissimulation </text:span><text:span text:style-name="T19">systématique sont tellement ancrées qu’elles sont entrées dans la culture de l’entreprise et font partie de la normalité, comment expliquer aux managers et aux collaborateurs que, en fait, c’était une erreur et qu’il va falloir tout reprendre ?</text:span></text:p>
      <text:p text:style-name="P152"><text:span text:style-name="T19">Le premier réflexe de toute équipe dans ces circonstances sera de se couvrir et, souvent, de mentir. C’est peut-être puéril, mais c’est une réaction naturelle : on le rencontre déjà autour de l’utilisation des données personnelles dans les différents services où, plutôt que d’admettre que certaines pratiques historiques (et souvent antérieures à la réglementation RGPD) sont à revoir, </text:span><text:span text:style-name="T30">les managers vont </text:span><text:span text:style-name="T59">émettre</text:span><text:span text:style-name="T30"> une fin de non-recevoir et déclarer que tout va bien dans le meilleur des mondes. Circulez, y’a rien à voir !</text:span></text:p>
      <text:p text:style-name="P158"><text:span text:style-name="T19">Ça ne résout pas le problème et ça garde la poussière au chaud sous le tapis. Répété à l’échelle de l’entreprise, ça fait plein de tas de poussière au chaud sous plein de tapis. Ça s’accumule et ça chauffe. Et, comme tout matériel un peu radioactif qui s’accumule et qui chauffe, on risque doucement d’atteindre la masse critique qui fait que ça explose. </text:span><text:span text:style-name="T31">Un audit réglementaire constitue un très bon détonateur. Et dans ce cas-là, il n’y aura plus de scrupule à rechercher des coupables : la chasse aux sorcières sera ouverte et des têtes vont tomber !</text:span></text:p>
      <text:p text:style-name="P50"><text:soft-page-break/>Il est donc indispensable de réaliser ces audits direction par direction, service par service, sans se contenter de prendre pour vérité absolue <text:span text:style-name="T162">les</text:span> déclarations <text:span text:style-name="T162">des responsables d’équipe</text:span>, mais en « soulevant les capots » et en assistant à la réalité des travaux des équipes, en mode « vis ma vie ». C’est une phase longue et laborieuse, mais indispensable pour à la fois quantifier les travaux à réaliser, mais aussi les prioriser en fonction du risque encouru.</text:p>
      <text:p text:style-name="P50">Une fois ce premier bilan effectué, il faudra réaliser ces travaux de façon progressive et itérative, fonction critique par fonction critique, en donnant le temps de réfléchir et de faire, <text:span text:style-name="T162">tout </text:span>en s’appuyant sur les nouvelles capacités technologiques offertes par l’IT, mais surtout en s’inquiétant très tôt des éventuels impacts à long terme des choix technologiques.</text:p>
      <text:p text:style-name="P66">Ensuite, au niveau des stratégies à déployer pour s’affranchir des dettes, il va falloir arrêter de croire que seules les approches en mode Big Bang, avec un calendrier hyper contraint et des échéances absolues, sont envisageables : la pression constante empêche de prendre le temps de concevoir et oblige à prendre des raccourcis, pour respecter les délais ou le budget et interdit de se donner une cible cohérente.</text:p>
      <text:h text:style-name="P153" text:outline-level="3"><text:bookmark-start text:name="__RefHeading___Toc5817_463363166"/>Prendre le temps de changer<text:bookmark-end text:name="__RefHeading___Toc5817_463363166"/></text:h>
      <text:p text:style-name="P155"><text:span text:style-name="T19">Sans entrer dans une démarche d’économie planifiée à la mode soviétique, les plans stratégiques </text:span><text:soft-page-break/><text:span text:style-name="T19">récurrents des Grands Groupes </text:span><text:span text:style-name="T32">fonctionnent tous suivant le même schéma : comment changer un maximum de trucs en un temps limité (en général cinq ans) et avec un budget limité ?</text:span></text:p>
      <text:p text:style-name="P159"><text:span text:style-name="T19">Pourquoi imposer un temps limité ? Et pourquoi s’obliger de changer autant de choses dans ce délai contraint ? D’une part, certaines choses ne peuvent pas changer sur un délai aussi court et, d’autre part, à </text:span><text:span text:style-name="T33">vouloir courir plusieurs lièvres à la fois, on fait des amalgames et on ne traite pas forcément les sujets dans leur complexité.</text:span></text:p>
      <text:p text:style-name="P51">Un plan stratégique, c’est conduit <text:span text:style-name="T162">ainsi</text:span> la plupart du temps :</text:p>
      <text:list text:style-name="L11">
        <text:list-item>
          <text:p text:style-name="P260">une phase de communication au lancement du plan, qui peut prendre jusqu’à six mois,</text:p>
        </text:list-item>
        <text:list-item>
          <text:p text:style-name="P260">une phase de « cadrage stratégique » avec les cabinets de conseil et les dirigeants, en mode plus ou moins opaque, et qui peut s’étendre jusqu’à dix-huit mois,</text:p>
        </text:list-item>
        <text:list-item>
          <text:p text:style-name="P260">le lancement du plan stratégique proprement dit, officiellement sur cinq ans, mais déjà réduit mécaniquement à trois pour la phase de réalisation,</text:p>
        </text:list-item>
        <text:list-item>
          <text:p text:style-name="P260">la phase de « Big Bang » qui va déstabiliser l’entreprise pendant une bonne année, le temps de mettre les rustines et les pansements pour que tout refonctionne,</text:p>
        </text:list-item>
        <text:list-item>
          <text:p text:style-name="P260">la phase de Transformation véritable, mais qui va devoir composer avec les dépassements budgétaires et calendaires de toutes les phases précédentes et qui, à cause de la <text:soft-page-break/>gestion de la dette omniprésente, se réduit à une peau de chagrin par rapport aux ambitions initiales,</text:p>
        </text:list-item>
        <text:list-item>
          <text:p text:style-name="P260">la phase de communication post-mortem où on se <text:span text:style-name="T162">félicite</text:span> de toutes les réalisations, aussi modestes soient-elles, et où on va soigneusement cacher les nouveaux tas de poussière sous les tapis…</text:p>
        </text:list-item>
      </text:list>
      <text:p text:style-name="P155"><text:span text:style-name="T33">Pourtant, dans tous les concepts pompeux portés par les cabinets de conseil, il y en a un qui a vraiment du sens : </text:span><text:span text:style-name="T19">le changement permanent. </text:span><text:span text:style-name="T38">Bizarrement</text:span><text:span text:style-name="T34">, c’est celui qui est le plus rarement appliqué. La société, les technologies, les hommes évoluent continuellement et, si on peut identifier </text:span><text:span text:style-name="T92">a posteriori</text:span><text:span text:style-name="T34"> des moments clés où il se passe plus de choses qu’à d’autres, il n’y a aucune raison que ces moments s’accordent avec le timing du plan de Transformation…</text:span></text:p>
      <text:p text:style-name="P160"><text:span text:style-name="T19">Revoir la vision stratégique à intervalle régulier est </text:span><text:span text:style-name="T35">bien entendu nécessaire pour actualiser la direction à prendre. Mais pourquoi s’imposer de </text:span><text:span text:style-name="T36">tout transformer de la cave au grenier dans le même temps ?</text:span></text:p>
      <text:p text:style-name="P161"><text:span text:style-name="T59">D</text:span><text:span text:style-name="T19">ans ce genre d’approche non disruptive, il faut complètement revoir la façon dont on gère les budgets et les investissements, </text:span><text:span text:style-name="T39">afin de</text:span><text:span text:style-name="T19"> prévoir des enveloppes pluriannuelles, constantes et sanctuarisées, </text:span><text:span text:style-name="T37">pour financer ces travaux. Mais affecter des enveloppes constantes, ça ne veut pas dire non plus que c’est open-bar pour faire n’importe quoi, n’importe quand. Il faut que ces dépenses </text:span><text:soft-page-break/><text:span text:style-name="T37">soient liées à de vrais travaux de </text:span><text:span text:style-name="T38">T</text:span><text:span text:style-name="T37">ransformation </text:span><text:span text:style-name="T38">s’inscrivant dans une vraie trajectoire technique et organisationnelle portée par un schéma directeur clairement défini.</text:span></text:p>
      <text:p text:style-name="P174"><text:span text:style-name="T19">Il est </text:span><text:span text:style-name="T40">rarissime</text:span><text:span text:style-name="T19"> que ces prérequis soient disponibles </text:span><text:span text:style-name="T41">dans les grandes organisations. </text:span><text:span text:style-name="T42">On peut même dire que ces travaux préparatoires font rarement partie des priorités, car ça demande à envisager une nouvelle organisation budgétaire et un nouveau mode de gouvernance de l’IT. Les mammouths sont tellement gros à dégraisser qu’il paraît souvent plus simple de lancer une Transformation </text:span><text:span text:style-name="T43">bille en tête. Certainement à tort, mais difficile à juger : personne ne s’est lancé dans une réorganisation budgétaire complète. C’est certainement le nouvel axe à creuser, vu que la piste des Transformations à outrance a montré ses limites.</text:span></text:p>
      <text:p text:style-name="P175"><text:span text:style-name="T19">On pourrait encore une fois s’inspirer de ce que font nos copains croquemitaines des GAFAM : </text:span><text:span text:style-name="T59">s’attacher à</text:span><text:span text:style-name="T56"> définir un modèle analytique des coûts orienté client. Chaque client interne de la Transformation et de l’IT doit pouvoir choisir, dans un catalogue de services adapté et actualisé, les services auxquels il va vouloir s’abonner, ainsi que leur coût unitaire.</text:span></text:p>
      <text:p text:style-name="P67">Encore une fois, c’est du bon sens. Et cette approche est souvent proposée en début de Transformation, mais systématiquement abandonnée en cours de route. Tout simplement parce que c’est trop compliqué. Personne ne sait comment reprendre le modèle budgétaire existant et le refondre dans un modèle plus simple : la complexité existante est telle que personne ne comprend vraiment comment ça fonctionne !</text:p>
      <text:p text:style-name="P67"><text:soft-page-break/>Malheureusement, ce n’est pas le seul problème qu’on ne sait pas encore résoudre et, avant de pouvoir vraiment réparer la panne, et il va falloir inventer une nouvelle méthode pour la réparer : c’est un peu comme vouloir changer tous les trains roulants d’un TGV lancé à pleine vitesse, sans avoir le droit d’arrêter le train…</text:p>
      <text:h text:style-name="P157" text:outline-level="3"><text:bookmark-start text:name="__RefHeading___Toc15756_4275570641"/><text:span text:style-name="T121">A</text:span>pprendre à décommissionner<text:note text:id="ftn55" text:note-class="footnote"><text:note-citation>55</text:note-citation><text:note-body><text:p text:style-name="Footnote">En informatique, “décommissionner” fait référence au processus de mise hors service ou de retrait d’un système, d’un logiciel, d’un matériel ou d’une infrastructure informatique, généralement en raison de son obsolescence, de sa non-utilisation, de son remplacement ou de sa désactivation planifiée.</text:p></text:note-body></text:note><text:bookmark-end text:name="__RefHeading___Toc15756_4275570641"/></text:h>
      <text:p text:style-name="P52">Voilà une <text:span text:style-name="T143">autre </text:span>réflexion de fond à conduire dans de nombreuses organisations : comment va-t-on se débarrasser un jour des différentes couches du mille-feuille ? Ou, plus pragmatiquement, comment va-t-on le simplifier en supprimant suffisamment de couches pour que le système redevienne gérable, techniquement et financièrement ?</text:p>
      <text:p text:style-name="P53">Parce que, dans l’état actuel des connaissances et des méthodes, on se trouve, avec le décommissionnement des SI historiques au sein des services financiers, confrontés au même type de problématique que dans la filière nucléaire avec le démantèlement des centrales : on sait qu’il faut le faire, mais personne ne sait réellement comment faire. En fait, quand on a commencé en empiler les couches, personne ne s’est dit un jour : « Eh, mollo les gars, faudra les démonter plus tard ! ».</text:p>
      <text:p text:style-name="P68"><text:soft-page-break/>Ce qui est la preuve d’une évolution dans la mentalité de l’ingénieur et de l’ingénierie en général : lorsque Gustave Eiffel a construit la Tour Eiffel, il a intégré dans la structure même de la tour tous les éléments permettant de la démonter. Certes la Tour Eiffel était à l’origine une structure temporaire destinée à ne pas survivre à l’exposition universelle de 1889, mais qu’est ce qui a pu faire croire aux ingénieurs informatiques des années 2000 que leurs réalisations n’auraient jamais besoin d’être démontées plus tard ? En fait, personne n’a dû se poser la question dans ce sens : on leur a demandé de construire un truc. Ils ont construit un truc. Point barre, et on passe à la suite.</text:p>
      <text:p text:style-name="P165"><text:span text:style-name="T44">D</text:span><text:span text:style-name="T19">ans le cas qui nous intéresse, pour les SI des Grands Groupes financiers, il </text:span><text:span text:style-name="T59">faudrait</text:span><text:span text:style-name="T19"> développer complètement une nouvelle méthodologie et de la tester « en live et sans filet » en mode d’apprentissage itératif, en se laissant le droit à l’erreur et la possibilité de revenir en arrière. Actuellement, personne ne sait faire. Dans aucune société ou aucune ESN, personne n’a jamais tenté ce genre de folie. Quant à la réussir…</text:span></text:p>
      <text:p text:style-name="P167"><text:span text:style-name="T19">Vu la complexité et l’hétérogénéité des SI financiers actuels, il serait assez illusoire d’espérer faire comme les GAFAM et remettre toutes les fonctionnalités dans un tout nouveau SI tout beau, tout propre. Ça n’aurait pas spécialement de sens au niveau fonctionnel, et ça ne se justifierait pas au niveau technique non plus : les couches les plus basses des systèmes de gestion, sur base des technologies COBOL, sont conçues pour durer et peuvent encore fonctionner très bien pendant des décennies. En plus, elles sont optimisées pour </text:span><text:soft-page-break/><text:span text:style-name="T19">réaliser justement ces travaux de gestion. Les couches les plus récentes sont pour la plupart en cours </text:span><text:span text:style-name="T47">d’exploitation et en amélioration continue ; en plus ce sont elles qui offrent les niveaux de performance les plus élevés. Il n’y a donc pas de raison de les décommissionner de suite. Mais c’est du bon sens : on ne va pas mettre à la poubelle notre matériel le plus </text:span><text:span text:style-name="T59">récent !</text:span></text:p>
      <text:p text:style-name="P168"><text:span text:style-name="T19">C’est au niveau du patchwork des couches intermédiaires que le problème du décommissionnement est le plus crucial : c’est à ce niveau qu’il faut décider de quelles technologies on se sépare et lesquelles on conserve. Au niveau fonctionnel, ce sera également l’occasion d’un « grand ménage de printemps » pour revoir tour le code des applications à migrer, éliminer le code mort</text:span><text:span text:style-name="T19"><text:note text:id="ftn56" text:note-class="footnote"><text:note-citation>56</text:note-citation><text:note-body><text:p text:style-name="Footnote">Le code mort en informatique est du code qui n’est plus utilisé ou maintenu, mais qui reste présent dans un système ou une application. Il peut causer des problèmes de maintenance, de performance, de sécurité et d’évolutivité, et nécessite une gestion appropriée pour éviter les complications futures.</text:p></text:note-body></text:note></text:span><text:span text:style-name="T19"> et optimiser les traitements à conserver. C’est aussi l’occasion rêvée de rétro-documenter et de mettre en place tous les principes du Data Management, mais c’est une autre histoire…</text:span></text:p>
      <text:p text:style-name="P166"><text:span text:style-name="T47">Le travail est colossal et c</text:span><text:span text:style-name="T19">’est certainement le grand enjeu de la prochaine décennie : trouver une vraie méthode </text:span><text:span text:style-name="T46">sure et répétable </text:span><text:span text:style-name="T19">pour réaliser ce décommissionnement massif. Il est certain que </text:span><text:span text:style-name="T45">l’IA devra être mise à contribution pour accompagner la migration des anciennes technologies vers les nouvelles, mais en restant humble sur ce recours à la </text:span><text:soft-page-break/><text:span text:style-name="T45">technologie. On a déjà vu que, par le passé, l’outil miracle n’a jamais existé ; il n’y a aucune raison pour </text:span><text:span text:style-name="T46">que l’IA le devienne, du moins à court ou moyen terme.</text:span></text:p>
      <text:p text:style-name="P166"><text:span text:style-name="T48">Toutefois, é</text:span><text:span text:style-name="T46">tant donné que </text:span><text:span text:style-name="T47">l</text:span><text:span text:style-name="T48">es deux principaux écueils de ce genre de chantier résident d’une part dans le portage des fonctionnalités (et donc la réécriture complète du code dans une nouvelle technologie) et d’autre part dans la re-certification des fonctionnalités migrées, il semble opportun de s’appuyer sur des capacités d’Intelligence Artificielle dès qu’elles seront disponibles, pour analyser le code existant et regénérer un nouveau code fiable dans la nouvelle technologie. C’est certainement une des applications les plus prometteuses des IA génératives actuellement.</text:span></text:p>
      <text:h text:style-name="P156" text:outline-level="3"><text:bookmark-start text:name="__RefHeading___Toc4573_3306677465"/>Dissiper les ombres<text:bookmark-end text:name="__RefHeading___Toc4573_3306677465"/></text:h>
      <text:p text:style-name="P169"><text:span text:style-name="T45">L</text:span><text:span text:style-name="T19">e Shadow IT, cet épouvantail ! </text:span><text:span text:style-name="T60">Mais d</text:span><text:span text:style-name="T19">ans ce cas, le problème n’est pas technique : nous ne sommes pas en attente d’une évolution technologique majeure pour affronter le problème. Techniquement, on dispose déjà des hommes et des compétences pour reprendre les applications du Shadow et les retranscrire dans les technologies actuelles de l’IT. </text:span><text:span text:style-name="T49">Et on dispose déjà des méthodologies pour le faire. Donc, on sait faire.</text:span></text:p>
      <text:p text:style-name="P69">C’est juste que ça va coûter un bras. Ou deux. Et les deux jambes avec. L’existant applicatif du Shadow IT produit par les métiers au cours des décennies est simplement colossal : on parle de centaines de milliers de lignes de code et de téraoctets de données. Tout passer en revue, <text:soft-page-break/>analyser, réécrire suivant les normes IT et remettre en conformité va prendre des années. À partir du moment où on aura fait un premier audit permettant de cibler les travaux prioritaires. Parce que le danger rode !</text:p>
      <text:p text:style-name="P170"><text:span text:style-name="T19">En effet, ce Shadow IT est une mine de non-conformités réglementaires, en particulier vis-à-vis de la réglementation RGPD : beaucoup des traitements qui y sont réalisés sont antérieurs à la réglementation RGPD et n’appliquent pas ses principes sur l’utilisation des données personnelles, en particulier les principes de minimisation ou de purge. On peut même affirmer sans crainte de se tromper que de nombreux nouveau</text:span><text:span text:style-name="T60">x</text:span><text:span text:style-name="T19"> traitements développés récemment sont également non-conformes, à cause d’habitudes de travail </text:span><text:span text:style-name="T50">néfastes et de la méconnaissance de la réglementation dans les équipes. Mais nul n’est censé ignorer la Loi…</text:span></text:p>
      <text:p text:style-name="P70">La CNIL en est parfaitement consciente et c’est généralement le Shadow IT qu’elle cible en priorité quand elle vient faire ses visites de courtoisie dans les Grands Groupes.</text:p>
      <text:p text:style-name="P171"><text:span text:style-name="T19">Donc, si on récapitule : on dispose des compétences, on dispose des technologies et des méthodes et le risque est parfaitement identifié et avéré. Pourquoi </text:span><text:span text:style-name="T51">ne le fait-on pas massivement partout alors ?</text:span></text:p>
      <text:p text:style-name="P172"><text:span text:style-name="T19">Comme souvent, la réponse principale est politique. Les services et directions qui ont développé ces applications critiques en Shadow IT </text:span><text:span text:style-name="T52">ont également </text:span><text:span text:style-name="T53">hérité d’un important pouvoir, du fait </text:span><text:soft-page-break/><text:span text:style-name="T53">même qu’ils sont les seuls à pouvoir utiliser ces applications, les maintenir et produire les résultats attendus. Ça </text:span><text:span text:style-name="T54">se traduit souvent par un chantage plus ou moins amical et une absolue liberté de mouvement et de décision pour ces services. On n’abandonne pas ce genre de pouvoir par gaîté de cœur. Il faut vraiment que la charge de maintenance soit trop élevée, comme on l’a vu avant, ou que la prise de conscience autour du risque réglementaire devienne intolérable, pour l’abandonner. Et, concernant cette prise de conscience, on est encore loin du compte…</text:span></text:p>
      <text:p text:style-name="P173"><text:span text:style-name="T19">Après, se pose forcément la question du coût de ce genre de chantier : j’ai déjà expliqué qu’il allait falloir tout réécrire dans les normes et standards de l’IT, en en profitant pour faire une revue du code et des fonctionnalités, ainsi qu’une mise en conformité réglementaire, en particulier RGPD. </text:span><text:span text:style-name="T55">Et il faudra ensuite tout faire re-certifier par les régulateurs et les organismes de contrôle…</text:span></text:p>
      <text:p text:style-name="P71">Encore une fois, ça représente des dizaines de millions d’euros pour chaque entreprise concernée. Ça refroidit pas mal les ardeurs. Mais, comme toujours, il faut analyser le problème par le prisme du coût du risque : que représentent quelques dizaines de millions d’euros face à une amende qui se chiffre en milliards ?</text:p>
      <text:p text:style-name="P71">Sauf qu’aucune entreprise en Europe ne s’est pour l’instant fait sanctionner à cette hauteur, à la différence des USA où ce genre de sanction est devenu presque courant. Par contre, dès que ça va se produire pour la première fois, on est à peu près sûr que toutes les entreprises du secteur vont lancer la Grande Lessive tous en même temps. Et on peut <text:soft-page-break/>s’attendre à une nouvelle pénurie sur tous les profils indispensables pour ce genre de travaux !</text:p>
      <text:p text:style-name="P64">Enfin, ces travaux de réappropriation ne peuvent pas se réaliser en l’absence des métiers qui ont conçu ces applications : lire et analyser le code, c’est comprendre le comment ; échanger avec les métiers qui ont produit ce code, c’est comprendre le pourquoi. Et comme je l’ai déjà dit, ces métiers sont rares, sur-sollicités et très peu disponibles.</text:p>
      <text:p text:style-name="P63">Donc, si on ne veut pas mettre en péril la production de leurs résultats, il va falloir être patient et s’accorder sur leur calendrier : dans ce cas, il ne servira à rien de renforcer les équipes, vu que la connaissance n’est que dans la tête d’un petit nombre. Une blague d’informaticien dit : « ce n’est pas en embauchant neuf femmes qu’on fait un bébé en un mois… ».</text:p>
      <text:h text:style-name="P181" text:outline-level="3"><text:bookmark-start text:name="__RefHeading___Toc36926_312545618"/>Un <text:span text:style-name="T179">nouveau</text:span> plancher de verre<text:bookmark-end text:name="__RefHeading___Toc36926_312545618"/></text:h>
      <text:p text:style-name="P183"><text:span text:style-name="T180">Pour revenir sur le sujet de la conformité réglementaire et sur les attitudes constatées chez certains dirigeants, on peut s’étonner de ce type de comportement et on pourrait tout de suite monter sur ses grands chevaux en déclament que tous ces grands financiers sont des criminels par nature. </text:span>Alors que, quand on s’interroge objectivement sur ce type de comportement de rejet du réglementaire, en désignant les fonctions régaliennes comme bouc émissaire, ça traduit en fait un nouveau plancher de verre qui est en train de se créer où <text:span text:style-name="T178">les dirigeants ne prennent pas le temps de comprendre des </text:span><text:soft-page-break/><text:span text:style-name="T178">problématiques qui sont par essence d’une ext</text:span><text:span text:style-name="T62">rême complexité et s’opposent à leurs décisions. L’habitude de décider en mode « je veux et j’exige » est complètement incompatible avec l’esprit actuel des grandes réglementations européennes autour de la Data.</text:span></text:p>
      <text:p text:style-name="P86">En effet, à la différence de l’industrie, les métiers de la Finance ont toujours travaillé sans contrainte : étant donné qu’ils étaient à la fois les gardiens des cordons de la bourse et les développeurs du business, ils ont toujours défini librement ce qu’ils voulaient faire, dans quelle direction ils voulaient aller et comment. Dans l’industrie, quel que soit le modèle évolutif ou disruptif inventé, la capacité de développement est toujours limitée par le coût que ça représente et le seuil de rentabilité entre l’investissement et les gains potentiels : on travaille alors en système contraint et les possibles innovations ne peuvent se faire qu’à l’intérieur d’un champ de contraintes défini.</text:p>
      <text:p text:style-name="P184"><text:span text:style-name="T19">C’est d’ailleurs dans ce genre de conditions qu’on devient innovant et c’est une des bases de toute démarche de développement de l’innovation dans les entreprises maintenant : définir le champ de contraintes initial et s’en servir de postulat de départ. Or, bizarrement, dans le monde de la Finance, le contexte réglementaire est très rarement </text:span><text:span text:style-name="T64">pris en compte</text:span><text:span text:style-name="T19"> à l’origine : c’est l’idée business qui prime. La Conformité et le Juridique sont généralement consultés à la fin, pour </text:span><text:span text:style-name="T63">valider les projets. Et donc malheureusement trop souvent pour les retoquer lorsque les directions prises sont illicites !</text:span></text:p>
      <text:p text:style-name="P73">Le bon sens voudrait de travailler d’abord autour du champ des contraintes réglementaires et <text:soft-page-break/>juridiques, afin de déterminer de façon claire et jurisprudentielle ce qui est autorisé et ce qui est interdit. Une fois définies les limites et les règles régissant ce terrain de jeu du business, on se doit de communiquer et de former consciencieusement toutes les parties prenantes, en commençant par le top management, et alors seulement on peut laisser libre court à la créativité et à l’inventivité des métiers pour créer de nouvelles façons de faire de l’argent et de développer leur activité.</text:p>
      <text:p text:style-name="P73">Pourtant, ce n’est pas la première fois qu’on met la charrue devant les bœufs et que le bon sens a été relégué sur le banc de touche. Le sujet commence à poindre son nez autour des problématiques réglementaires, <text:span text:style-name="T181">malgré le fait qu’</text:span>on a déjà une bonne expérience de ce genre de pratiques insensées autour des sujets technologiques. Mais l’humain apprend finalement peu de ses erreurs…</text:p>
      <text:h text:style-name="Heading_20_3" text:outline-level="3"><text:bookmark-start text:name="__RefHeading___Toc36928_312545618"/>Que savent <text:span text:style-name="T180">vraiment </text:span>les dirigeants ?<text:bookmark-end text:name="__RefHeading___Toc36928_312545618"/></text:h>
      <text:p text:style-name="P74">Et c’est peut-être là le sujet central, le nœud du problème. Qui sait quoi ? Que savons-nous, qu’avons-nous appris et que devons-nous apprendre ?</text:p>
      <text:p text:style-name="P65"><text:span text:style-name="T180">On a vu que, </text:span><text:span text:style-name="T182">entre les évolutions technologiques et réglementaires, l’habitude ancrée de ne pas remonter de mauvaises nouvelles qui pourraient mettre en danger les messagers et la simplification sémantique chronique des informations qui leur sont remontées, les dirigeants se trouvent </text:span><text:soft-page-break/><text:span text:style-name="T182">obligés de composer avec des informations de plus en plus parcellaires, mais sans qu’ils aient foncièrement conscience du caractère </text:span><text:span text:style-name="T183">édulcoré des informations qu’ils manipulent. </text:span><text:span text:style-name="T184">Sachant que c’est déjà le cas pour les informations du quotidien servant à diriger leur entreprise, on peut se poser également la question de leur niveau de connaissance des problématiques globales qu’ils ont à gérer.</text:span></text:p>
      <text:p text:style-name="P75">On a vu que, côté technologie et juridique, le problème <text:span text:style-name="T189">est</text:span> certainement le plus critique : les dirigeants de la Finance ne sont ni des juristes ni des techniciens et ne disposent pas du bagage nécessaire pour comprendre facilement les cas de plus en plus complexes à traiter. <text:span text:style-name="T185">Leur formation initiale n’a jamais abordé ces facettes : ce sont des financiers pour la plupart, passés par les écoles de Finance ou de Management. Il est rare que, dans leur parcours professionnel, ils se soient attardés sur ces problématiques, du fait de cette distanciation dont j’ai déjà parlé par rapport aux sujets technologiques d’une part et de la nouveauté des sujets juridiques autour de la Data d’autre part.</text:span></text:p>
      <text:p text:style-name="P76">Donc ils ne comprennent pas parce qu’ils n’ont pas appris et qu’ils n’ont jamais été suffisamment confrontés aux sujets pour acquérir un minimum de vernis. <text:span text:style-name="T186">Ce n’est pas exceptionnel et c’est le lot de la plupart des salariés : depuis leur formation initiale, les choses ont évolué et il faut mettre à jour les connaissances et les compétences. En général, on peut aborder cette remise à niveau par deux approches : la formation ou l’auto-formation. Si la formation peut être dispensée dans le cadre professionnel, elle est conditionnée, au même titre que l’auto-formation, au temps disponible que le </text:span><text:soft-page-break/><text:span text:style-name="T186">salarié va accorder à sa montée en compétences. Pour certaines catégories de collaborateurs passionnés, </text:span><text:span text:style-name="T187">en particulier sur les métiers de la Data, </text:span><text:span text:style-name="T186">l’auto-formation </text:span><text:span text:style-name="T187">est partie intégrante de la fonction et ne peut pas être dissociée du reste des activités.</text:span></text:p>
      <text:p text:style-name="P77">Pour les dirigeants, c’est différent. Ils n’abordent généralement pas le problème de façon simple en se disant : « Voilà un nouveau sujet que je ne connais pas, est-ce que ça ne vaudrait pas le coup que je me forme ou que je me renseigne ? Ça pourrait avoir des impacts sur mon activité, sait-on jamais… »</text:p>
      <text:p text:style-name="P77">Parce que tout d’abord ils n’ont pas forcément conscience de la complexité des sujets, par la simplification outrancière qui leur en a été trop souvent faite. En plus, c’est souvent associé aux sujets « vulgaires »(techniques ou juridiques) pour lesquels ils n’ont aucune appétence et qui sont <text:span text:style-name="T188">très fortement dévalorisés à leurs yeux, pour ne pas dire plus. Enfin, les agendas constamment surchargés de ces dirigeants les rendent très peu accessibles aux formations, tout simplement parce qu’ils n’ont pas de temps matériel à y consacrer.</text:span></text:p>
      <text:p text:style-name="P78">D’un autre côté, il y a également un vrai problème de posture vis-à-vis des pairs : <text:span text:style-name="T189">étant donné le long héritage de possession d’informations « privilégiées », il est très délicat d’annoncer aux autres </text:span><text:span text:style-name="T190">dirigeants du même groupe ou à ses subordonnés directs (et donc susceptibles de prendre sa place en cas de faiblesse) sa complète incompréhension de ce type de problématique. Il vaut mieux ne pas montrer ses lacunes et affecter de </text:span><text:soft-page-break/><text:span text:style-name="T190">jouer le rôle de celui qui sait. Malheureusement, le jeu des trônes dans les sphères supérieures se résume souvent à un concours de celui qui pisse le plus loin et faire semblant de comprendre est souvent suffisant, pour assurer sa place face à ses prétendants.</text:span></text:p>
      <text:p text:style-name="P79">Malheureusement, ça ne suffit pas lorsqu’il faut prendre une décision cruciale pour l’entreprise, sur des sujets préparés et présentés par des experts qui, eux, connaissent parfaitement le sujet et ses implications. C’est là que le voile se déchire et que l’expert rencontre de grands moments de solitude. <text:span text:style-name="T191">En fait, face à n’importe quel sujet, il n’existe que trois types de personnes : celles qui savent, celles qui ne savent pas et celles qui croient savoir (ou font semblant de savoir). Les deux premières catégories sont faciles à gérer : il suffit de vérifier que les personnes de la première </text:span><text:span text:style-name="T192">catégorie ont les bonnes bases et leur faire une grosse piqûre de rappel ; tandis que pour les personnes de la seconde catégorie, il faut réaliser une formation complète pour qu’ils apprennent tout ce qui leur sera nécessaire de savoir pour leur activité.</text:span></text:p>
      <text:h text:style-name="Heading_20_3" text:outline-level="3"><text:bookmark-start text:name="__RefHeading___Toc36930_312545618"/>Le coût de l’ignorance<text:bookmark-end text:name="__RefHeading___Toc36930_312545618"/></text:h>
      <text:p text:style-name="P80">Ceux qui croient savoir, quant à eux, représentent un vrai défi : soit ils <text:span text:style-name="T193">sont vraiment de bonne foi et pensent réellement que leurs activités </text:span><text:span text:style-name="T194">sont à l’État de l’Art – alors qu’ils sont complètement en décalage avec les Bonnes Pratiques à mettre en place – soit ils essaient de convaincre les autres – et eux-mêmes – qu’ils maîtrisent parfaitement les nouveaux concepts à mettre en œuvre. Dans les deux cas, ces attitudes sont catastrophiques, parce </text:span><text:soft-page-break/><text:span text:style-name="T194">qu’elles sont basées sur l’égo des individus : admettre qu’on ne sait pas ou qu’on n’est pas aussi top moumoute qu’on le pensait demande une humilité qui n’est pas toujours là. Et la démarche de réapprentissage doit passer d’abord par une phase de désapprentissage.</text:span></text:p>
      <text:p text:style-name="P81">En général, les dirigeants ne manquent pas d’égo. C’est même une de leurs caractéristiques premières. <text:span text:style-name="T195">Et l’humilité n’est pas forcément leur principale qualité. On est donc rarement face au meilleur public pour avoir </text:span><text:span text:style-name="T196">une</text:span><text:span text:style-name="T195"> attitude </text:span><text:span text:style-name="T196">constructive </text:span><text:span text:style-name="T195">face aux nouvelles problématiques dont on parlait plus haut. Car </text:span><text:span text:style-name="T197">les nouveaux enjeux autour de la Data demandent de nouvelles armes et de nouvelles approches ; et ce sont les dirigeants qui doivent insuffler de nouvelles dynamiques et les sponsoriser.</text:span></text:p>
      <text:p text:style-name="P82">À condition qu’ils en soient conscients et qu’ils sachent à peu près de quoi ça parle. Or nous avons vu que ce n’était pas forcément le cas. <text:span text:style-name="T198">Et cette méconnaissance des enjeux et de la difficulté des sujets a des effets pervers plutôt inquiétants : comme je l’ai indiqué, les dirigeants ne comprennent pas et ne s’intéressent pas aux sujets Data, en les ignorant et en les </text:span><text:span text:style-name="T199">sous-estimant. </text:span><text:span text:style-name="T200">Comme ils</text:span><text:span text:style-name="T199"> ne sont pas </text:span><text:span text:style-name="T200">non plus disponibles pour </text:span><text:span text:style-name="T201">consacrer une ou deux demi-journées à des séances d’acculturation ou de formation sur les principes de base associés à la Data, leur niveau de sensibilisation sur ces problématiques n’évolue pas. Au contraire même, on assiste à un effet contraire particulièrement vicieux : comme ils ne comprennent pas l’intérêt pour eux de ce genre de formation, c’est en pratique le premier </text:span><text:soft-page-break/><text:span text:style-name="T201">poste qui sera arbitré lors des inévitables rabotages budgétaires de mi-année.</text:span></text:p>
      <text:p text:style-name="P83">C’est ainsi que, en ce qui me concerne, ça fait trois ans que je propose tous les ans de jolies sessions d’acculturation à la Data spécialement conçues pour le top management qui se retrouvent consciencieusement éradiquées au premier arbitrage budgétaire de l’année. Dans le même temps, ce même top management va proposer chaque année son lot de projets irréalisables qu’il va falloir retoquer parce qu’illicites et irréalisables. Des centaines de milliers d’euros sont encore dépensés pour essayer de rendre les projets conformes, souvent en pure perte, alors qu’il suffirait seulement de rester dans les limites autorisées pour pouvoir utiliser à fond les nouvelles opportunités ouvertes par la Data.</text:p>
      <text:p text:style-name="P85">J’ai ciblé particulièrement les dirigeants autour de la Data parce que sur ce domaine, à part de très rares exceptions, on peut se faire plaisir à tirer sur l’ambulance. Mais il ne faut pas croire que le reste des entreprises financières soient beaucoup mieux loti : la culture Data est au mieux très jeune, avec un peu de chance balbutiante, mais plus généralement complètement absente dans les différents services des Grands Groupes financiers. Ils n’ont globalement pas encore franchi le pas de la Data et présentent encore de graves lacunes par rapport aux nouvelles réglementations, y compris RGPD, sans même parler des nouvelles réglementations à venir.</text:p>
      <text:p text:style-name="P84">Même les services du Juridique et de la Conformité sont le plus souvent démunis face à des réglementations très complexes pour lesquelles ils ne disposent que très peu de véritables experts : le droit de la Data est complexe et spécifique et les juristes <text:soft-page-break/>spécialisés sont rares. Et la pénurie ne va faire que s’accentuer avec l’arrivée des nouvelles réglementations européennes, <text:span text:style-name="T202">une nouvelle fois…</text:span></text:p>
      <text:h text:style-name="P109" text:outline-level="3"><text:bookmark-start text:name="__RefHeading___Toc14111_3306677465"/>Et notre autru<text:span text:style-name="T201">c</text:span>he dans tout ça ?<text:bookmark-end text:name="__RefHeading___Toc14111_3306677465"/></text:h>
      <text:p text:style-name="P60">Il peut sembler incongru que, dans les Grands Groupes financiers, <text:span text:style-name="T180">des</text:span> sujet<text:span text:style-name="T180">s</text:span> aussi fondamentaux que la Dette <text:span text:style-name="T180">ou la Conformité Réglementaire </text:span>soi<text:span text:style-name="T180">en</text:span>t aussi mal abordés. Je pense que c’est lié à cette ségrégation sémantique historique entre les activités « nobles » d’une société financière et les activités « vulgaires », entre les centres de coûts et les centres de profit. En affiliant inconsciemment les métiers de la Finance à ce genre d’aristocratie, on associe surtout les métiers technologiques <text:span text:style-name="T180">et régaliens </text:span>à de la plomberie ou du travail de soute, indigne de leur attention.</text:p>
      <text:p text:style-name="P61">Et ce biais cognitif, centré sur les fonctions qui « rapportent de la richesse » au détriment de celles qui « coûtent du pognon », a peu à peu déformé la notion même d’investissement et d’amortissement : pourquoi à chaque fois remettre une pièce dans un bouzin qui coûte une blinde et qui ne rapporte rien ? Il vaut mieux redistribuer l’argent aux actionnaires.</text:p>
      <text:p text:style-name="P61">Dans un contexte où les décideurs ne comprennent pas la complexité des problèmes présentés, à tel point qu’on se résout finalement à ne plus leur présenter ces problèmes, il se crée progressivement un « angle mort » sur tous ces sujets relatifs à la dette technique. Et l’autruche commence tranquillement à enfoncer sa tête dans le sable, jour après jour, mois après mois, année après année… jusqu’à ce que les problèmes qu’on ne veut pas voir deviennent si critiques que personne ne sache comment les aborder et qu’on soit réduit à attendre un nouveau miracle pour les résoudre !</text:p>
      <text:p text:style-name="P62"><text:soft-page-break/>Malheureusement, le principal inconvénient quand l’autruche a la tête dans le sable, c’est qu’elle découvre une autre partie de son anatom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vg:font-family="Alegreya" style:font-family-generic="roman" style:font-pitch="variable"/>
    <style:font-face style:name="Alegreya Medium" svg:font-family="'Alegreya Medium'" style:font-family-generic="roman" style:font-pitch="variable"/>
    <style:font-face style:name="Alegreya1" svg:font-family="Alegreya"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legreya" fo:font-size="11pt" fo:language="fr" fo:country="FR" style:letter-kerning="false" style:font-name-asian="Calibri"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legreya" fo:font-size="11pt" fo:language="fr" fo:country="FR" style:letter-kerning="false" style:font-name-asian="Calibri"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05%" fo:text-align="justify" style:justify-single-word="false" fo:orphans="2" fo:widows="2" fo:hyphenation-ladder-count="no-limit" style:writing-mode="lr-tb"/>
      <style:text-properties style:use-window-font-color="true" loext:opacity="0%" style:font-name="Alegreya" fo:font-family="Alegreya" style:font-family-generic="roman" style:font-pitch="variable" fo:font-size="11pt" fo:language="fr" fo:country="FR" style:letter-kerning="false" style:font-name-asian="Calibri"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left="0.711cm" fo:margin-right="0.711cm" fo:margin-top="0cm" fo:margin-bottom="0cm" style:contextual-spacing="true" fo:line-height="80%" fo:text-align="center" style:justify-single-word="false" fo:keep-together="always" fo:text-indent="0cm" style:auto-text-indent="false" fo:keep-with-next="always"/>
      <style:text-properties fo:font-size="22pt" style:font-name-asian="Calibri" style:font-family-asian="Calibri" style:font-family-generic-asian="system" style:font-pitch-asian="variable" style:font-size-asian="22pt"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cm" fo:margin-bottom="2.293cm" style:contextual-spacing="true" fo:line-height="95%" fo:text-align="center" style:justify-single-word="false" fo:keep-together="always" fo:keep-with-next="always"/>
      <style:text-properties style:font-name="Alegreya Medium" fo:font-family="'Alegreya Medium'" style:font-family-generic="roman" style:font-pitch="variable" fo:font-size="20pt" style:font-name-asian="Calibri" style:font-family-asian="Calibri" style:font-family-generic-asian="system" style:font-pitch-asian="variable" style:font-size-asian="20pt" style:font-name-complex="Times New Roman1" style:font-family-complex="'Times New Roman'" style:font-family-generic-complex="system" style:font-pitch-complex="variable" style:font-size-complex="9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706cm" fo:margin-bottom="0.282cm" style:contextual-spacing="true" fo:text-align="center" style:justify-single-word="false" fo:keep-together="always" fo:keep-with-next="always"/>
      <style:text-properties fo:font-size="14pt"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706cm" fo:margin-bottom="0.212cm" style:contextual-spacing="true" fo:text-align="start" style:justify-single-word="false" fo:keep-together="always" fo:keep-with-next="always"/>
      <style:text-properties style:font-name="Alegreya Medium" fo:font-family="'Alegreya Medium'" style:font-family-generic="roman" style:font-pitch="variable" fo:font-size="13pt" style:font-name-asian="Calibri" style:font-family-asian="Calibri" style:font-family-generic-asian="system" style:font-pitch-asian="variable" style:font-size-asian="13pt"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keep-together="always" fo:keep-with-next="always"/>
      <style:text-properties fo:color="#243f60" loext:opacity="100%" style:font-name="Cambria" fo:font-family="Cambria" style:font-family-generic="roman" style:font-pitch="variable" fo:font-style="italic" fo:font-weight="bold" style:font-name-asian="Calibri" style:font-family-asian="Calibri"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Title" style:family="paragraph" style:parent-style-name="Standard" style:next-style-name="Text_20_body" loext:linked-style-name="Titre_20_Car" style:class="chapter">
      <style:paragraph-properties fo:margin-left="0.762cm" fo:margin-right="0.762cm" fo:margin-top="0cm" fo:margin-bottom="0.423cm" style:contextual-spacing="true" fo:line-height="85%" fo:text-align="center" style:justify-single-word="false" fo:text-indent="0cm" style:auto-text-indent="false"/>
      <style:text-properties fo:font-size="26pt" fo:letter-spacing="0.009cm" style:letter-kerning="true" style:font-name-asian="Calibri"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caption" style:family="paragraph" style:parent-style-name="Standard" style:next-style-name="Standard">
      <style:text-properties fo:color="#4f81bd" loext:opacity="100%" fo:font-size="9pt" fo:font-weight="bold" style:font-size-asian="9pt" style:font-weight-asian="bold" style:font-size-complex="9pt" style:font-weight-complex="bold"/>
    </style:style>
    <style:style style:name="Quote" style:family="paragraph" style:parent-style-name="Standard" style:next-style-name="Standard" loext:linked-style-name="Citation_20_Car">
      <style:text-properties fo:color="#000000" loext:opacity="100%" fo:font-style="italic" style:font-style-asian="italic" style:font-style-complex="italic"/>
    </style:style>
    <style:style style:name="Balloon_20_Text" style:display-name="Balloon Text" style:family="paragraph" style:parent-style-name="Standard" loext:linked-style-name="Texte_20_de_20_bulles_20_C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loext:linked-style-name="Sans_20_interligne_20_Car">
      <style:paragraph-properties fo:margin-top="0cm" fo:margin-bottom="0cm" style:contextual-spacing="false" fo:line-height="105%" fo:text-align="justify" style:justify-single-word="false" fo:orphans="2" fo:widows="2" fo:hyphenation-ladder-count="no-limit" style:writing-mode="lr-tb"/>
      <style:text-properties style:use-window-font-color="true" loext:opacity="0%" style:font-name="Alegreya" fo:font-family="Alegreya" style:font-family-generic="roman" style:font-pitch="variable" fo:font-size="11pt" fo:language="fr" fo:country="FR" style:letter-kerning="false" style:font-name-asian="Calibri"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Standard" style:next-style-name="Standard" loext:linked-style-name="Sous-titre_20_Car" style:class="chapter">
      <style:text-properties fo:color="#4f81bd" loext:opacity="100%"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nse_20_Quote" style:display-name="Intense Quote" style:family="paragraph" style:parent-style-name="Standard" style:next-style-name="Standard" loext:linked-style-name="Citation_20_intense_20_C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cm" fo:margin-bottom="2.293cm" style:contextual-spacing="true"/>
      <style:text-properties fo:font-size="16pt" fo:font-style="italic" style:font-size-asian="16pt" style:font-style-asian="italic"/>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text-align="center" style:justify-single-word="false"/>
      <style:text-properties fo:text-transform="uppercase" fo:font-size="8pt" style:font-size-asian="8pt"/>
    </style:style>
    <style:style style:name="Footer" style:family="paragraph" style:parent-style-name="Standard" loext:linked-style-name="Pied_20_de_20_page_20_Car" style:class="extra">
      <style:paragraph-properties fo:margin-top="0cm" fo:margin-bottom="0cm" style:contextual-spacing="false" fo:text-align="center" style:justify-single-word="false"/>
    </style:style>
    <style:style style:name="Chap_20_Number" style:display-name="Chap Number" style:family="paragraph" style:parent-style-name="Standard" loext:linked-style-name="Chap_20_Number_20_Char">
      <style:paragraph-properties fo:margin-top="0cm" fo:margin-bottom="0.035cm" style:contextual-spacing="true" fo:text-align="center" style:justify-single-word="false"/>
      <style:text-properties fo:font-size="20pt" style:font-size-asian="20pt" style:font-size-complex="18pt" style:font-weight-complex="bold"/>
    </style:style>
    <style:style style:name="Contents_20_2" style:display-name="Contents 2" style:family="paragraph" style:parent-style-name="Standard" style:next-style-name="Standard" style:auto-update="true" style:class="index">
      <style:paragraph-properties fo:margin-left="0.381cm" fo:margin-right="0cm" fo:margin-top="0.353cm" fo:margin-bottom="0.282cm" style:contextual-spacing="true" fo:text-indent="0cm" style:auto-text-indent="false">
        <style:tab-stops>
          <style:tab-stop style:position="10.52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62cm" fo:margin-right="0cm" fo:margin-top="0cm" fo:margin-bottom="0.106cm" style:contextual-spacing="false" fo:text-indent="0cm" style:auto-text-indent="false">
        <style:tab-stops>
          <style:tab-stop style:position="10.523cm" style:type="right" style:leader-style="dotted" style:leader-text="."/>
        </style:tab-stops>
      </style:paragraph-properties>
    </style:style>
    <style:style style:name="Contents_20_1" style:display-name="Contents 1" style:family="paragraph" style:parent-style-name="Standard" style:next-style-name="Standard" style:auto-update="true" style:class="index">
      <style:paragraph-properties fo:margin-top="0.706cm" fo:margin-bottom="0.353cm" style:contextual-spacing="false">
        <style:tab-stops>
          <style:tab-stop style:position="10.523cm" style:type="right" style:leader-style="dotted" style:leader-text="."/>
        </style:tab-stops>
      </style:paragraph-properties>
      <style:text-properties style:font-name="Alegreya Medium" fo:font-family="'Alegreya Medium'" style:font-family-generic="roman" style:font-pitch="variable"/>
    </style:style>
    <style:style style:name="Footnote" style:family="paragraph" style:parent-style-name="Standard" loext:linked-style-name="Note_20_de_20_bas_20_de_20_page_20_Car" style:class="extra">
      <style:paragraph-properties fo:margin-top="0cm" fo:margin-bottom="0cm" style:contextual-spacing="false" fo:line-height="100%"/>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font-size="22pt" style:font-name-asian="Calibri" style:font-family-asian="Calibri" style:font-family-generic-asian="system" style:font-pitch-asian="variable" style:font-size-asian="22pt" style:font-name-complex="Times New Roman1" style:font-family-complex="'Times New Roman'" style:font-family-generic-complex="system" style:font-pitch-complex="variable" style:font-size-complex="14pt" style:font-weight-complex="bold"/>
    </style:style>
    <style:style style:name="Citation_20_Car" style:display-name="Citation Car" style:family="text" style:parent-style-name="Default_20_Paragraph_20_Font" loext:linked-style-name="Quote">
      <style:text-properties fo:color="#000000"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ous-titre_20_Car" style:display-name="Sous-titre C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re_20_2_20_Car" style:display-name="Titre 2 Car" style:family="text" style:parent-style-name="Default_20_Paragraph_20_Font">
      <style:text-properties style:font-name="Alegreya Medium" fo:font-family="'Alegreya Medium'" style:font-family-generic="roman" style:font-pitch="variable" fo:font-size="20pt" style:font-name-asian="Calibri" style:font-family-asian="Calibri" style:font-family-generic-asian="system" style:font-pitch-asian="variable" style:font-size-asian="20pt" style:font-name-complex="Times New Roman1" style:font-family-complex="'Times New Roman'" style:font-family-generic-complex="system" style:font-pitch-complex="variable" style:font-size-complex="9pt"/>
    </style:style>
    <style:style style:name="Titre_20_3_20_Car" style:display-name="Titre 3 Car" style:family="text" style:parent-style-name="Default_20_Paragraph_20_Font">
      <style:text-properties fo:font-size="14pt"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weight-complex="bold"/>
    </style:style>
    <style:style style:name="Titre_20_4_20_Car" style:display-name="Titre 4 Car" style:family="text" style:parent-style-name="Default_20_Paragraph_20_Font">
      <style:text-properties style:font-name="Alegreya Medium" fo:font-family="'Alegreya Medium'" style:font-family-generic="roman" style:font-pitch="variable" fo:font-size="13pt" style:font-name-asian="Calibri" style:font-family-asian="Calibri" style:font-family-generic-asian="system" style:font-pitch-asian="variable" style:font-size-asian="13pt" style:font-name-complex="Times New Roman1" style:font-family-complex="'Times New Roman'"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loext:opacity="100%" style:font-name="Cambria" fo:font-family="Cambria" style:font-family-generic="roman" style:font-pitch="variable" fo:font-style="italic" fo:font-weight="bold" style:font-name-asian="Calibri" style:font-family-asian="Calibri"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Titre_20_6_20_Car" style:display-name="Titre 6 Car" style:family="text" style:parent-style-name="Default_20_Paragraph_20_Font">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itre_20_7_20_Car" style:display-name="Titre 7 Car" style:family="text" style:parent-style-name="Default_20_Paragraph_20_Font">
      <style:text-properties fo:color="#40404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itre_20_8_20_Car" style:display-name="Titre 8 Car" style:family="text" style:parent-style-name="Default_20_Paragraph_20_Font">
      <style:text-properties fo:color="#4f81bd" loext:opacity="100%"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itre_20_Car" style:display-name="Titre Car" style:family="text" style:parent-style-name="Default_20_Paragraph_20_Font">
      <style:text-properties fo:font-size="26pt" fo:letter-spacing="0.009cm" style:letter-kerning="true" style:font-name-asian="Calibri"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ans_20_interligne_20_Car" style:display-name="Sans interligne Car" style:family="text" style:parent-style-name="Default_20_Paragraph_20_Font" loext:linked-style-name="No_20_Spacing"/>
    <style:style style:name="En-tête_20_Car" style:display-name="En-tête Car" style:family="text" style:parent-style-name="Default_20_Paragraph_20_Font">
      <style:text-properties fo:text-transform="uppercase" fo:font-size="8pt" style:font-size-asian="8pt"/>
    </style:style>
    <style:style style:name="Pied_20_de_20_page_20_Car" style:display-name="Pied de page Car" style:family="text" style:parent-style-name="Default_20_Paragraph_20_Font"/>
    <style:style style:name="Corps_20_de_20_texte_20_Car" style:display-name="Corps de texte Car" style:family="text" style:parent-style-name="Default_20_Paragraph_20_Font">
      <style:text-properties style:font-name-asian="Calibri" style:font-family-asian="Calibri" style:font-family-generic-asian="system" style:font-pitch-asian="variable" style:language-complex="ur" style:country-complex="PK"/>
    </style:style>
    <style:style style:name="Chap_20_Number_20_Char" style:display-name="Chap Number Char" style:family="text" style:parent-style-name="Default_20_Paragraph_20_Font" loext:linked-style-name="Chap_20_Number">
      <style:text-properties fo:font-size="20pt" style:font-size-asian="20pt" style:font-size-complex="18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language="fr" fo:country="FR"/>
    </style:style>
    <style:page-layout style:name="Mpm1" style:page-usage="mirrored">
      <style:page-layout-properties fo:page-width="13.97cm" fo:page-height="21.59cm" style:num-format="1" style:print-orientation="portrait" fo:margin-top="1.27cm" fo:margin-bottom="1.143cm" fo:margin-left="1.905cm" fo:margin-right="1.524cm" style:writing-mode="lr-tb" style:layout-grid-color="#c0c0c0" style:layout-grid-lines="29" style:layout-grid-base-height="0.635cm" style:layout-grid-ruby-height="0cm" style:layout-grid-mode="none" style:layout-grid-ruby-below="false" style:layout-grid-print="false" style:layout-grid-display="false" style:layout-grid-base-width="0.459cm" style:layout-grid-snap-to="true" style:footnote-max-height="0cm" loext:margin-gutter="0.381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27cm" fo:margin-left="0cm" fo:margin-right="0cm" fo:margin-top="0.026cm" style:dynamic-spacing="true"/>
      </style:footer-style>
    </style:page-layout>
    <style:page-layout style:name="Mpm2" style:page-usage="mirrored">
      <style:page-layout-properties fo:page-width="13.97cm" fo:page-height="21.59cm" style:num-format="i" style:print-orientation="portrait" fo:margin-top="1.27cm" fo:margin-bottom="1.143cm" fo:margin-left="1.905cm" fo:margin-right="1.524cm" style:writing-mode="lr-tb" style:layout-grid-color="#c0c0c0" style:layout-grid-lines="29" style:layout-grid-base-height="0.635cm" style:layout-grid-ruby-height="0cm" style:layout-grid-mode="none" style:layout-grid-ruby-below="false" style:layout-grid-print="false" style:layout-grid-display="false" style:layout-grid-base-width="0.459cm" style:layout-grid-snap-to="true" style:footnote-max-height="0cm" loext:margin-gutter="0.381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27cm" fo:margin-left="0cm" fo:margin-right="0cm" fo:margin-top="0.026cm" style:dynamic-spacing="true"/>
      </style:footer-style>
    </style:page-layout>
    <style:page-layout style:name="Mpm3" style:page-usage="mirrored">
      <style:page-layout-properties fo:page-width="13.97cm" fo:page-height="21.59cm" style:num-format="1" style:print-orientation="portrait" fo:margin-top="1.27cm" fo:margin-bottom="1.143cm" fo:margin-left="1.905cm" fo:margin-right="1.524cm" style:writing-mode="lr-tb" style:layout-grid-color="#c0c0c0" style:layout-grid-lines="29" style:layout-grid-base-height="0.635cm" style:layout-grid-ruby-height="0cm" style:layout-grid-mode="none" style:layout-grid-ruby-below="false" style:layout-grid-print="false" style:layout-grid-display="false" style:layout-grid-base-width="0.459cm" style:layout-grid-snap-to="true" style:footnote-max-height="0cm" loext:margin-gutter="0.381cm">
        <style:footnote-sep style:width="0.018cm" style:distance-before-sep="0.101cm" style:distance-after-sep="0.101cm" style:line-style="solid" style:adjustment="left" style:rel-width="30%" style:color="#000000"/>
      </style:page-layout-properties>
      <style:header-style>
        <style:header-footer-properties fo:min-height="0.101cm" fo:margin-left="0cm" fo:margin-right="0cm" fo:margin-bottom="0.002cm" style:dynamic-spacing="true"/>
      </style:header-style>
      <style:footer-style>
        <style:header-footer-properties fo:min-height="0.127cm" fo:margin-left="0cm" fo:margin-right="0cm" fo:margin-top="0.026cm" style:dynamic-spacing="true"/>
      </style:footer-style>
    </style:page-layout>
    <style:page-layout style:name="Mpm4" style:page-usage="mirrored">
      <style:page-layout-properties fo:page-width="13.97cm" fo:page-height="21.59cm" style:num-format="1" style:print-orientation="portrait" fo:margin-top="1.27cm" fo:margin-bottom="1.143cm" fo:margin-left="1.905cm" fo:margin-right="1.524cm" style:writing-mode="lr-tb" style:layout-grid-color="#c0c0c0" style:layout-grid-lines="29" style:layout-grid-base-height="0.635cm" style:layout-grid-ruby-height="0cm" style:layout-grid-mode="none" style:layout-grid-ruby-below="false" style:layout-grid-print="false" style:layout-grid-display="false" style:layout-grid-base-width="0.459cm" style:layout-grid-snap-to="true" style:footnote-max-height="0cm" loext:margin-gutter="0.381cm">
        <style:footnote-sep style:width="0.018cm" style:distance-before-sep="0.101cm" style:distance-after-sep="0.101cm" style:line-style="solid" style:adjustment="left" style:rel-width="30%" style:color="#000000"/>
      </style:page-layout-properties>
      <style:header-style>
        <style:header-footer-properties fo:min-height="0.101cm" fo:margin-left="0cm" fo:margin-right="0cm" fo:margin-bottom="0.002cm" style:dynamic-spacing="true"/>
      </style:header-style>
      <style:footer-style>
        <style:header-footer-properties fo:min-height="0.131cm" fo:margin-left="0cm" fo:margin-right="0cm" fo:margin-top="0.032cm" style:dynamic-spacing="true"/>
      </style:footer-style>
    </style:page-layout>
    <style:page-layout style:name="Mpm5">
      <style:page-layout-properties fo:page-width="13.97cm" fo:page-height="21.5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style:header>
      <style:header-left>
        <text:p text:style-name="MP1"/>
        <text:p text:style-name="MP1"/>
        <text:p text:style-name="MP1"/>
      </style:header-left>
      <style:footer>
        <text:p text:style-name="MP2"/>
        <text:p text:style-name="MP2"/>
      </style:footer>
      <style:footer-left>
        <text:p text:style-name="MP2"/>
        <text:p text:style-name="MP2"/>
      </style:footer-left>
    </style:master-page>
    <style:master-page style:name="First_20_Page" style:display-name="First Page" style:page-layout-name="Mpm1" draw:style-name="Mdp1" style:next-style-name="Standard">
      <style:header>
        <text:p text:style-name="MP1"/>
        <text:p text:style-name="MP1"/>
        <text:p text:style-name="MP1"/>
      </style:header>
      <style:footer>
        <text:p text:style-name="MP2"/>
        <text:p text:style-name="MP2"/>
      </style:footer>
    </style:master-page>
    <style:master-page style:name="Converted1" style:page-layout-name="Mpm2" draw:style-name="Mdp1">
      <style:header>
        <text:p text:style-name="MP1">SOMMAIRE</text:p>
        <text:p text:style-name="MP1"/>
        <text:p text:style-name="MP1"/>
      </style:header>
      <style:header-left>
        <text:p text:style-name="MP1">La politique de l’autruche</text:p>
        <text:p text:style-name="MP1"/>
        <text:p text:style-name="MP1"/>
      </style:header-left>
      <style:footer>
        <text:p text:style-name="MP2"/>
        <text:p text:style-name="Footer"><text:page-number text:select-page="current">vii</text:page-number></text:p>
      </style:footer>
      <style:footer-left>
        <text:p text:style-name="MP2"/>
        <text:p text:style-name="Footer"><text:page-number text:select-page="current">vi</text:page-number></text:p>
      </style:footer-left>
    </style:master-page>
    <style:master-page style:name="Converted2" style:page-layout-name="Mpm2" draw:style-name="Mdp1" style:next-style-name="Converted1">
      <style:header>
        <text:p text:style-name="MP1"/>
        <text:p text:style-name="MP1"/>
        <text:p text:style-name="MP1"/>
      </style:header>
      <style:footer>
        <text:p text:style-name="MP2"/>
        <text:p text:style-name="Footer"><text:page-number text:select-page="current">iii</text:page-number></text:p>
      </style:footer>
    </style:master-page>
    <style:master-page style:name="Converted3" style:page-layout-name="Mpm2" draw:style-name="Mdp1">
      <style:header>
        <text:p text:style-name="Header"><field:fieldmark-start text:name="Bookmark" field:type="vnd.oasis.opendocument.field.UNHANDLED"><field:param field:name="vnd.oasis.opendocument.field.code" field:value="STYLEREF  2 \* MERGEFORMAT"/><field:param field:name="vnd.oasis.opendocument.field.id" field:value="10"/></field:fieldmark-start><field:fieldmark-separator/><text:span text:style-name="MT1">Introduction</text:span><field:fieldmark-end/></text:p>
        <text:p text:style-name="MP1"/>
        <text:p text:style-name="MP1"/>
      </style:header>
      <style:header-left>
        <text:p text:style-name="MP1">la politique de l’autruche</text:p>
        <text:p text:style-name="MP1"/>
        <text:p text:style-name="MP1"/>
      </style:header-left>
      <style:footer>
        <text:p text:style-name="MP2"/>
        <text:p text:style-name="Footer"><text:page-number text:select-page="current">xi</text:page-number></text:p>
      </style:footer>
      <style:footer-left>
        <text:p text:style-name="MP2"/>
        <text:p text:style-name="Footer"><text:page-number text:select-page="current">xii</text:page-number></text:p>
      </style:footer-left>
    </style:master-page>
    <style:master-page style:name="Converted4" style:page-layout-name="Mpm2" draw:style-name="Mdp1" style:next-style-name="Converted3">
      <style:header>
        <text:p text:style-name="Header"><text:span text:style-name="MT1"><text:title>La politique de l'autruche</text:title></text:span><text:span text:style-name="MT1">La politique de l’autruche</text:span></text:p>
        <text:p text:style-name="MP1"/>
        <text:p text:style-name="MP1"/>
      </style:header>
      <style:footer>
        <text:p text:style-name="MP2"/>
        <text:p text:style-name="Footer"><text:page-number text:select-page="current">viii</text:page-number></text:p>
      </style:footer>
    </style:master-page>
    <style:master-page style:name="Converted5" style:page-layout-name="Mpm1" draw:style-name="Mdp1">
      <style:header>
        <text:p text:style-name="Header"><field:fieldmark-start text:name="Bookmark12" field:type="vnd.oasis.opendocument.field.UNHANDLED"><field:param field:name="vnd.oasis.opendocument.field.code" field:value="STYLEREF  2 \* MERGEFORMAT"/><field:param field:name="vnd.oasis.opendocument.field.id" field:value="10"/></field:fieldmark-start><field:fieldmark-separator/><text:span text:style-name="MT1">Qu’est-ce que la politique de l’autruche ?</text:span><field:fieldmark-end/></text:p>
        <text:p text:style-name="MP1"/>
        <text:p text:style-name="MP1"/>
      </style:header>
      <style:header-left>
        <text:p text:style-name="MP1">la politique de l’autruche</text:p>
        <text:p text:style-name="MP1"/>
        <text:p text:style-name="MP1"/>
      </style:header-left>
      <style:footer>
        <text:p text:style-name="MP2"/>
        <text:p text:style-name="Footer"><text:page-number text:select-page="current">5</text:page-number></text:p>
      </style:footer>
      <style:footer-left>
        <text:p text:style-name="MP2"/>
        <text:p text:style-name="Footer"><text:page-number text:select-page="current">4</text:page-number></text:p>
      </style:footer-left>
    </style:master-page>
    <style:master-page style:name="Converted6" style:page-layout-name="Mpm1" draw:style-name="Mdp1" style:next-style-name="Converted5">
      <style:header>
        <text:p text:style-name="MP1"/>
        <text:p text:style-name="MP1"/>
        <text:p text:style-name="MP1"/>
      </style:header>
      <style:footer>
        <text:p text:style-name="MP2"/>
        <text:p text:style-name="Footer"><text:page-number text:select-page="current">1</text:page-number></text:p>
      </style:footer>
    </style:master-page>
    <style:master-page style:name="Converted7" style:page-layout-name="Mpm3" draw:style-name="Mdp1">
      <style:header>
        <text:p text:style-name="Header"><field:fieldmark-start text:name="Bookmark13" field:type="vnd.oasis.opendocument.field.UNHANDLED"><field:param field:name="vnd.oasis.opendocument.field.code" field:value="STYLEREF  2 \* MERGEFORMAT"/><field:param field:name="vnd.oasis.opendocument.field.id" field:value="10"/></field:fieldmark-start><field:fieldmark-separator/><text:span text:style-name="MT1">Pourquoi les entreprises cherchent toujours à se transformer ?</text:span><field:fieldmark-end/><text:span text:style-name="MT1"><text:title>La politique de l'autruche</text:title></text:span><text:span text:style-name="MT1"><text:bookmark-ref text:reference-format="number-no-superior" text:ref-name="__RefHeading___Toc1560_1115178054"/></text:span></text:p>
        <text:p text:style-name="MP1"/>
        <text:p text:style-name="MP1"/>
      </style:header>
      <style:header-left>
        <text:p text:style-name="MP1">la politique de l’autruche</text:p>
        <text:p text:style-name="MP1"/>
        <text:p text:style-name="MP1"/>
      </style:header-left>
      <style:footer>
        <text:p text:style-name="MP2"/>
        <text:p text:style-name="Footer"><text:page-number text:select-page="current">13</text:page-number></text:p>
      </style:footer>
      <style:footer-left>
        <text:p text:style-name="MP2"/>
        <text:p text:style-name="Footer"><text:page-number text:select-page="current">14</text:page-number></text:p>
      </style:footer-left>
    </style:master-page>
    <style:master-page style:name="Converted8" style:page-layout-name="Mpm3" draw:style-name="Mdp1">
      <style:header>
        <text:p text:style-name="MP1"><text:chapter text:display="name" text:outline-level="2">Quels sont les résultats habituels d’une Transformation ?</text:chapter></text:p>
        <text:p text:style-name="MP1"/>
      </style:header>
      <style:header-left>
        <text:p text:style-name="MP1">la politique de l’autruche</text:p>
        <text:p text:style-name="MP1"/>
        <text:p text:style-name="MP1"/>
      </style:header-left>
      <style:footer>
        <text:p text:style-name="MP2"/>
        <text:p text:style-name="Footer"><text:page-number text:select-page="current">43</text:page-number></text:p>
      </style:footer>
      <style:footer-left>
        <text:p text:style-name="MP2"/>
        <text:p text:style-name="Footer"><text:page-number text:select-page="current">44</text:page-number></text:p>
      </style:footer-left>
    </style:master-page>
    <style:master-page style:name="Converted9" style:page-layout-name="Mpm4" draw:style-name="Mdp1">
      <style:header>
        <text:p text:style-name="MP1"><text:chapter text:display="name" text:outline-level="2">C’est pas Sherwood, ici !</text:chapter></text:p>
        <text:p text:style-name="MP1"/>
      </style:header>
      <style:header-left>
        <text:p text:style-name="MP1">la politique de l’autruche</text:p>
        <text:p text:style-name="MP1"/>
        <text:p text:style-name="MP1"/>
      </style:header-left>
      <style:footer>
        <text:p text:style-name="MP2"/>
        <text:p text:style-name="Footer"><text:page-number text:select-page="current">119</text:page-number></text:p>
      </style:footer>
      <style:footer-left>
        <text:p text:style-name="MP2"/>
        <text:p text:style-name="Footer"><text:page-number text:select-page="current">120</text:page-number></text:p>
      </style:footer-left>
    </style:master-page>
    <style:master-page style:name="Converted10" style:page-layout-name="Mpm1" draw:style-name="Mdp1">
      <style:header>
        <text:p text:style-name="MP1"><text:chapter text:display="name" text:outline-level="2">Pourquoi vouloir résister au changement ?</text:chapter></text:p>
        <text:p text:style-name="MP1"/>
      </style:header>
      <style:header-left>
        <text:p text:style-name="MP1">la politique de l’autruche</text:p>
        <text:p text:style-name="MP1"/>
        <text:p text:style-name="MP1"/>
      </style:header-left>
      <style:footer>
        <text:p text:style-name="MP2"/>
        <text:p text:style-name="Footer"><text:page-number text:select-page="current">141</text:page-number></text:p>
      </style:footer>
      <style:footer-left>
        <text:p text:style-name="MP2"/>
        <text:p text:style-name="Footer"><text:page-number text:select-page="current">142</text:page-number></text:p>
      </style:footer-left>
    </style:master-page>
    <style:master-page style:name="Converted11" style:page-layout-name="Mpm3" draw:style-name="Mdp1">
      <style:header>
        <text:p text:style-name="Header"><field:fieldmark-start text:name="Bookmark17" field:type="vnd.oasis.opendocument.field.UNHANDLED"><field:param field:name="vnd.oasis.opendocument.field.code" field:value="STYLEREF  2 \* MERGEFORMAT"/><field:param field:name="vnd.oasis.opendocument.field.id" field:value="10"/></field:fieldmark-start><field:fieldmark-separator/><text:span text:style-name="MT1">Comment préparer la résistance ?</text:span><field:fieldmark-end/><text:span text:style-name="MT1"><text:title>La politique de l'autruche</text:title></text:span><text:span text:style-name="MT1"><text:bookmark-ref text:reference-format="number-no-superior" text:ref-name="__RefHeading___Toc1778_1115178054"/></text:span><text:span text:style-name="MT1"><text:bookmark-ref text:reference-format="number-no-superior" text:ref-name="__RefHeading___Toc1778_1115178054"/></text:span><text:span text:style-name="MT1"><text:title>La politique de l'autruche</text:title></text:span><text:span text:style-name="MT1"><text:bookmark-ref text:reference-format="number-no-superior" text:ref-name="__RefHeading___Toc1560_1115178054"/></text:span><text:span text:style-name="MT1"><text:bookmark-ref text:reference-format="number-no-superior" text:ref-name="__RefHeading___Toc1560_1115178054"/></text:span><text:span text:style-name="MT1"><text:bookmark-ref text:reference-format="number-no-superior" text:ref-name="__RefHeading___Toc1560_1115178054"/></text:span></text:p>
        <text:p text:style-name="MP1"/>
        <text:p text:style-name="MP1"/>
      </style:header>
      <style:header-left>
        <text:p text:style-name="MP1">la politique de l’autruche</text:p>
        <text:p text:style-name="MP1"/>
        <text:p text:style-name="MP1"/>
      </style:header-left>
      <style:footer>
        <text:p text:style-name="MP2"/>
        <text:p text:style-name="Footer"><text:page-number text:select-page="current">0</text:page-number></text:p>
      </style:footer>
      <style:footer-left>
        <text:p text:style-name="MP2"/>
        <text:p text:style-name="Footer"><text:page-number text:select-page="current">0</text:page-number></text:p>
      </style:footer-left>
    </style:master-page>
    <style:master-page style:name="Converted12" style:page-layout-name="Mpm3" draw:style-name="Mdp1">
      <style:header>
        <text:p text:style-name="Header"><field:fieldmark-start text:name="Bookmark18" field:type="vnd.oasis.opendocument.field.UNHANDLED"><field:param field:name="vnd.oasis.opendocument.field.code" field:value="STYLEREF  2 \* MERGEFORMAT"/><field:param field:name="vnd.oasis.opendocument.field.id" field:value="10"/></field:fieldmark-start><field:fieldmark-separator/><text:span text:style-name="MT1">Pourquoi vouloir résister au changement ?</text:span><field:fieldmark-end/><text:span text:style-name="MT1"><text:title>La politique de l'autruche</text:title></text:span><text:span text:style-name="MT1"><text:bookmark-ref text:reference-format="number-no-superior" text:ref-name="__RefHeading___Toc1778_1115178054"/></text:span><text:span text:style-name="MT1"><text:bookmark-ref text:reference-format="number-no-superior" text:ref-name="__RefHeading___Toc1778_1115178054"/></text:span><text:span text:style-name="MT1"><text:title>La politique de l'autruche</text:title></text:span><text:span text:style-name="MT1"><text:bookmark-ref text:reference-format="number-no-superior" text:ref-name="__RefHeading___Toc1560_1115178054"/></text:span><text:span text:style-name="MT1"><text:bookmark-ref text:reference-format="number-no-superior" text:ref-name="__RefHeading___Toc1560_1115178054"/></text:span><text:span text:style-name="MT1"><text:bookmark-ref text:reference-format="number-no-superior" text:ref-name="__RefHeading___Toc1560_1115178054"/></text:span></text:p>
        <text:p text:style-name="MP1"/>
        <text:p text:style-name="MP1"/>
      </style:header>
      <style:header-left>
        <text:p text:style-name="MP1">la politique de l’autruche</text:p>
        <text:p text:style-name="MP1"/>
        <text:p text:style-name="MP1"/>
      </style:header-left>
      <style:footer>
        <text:p text:style-name="MP2"/>
        <text:p text:style-name="Footer"><text:page-number text:select-page="current">0</text:page-number></text:p>
      </style:footer>
      <style:footer-left>
        <text:p text:style-name="MP2"/>
        <text:p text:style-name="Footer"><text:page-number text:select-page="current">0</text:page-number></text:p>
      </style:footer-left>
    </style:master-page>
    <style:master-page style:name="Converted13" style:page-layout-name="Mpm1" draw:style-name="Mdp1">
      <style:header>
        <text:p text:style-name="Header"><field:fieldmark-start text:name="Bookmark19" field:type="vnd.oasis.opendocument.field.UNHANDLED"><field:param field:name="vnd.oasis.opendocument.field.code" field:value="STYLEREF  2 \* MERGEFORMAT"/><field:param field:name="vnd.oasis.opendocument.field.id" field:value="10"/></field:fieldmark-start><field:fieldmark-separator/><text:span text:style-name="MT1">Quelles sont les stratégies disponibles ?</text:span><field:fieldmark-end/><text:span text:style-name="MT1"><text:title>La politique de l'autruche</text:title></text:span><text:span text:style-name="MT1"><text:bookmark-ref text:reference-format="number-no-superior" text:ref-name="__RefHeading___Toc1778_1115178054"/></text:span><text:span text:style-name="MT1"><text:bookmark-ref text:reference-format="number-no-superior" text:ref-name="__RefHeading___Toc1778_1115178054"/></text:span><text:span text:style-name="MT1"><text:title>La politique de l'autruche</text:title></text:span><text:span text:style-name="MT1"><text:bookmark-ref text:reference-format="number-no-superior" text:ref-name="__RefHeading___Toc1560_1115178054"/></text:span><text:span text:style-name="MT1"><text:bookmark-ref text:reference-format="number-no-superior" text:ref-name="__RefHeading___Toc1560_1115178054"/></text:span><text:span text:style-name="MT1"><text:bookmark-ref text:reference-format="number-no-superior" text:ref-name="__RefHeading___Toc1560_1115178054"/></text:span></text:p>
        <text:p text:style-name="MP1"/>
        <text:p text:style-name="MP1"/>
      </style:header>
      <style:header-left>
        <text:p text:style-name="MP1">la politique de l’autruche</text:p>
        <text:p text:style-name="MP1"/>
        <text:p text:style-name="MP1"/>
      </style:header-left>
      <style:footer>
        <text:p text:style-name="MP2"/>
        <text:p text:style-name="Footer"><text:page-number text:select-page="current">167</text:page-number></text:p>
      </style:footer>
      <style:footer-left>
        <text:p text:style-name="MP2"/>
        <text:p text:style-name="Footer"><text:page-number text:select-page="current">168</text:page-number></text:p>
      </style:footer-left>
    </style:master-page>
    <style:master-page style:name="Converted14" style:page-layout-name="Mpm3" draw:style-name="Mdp1">
      <style:header>
        <text:p text:style-name="Header"><field:fieldmark-start text:name="Bookmark20" field:type="vnd.oasis.opendocument.field.UNHANDLED"><field:param field:name="vnd.oasis.opendocument.field.code" field:value="STYLEREF  2 \* MERGEFORMAT"/><field:param field:name="vnd.oasis.opendocument.field.id" field:value="10"/></field:fieldmark-start><field:fieldmark-separator/><text:span text:style-name="MT1">Et maintenant, que fait-on ?</text:span><field:fieldmark-end/><text:span text:style-name="MT1"><text:title>La politique de l'autruche</text:title></text:span><text:span text:style-name="MT1"><text:bookmark-ref text:reference-format="number-no-superior" text:ref-name="__RefHeading___Toc1778_1115178054"/></text:span><text:span text:style-name="MT1"><text:bookmark-ref text:reference-format="number-no-superior" text:ref-name="__RefHeading___Toc1778_1115178054"/></text:span><text:span text:style-name="MT1"><text:title>La politique de l'autruche</text:title></text:span><text:span text:style-name="MT1"><text:bookmark-ref text:reference-format="number-no-superior" text:ref-name="__RefHeading___Toc1560_1115178054"/></text:span><text:span text:style-name="MT1"><text:bookmark-ref text:reference-format="number-no-superior" text:ref-name="__RefHeading___Toc1560_1115178054"/></text:span><text:span text:style-name="MT1"><text:bookmark-ref text:reference-format="number-no-superior" text:ref-name="__RefHeading___Toc1560_1115178054"/></text:span></text:p>
        <text:p text:style-name="MP1"/>
        <text:p text:style-name="MP1"/>
      </style:header>
      <style:header-left>
        <text:p text:style-name="MP1">la politique de l’autruche</text:p>
        <text:p text:style-name="MP1"/>
        <text:p text:style-name="MP1"/>
      </style:header-left>
      <style:footer>
        <text:p text:style-name="MP2"/>
        <text:p text:style-name="MP2"/>
        <text:p text:style-name="Footer"><text:page-number text:select-page="current">201</text:page-number></text:p>
      </style:footer>
      <style:footer-left>
        <text:p text:style-name="MP2"/>
        <text:p text:style-name="Footer"><text:page-number text:select-page="current">200</text:page-number></text:p>
      </style:footer-left>
    </style:master-page>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18:22:41.046520838</meta:creation-date>
    <dc:language>fr-FR</dc:language>
    <meta:editing-cycles>3</meta:editing-cycles>
    <meta:editing-duration>PT13M50S</meta:editing-duration>
    <meta:generator>LibreOffice/7.6.4.1$Linux_X86_64 LibreOffice_project/e19e193f88cd6c0525a17fb7a176ed8e6a3e2aa1</meta:generator>
    <meta:keyword>Transformation</meta:keyword>
    <meta:keyword>Data</meta:keyword>
    <meta:keyword>IT</meta:keyword>
    <dc:subject>Comment se passent vraiment les Transformations ?</dc:subject>
    <dc:title>La politique de l'autruche</dc:title>
    <dc:date>2023-12-10T18:28:30.124247408</dc:date>
    <dc:creator>Fabrice PERSIAUT</dc:creator>
    <meta:print-date>2023-12-10T18:26:57.974059376</meta:print-date>
    <meta:printed-by>Fichiers PDF: Fabrice PERSIAUT</meta:printed-by>
    <meta:document-statistic meta:table-count="0" meta:image-count="1" meta:object-count="0" meta:page-count="213" meta:paragraph-count="1159" meta:word-count="47624" meta:character-count="291157" meta:non-whitespace-character-count="244770"/>
    <meta:user-defined meta:name="Company">Personal</meta:user-defined>
    <meta:user-defined meta:name="ContentTypeId">0x0101002BA46940387CAB469D18458AFEDE3E70</meta:user-defined>
    <meta:template xlink:type="simple" xlink:actuate="onRequest" xlink:title="Normal.dotm" xlink:href=""/>
  </office:meta>
</office:document-meta>
</file>